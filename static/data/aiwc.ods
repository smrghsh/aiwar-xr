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_50_0_37__32_-_32_Accent5" style:data-style-name="N0">
      <style:table-cell-properties style:vertical-align="automatic" fo:background-color="#F2CEEF"/>
      <style:text-properties fo:font-weight="bold" style:font-weight-asian="bold" style:font-weight-complex="bold" style:font-family-generic="swiss"/>
    </style:style>
    <style:style style:name="ce3" style:family="table-cell" style:parent-style-name="_50_0_37__32_-_32_Accent1" style:data-style-name="N0">
      <style:table-cell-properties style:vertical-align="automatic" fo:background-color="#C0E6F5"/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  <style:text-properties fo:font-style="italic" style:font-style-asian="italic" style:font-style-complex="italic"/>
    </style:style>
    <style:style style:name="ce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_50_0_37__32_-_32_Accent5" style:data-style-name="N0">
      <style:table-cell-properties style:vertical-align="automatic" fo:background-color="#F2CEEF"/>
      <style:text-properties style:text-line-through-style="solid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/>
      <style:text-properties style:text-line-through-style="solid"/>
    </style:style>
    <style:style style:name="ce1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Neutral" style:data-style-name="N0">
      <style:table-cell-properties style:vertical-align="automatic" fo:background-color="#FFEB9C"/>
      <style:text-properties fo:color="#9C5700" style:text-line-through-style="solid" style:font-family-generic="swiss"/>
    </style:style>
    <style:style style:name="ce14" style:family="table-cell" style:parent-style-name="Default" style:data-style-name="N0">
      <style:text-properties fo:font-style="italic" style:font-style-asian="italic" style:font-style-complex="italic"/>
    </style:style>
    <style:style style:name="ce15" style:family="table-cell" style:parent-style-name="Default" style:data-style-name="N0">
      <style:table-cell-properties style:vertical-align="automatic"/>
      <style:text-properties style:text-line-through-style="solid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shrink-to-fit="true"/>
    </style:style>
    <style:style style:name="ce17" style:family="table-cell" style:parent-style-name="Default" style:data-style-name="N0">
      <style:table-cell-properties style:vertical-align="automatic" style:shrink-to-fit="tru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/>
      <style:text-properties style:text-line-through-style="solid" fo:font-style="italic" style:font-style-asian="italic" style:font-style-complex="italic"/>
    </style:style>
    <style:style style:name="ce19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0" style:family="table-cell" style:parent-style-name="Default" style:data-style-name="N0">
      <style:text-properties style:text-line-through-style="solid"/>
    </style:style>
    <style:style style:name="ce21" style:family="table-cell" style:parent-style-name="Default" style:data-style-name="N0">
      <style:table-cell-properties style:vertical-align="automatic"/>
      <style:text-properties style:text-line-through-style="solid"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style:vertical-align="automatic" style:shrink-to-fit="true"/>
      <style:text-properties style:text-line-through-style="solid"/>
    </style:style>
    <style:style style:name="ce23" style:family="table-cell" style:parent-style-name="Default" style:data-style-name="N0">
      <style:table-cell-properties style:vertical-align="automatic"/>
    </style:style>
    <style:style style:name="ce24" style:family="table-cell" style:parent-style-name="Default" style:data-style-name="N0"/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1.05833333333333cm"/>
    </style:style>
    <style:style style:name="co9" style:family="table-column">
      <style:table-column-properties fo:break-before="auto" style:column-width="3.59833333333333cm"/>
    </style:style>
    <style:style style:name="co10" style:family="table-column">
      <style:table-column-properties fo:break-before="auto" style:column-width="1.666875cm"/>
    </style:style>
    <style:style style:name="co11" style:family="table-column">
      <style:table-column-properties fo:break-before="auto" style:column-width="7.064375cm"/>
    </style:style>
    <style:style style:name="co12" style:family="table-column">
      <style:table-column-properties fo:break-before="auto" style:column-width="6.72041666666667cm"/>
    </style:style>
    <style:style style:name="co13" style:family="table-column">
      <style:table-column-properties fo:break-before="auto" style:column-width="3.46604166666667cm"/>
    </style:style>
    <style:style style:name="co14" style:family="table-column">
      <style:table-column-properties fo:break-before="auto" style:column-width="5.66208333333333cm"/>
    </style:style>
    <style:style style:name="co15" style:family="table-column">
      <style:table-column-properties fo:break-before="auto" style:column-width="3.36020833333333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hem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2">
            <text:p>currentStatus:airo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militaryUse</text:p>
          </table:table-cell>
          <table:table-cell office:value-type="string" table:style-name="ce3">
            <text:p>civicUse</text:p>
          </table:table-cell>
          <table:table-cell office:value-type="string" table:style-name="ce3">
            <text:p>MLTask</text:p>
          </table:table-cell>
          <table:table-cell office:value-type="string" table:style-name="ce3">
            <text:p>MLType</text:p>
          </table:table-cell>
          <table:table-cell office:value-type="string" table:style-name="ce2">
            <text:p>purpose:vair</text:p>
          </table:table-cell>
          <table:table-cell office:value-type="string" table:style-name="ce2">
            <text:p>capacity:airo</text:p>
          </table:table-cell>
          <table:table-cell office:value-type="string" table:style-name="ce3">
            <text:p>output:airo</text:p>
          </table:table-cell>
          <table:table-cell office:value-type="string" table:style-name="ce3">
            <text:p>impact:vair</text:p>
          </table:table-cell>
          <table:table-cell office:value-type="string" table:style-name="ce4">
            <text:p>stakeholder</text:p>
          </table:table-cell>
          <table:table-cell office:value-type="string" table:style-name="ce4">
            <text:p>airo:type</text:p>
          </table:table-cell>
          <table:table-cell table:number-columns-repeated="16372" table:style-name="ce4"/>
        </table:table-row>
        <table:table-row table:style-name="ro1">
          <table:table-cell office:value-type="string" table:style-name="ce5">
            <text:p>Development</text:p>
          </table:table-cell>
          <table:table-cell office:value-type="string" table:style-name="ce5">
            <text:p>IntelligentControlSystem</text:p>
          </table:table-cell>
          <table:table-cell office:value-type="string" table:style-name="ce5">
            <text:p>Robot</text:p>
          </table:table-cell>
          <table:table-cell office:value-type="string" table:style-name="ce5">
            <text:p>Policing</text:p>
          </table:table-cell>
          <table:table-cell office:value-type="string" table:style-name="ce6">
            <text:p>Capture</text:p>
          </table:table-cell>
          <table:table-cell office:value-type="string" table:style-name="ce5">
            <text:p>ObjectRecognition</text:p>
          </table:table-cell>
          <table:table-cell office:value-type="string" table:style-name="ce5">
            <text:p>AssessingRiskOfOffending</text:p>
          </table:table-cell>
          <table:table-cell office:value-type="string" table:style-name="ce5">
            <text:p>BiometricsBasedEmotionRecognition</text:p>
          </table:table-cell>
          <table:table-cell office:value-type="string" table:style-name="ce5">
            <text:p>Action</text:p>
          </table:table-cell>
          <table:table-cell office:value-type="string" table:style-name="ce5">
            <text:p>PsychologicalHarm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Subject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Deployment</text:p>
          </table:table-cell>
          <table:table-cell office:value-type="string" table:style-name="ce5">
            <text:p>GenerativeModel</text:p>
          </table:table-cell>
          <table:table-cell office:value-type="string" table:style-name="ce5">
            <text:p>Intel</text:p>
          </table:table-cell>
          <table:table-cell office:value-type="string" table:style-name="ce5">
            <text:p>AR</text:p>
          </table:table-cell>
          <table:table-cell office:value-type="string" table:style-name="ce6">
            <text:p>Store</text:p>
          </table:table-cell>
          <table:table-cell office:value-type="string" table:style-name="ce5">
            <text:p>ObjectDetection</text:p>
          </table:table-cell>
          <table:table-cell office:value-type="string" table:style-name="ce5">
            <text:p>PredictiveMapping</text:p>
          </table:table-cell>
          <table:table-cell office:value-type="string" table:style-name="ce5">
            <text:p>AudioProcessing</text:p>
          </table:table-cell>
          <table:table-cell office:value-type="string" table:style-name="ce5">
            <text:p>Content</text:p>
          </table:table-cell>
          <table:table-cell office:value-type="string" table:style-name="ce5">
            <text:p>PhysicalInjury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ployer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peration</text:p>
          </table:table-cell>
          <table:table-cell office:value-type="string" table:style-name="ce5">
            <text:p>NarrowAI</text:p>
          </table:table-cell>
          <table:table-cell office:value-type="string" table:style-name="ce5">
            <text:p>Command</text:p>
          </table:table-cell>
          <table:table-cell office:value-type="string" table:style-name="ce5">
            <text:p>BehaviorEvaluation</text:p>
          </table:table-cell>
          <table:table-cell office:value-type="string" table:style-name="ce6">
            <text:p>Sort</text:p>
          </table:table-cell>
          <table:table-cell office:value-type="string" table:style-name="ce5">
            <text:p>FaceRecognition</text:p>
          </table:table-cell>
          <table:table-cell office:value-type="string" table:style-name="ce5">
            <text:p>ProducingRecommendation</text:p>
          </table:table-cell>
          <table:table-cell office:value-type="string" table:style-name="ce5">
            <text:p>BehaviourAnalysis</text:p>
          </table:table-cell>
          <table:table-cell office:value-type="string" table:style-name="ce5">
            <text:p>Decision</text:p>
          </table:table-cell>
          <table:table-cell office:value-type="string" table:style-name="ce5">
            <text:p>WellbeingImpact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Retirement</text:p>
          </table:table-cell>
          <table:table-cell office:value-type="string" table:style-name="ce5">
            <text:p>TrainingDatabase</text:p>
          </table:table-cell>
          <table:table-cell office:value-type="string" table:style-name="ce5">
            <text:p>Logistics</text:p>
          </table:table-cell>
          <table:table-cell office:value-type="string" table:style-name="ce5">
            <text:p>Logistics</text:p>
          </table:table-cell>
          <table:table-cell office:value-type="string" table:style-name="ce6">
            <text:p>Recognize</text:p>
          </table:table-cell>
          <table:table-cell office:value-type="string" table:style-name="ce5">
            <text:p>PatternRecognition</text:p>
          </table:table-cell>
          <table:table-cell office:value-type="string" table:style-name="ce5">
            <text:p>DetectingCriminalOffences</text:p>
          </table:table-cell>
          <table:table-cell office:value-type="string" table:style-name="ce5">
            <text:p>BiometricIdentification</text:p>
          </table:table-cell>
          <table:table-cell office:value-type="string" table:style-name="ce5">
            <text:p>Prediction</text:p>
          </table:table-cell>
          <table:table-cell office:value-type="string" table:style-name="ce5">
            <text:p>DistortionInHumanBehavior</text:p>
          </table:table-cell>
          <table:table-cell office:value-type="string" table:style-name="ce1">
            <text:p>Institution</text:p>
          </table:table-cell>
          <table:table-cell office:value-type="string" table:style-name="ce1">
            <text:p>AIProvider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5">
            <text:p>ExpertSystem</text:p>
          </table:table-cell>
          <table:table-cell office:value-type="string" table:style-name="ce5">
            <text:p>Prediction</text:p>
          </table:table-cell>
          <table:table-cell office:value-type="string" table:style-name="ce5">
            <text:p>RecommenderSystems</text:p>
          </table:table-cell>
          <table:table-cell office:value-type="string" table:style-name="ce6">
            <text:p>Predict</text:p>
          </table:table-cell>
          <table:table-cell office:value-type="string" table:style-name="ce5">
            <text:p>Ranking</text:p>
          </table:table-cell>
          <table:table-cell office:value-type="string" table:style-name="ce5">
            <text:p>Monitoring</text:p>
          </table:table-cell>
          <table:table-cell office:value-type="string" table:style-name="ce5">
            <text:p>BiometricCategorisation</text:p>
          </table:table-cell>
          <table:table-cell office:value-type="string" table:style-name="ce5">
            <text:p>Recommendation</text:p>
          </table:table-cell>
          <table:table-cell office:value-type="string" table:style-name="ce5">
            <text:p>Overreliance</text:p>
          </table:table-cell>
          <table:table-cell office:value-type="string" table:style-name="ce1">
            <text:p>Military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5">
            <text:p>ServiceRobot</text:p>
          </table:table-cell>
          <table:table-cell office:value-type="string" table:style-name="ce5">
            <text:p>Mapping</text:p>
          </table:table-cell>
          <table:table-cell office:value-type="string" table:style-name="ce5">
            <text:p>ConsumerTracking</text:p>
          </table:table-cell>
          <table:table-cell office:value-type="string" table:style-name="ce6">
            <text:p>Assign</text:p>
          </table:table-cell>
          <table:table-cell office:value-type="string" table:style-name="ce5">
            <text:p>SortingAlgorithm</text:p>
          </table:table-cell>
          <table:table-cell office:value-type="string" table:style-name="ce5">
            <text:p>DetectingIndividuals</text:p>
          </table:table-cell>
          <table:table-cell office:value-type="string" table:style-name="ce5">
            <text:p>ComputerVision</text:p>
          </table:table-cell>
          <table:table-cell table:style-name="ce5"/>
          <table:table-cell table:style-name="ce1"/>
          <table:table-cell office:value-type="string" table:style-name="ce1">
            <text:p>Police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MultiAgentSystem</text:p>
          </table:table-cell>
          <table:table-cell office:value-type="string" table:style-name="ce4">
            <text:p>Personnel</text:p>
          </table:table-cell>
          <table:table-cell office:value-type="string" table:style-name="ce5">
            <text:p>Games</text:p>
          </table:table-cell>
          <table:table-cell office:value-type="string" table:style-name="ce6">
            <text:p>Generate</text:p>
          </table:table-cell>
          <table:table-cell office:value-type="string" table:style-name="ce5">
            <text:p>Classification</text:p>
          </table:table-cell>
          <table:table-cell office:value-type="string" table:style-name="ce5">
            <text:p>DetectingLies</text:p>
          </table:table-cell>
          <table:table-cell office:value-type="string" table:style-name="ce5">
            <text:p>DialectRecognition</text:p>
          </table:table-cell>
          <table:table-cell table:style-name="ce5"/>
          <table:table-cell table:style-name="ce1"/>
          <table:table-cell office:value-type="string" table:style-name="ce1">
            <text:p>Company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Dashboard</text:p>
          </table:table-cell>
          <table:table-cell office:value-type="string" table:style-name="ce4">
            <text:p>Intelligence</text:p>
          </table:table-cell>
          <table:table-cell office:value-type="string" table:style-name="ce1">
            <text:p>SocialWelfareSystems</text:p>
          </table:table-cell>
          <table:table-cell office:value-type="string" table:style-name="ce6">
            <text:p>Automate</text:p>
          </table:table-cell>
          <table:table-cell office:value-type="string" table:style-name="ce5">
            <text:p>SignalAnalysis</text:p>
          </table:table-cell>
          <table:table-cell office:value-type="string" table:style-name="ce5">
            <text:p>PerformingBackgroundChecks</text:p>
          </table:table-cell>
          <table:table-cell office:value-type="string" table:style-name="ce5">
            <text:p>EmotionRecognition</text:p>
          </table:table-cell>
          <table:table-cell table:number-columns-repeated="2" table:style-name="ce5"/>
          <table:table-cell office:value-type="string" table:style-name="ce1">
            <text:p>Investor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4">
            <text:p>Nation</text:p>
          </table:table-cell>
          <table:table-cell office:value-type="string" table:style-name="ce4">
            <text:p>Operations</text:p>
          </table:table-cell>
          <table:table-cell office:value-type="string" table:style-name="ce1">
            <text:p>Security</text:p>
          </table:table-cell>
          <table:table-cell table:style-name="ce1"/>
          <table:table-cell office:value-type="string" table:style-name="ce7">
            <text:p>DecisionTree</text:p>
          </table:table-cell>
          <table:table-cell office:value-type="string" table:style-name="ce5">
            <text:p>IdentifyingIndividuals</text:p>
          </table:table-cell>
          <table:table-cell office:value-type="string" table:style-name="ce5">
            <text:p>FaceRecognition</text:p>
          </table:table-cell>
          <table:table-cell table:style-name="ce5"/>
          <table:table-cell table:style-name="ce1"/>
          <table:table-cell office:value-type="string" table:style-name="ce1">
            <text:p>Untility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4">
            <text:p>TechCompany</text:p>
          </table:table-cell>
          <table:table-cell office:value-type="string" table:style-name="ce4">
            <text:p>Logistics</text:p>
          </table:table-cell>
          <table:table-cell office:value-type="string" table:style-name="ce1">
            <text:p>Marketing</text:p>
          </table:table-cell>
          <table:table-cell table:style-name="ce1"/>
          <table:table-cell office:value-type="string" table:style-name="ce5">
            <text:p>ComputerVision</text:p>
          </table:table-cell>
          <table:table-cell office:value-type="string" table:style-name="ce1">
            <text:p>RecognizingIndividuals</text:p>
          </table:table-cell>
          <table:table-cell table:number-columns-repeated="2" table:style-name="ce5"/>
          <table:table-cell table:style-name="ce1"/>
          <table:table-cell office:value-type="string" table:style-name="ce1">
            <text:p>Owner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4">
            <text:p>DefenseCompany</text:p>
          </table:table-cell>
          <table:table-cell office:value-type="string" table:style-name="ce4">
            <text:p>Planning</text:p>
          </table:table-cell>
          <table:table-cell office:value-type="string" table:style-name="ce1">
            <text:p>Advertising</text:p>
          </table:table-cell>
          <table:table-cell table:style-name="ce1"/>
          <table:table-cell office:value-type="string" table:style-name="ce5">
            <text:p>Recommendation</text:p>
          </table:table-cell>
          <table:table-cell office:value-type="string" table:style-name="ce1">
            <text:p>RemoteIdentification</text:p>
          </table:table-cell>
          <table:table-cell office:value-type="string" table:style-name="ce5">
            <text:p>Geolocation<text:s/></text:p>
          </table:table-cell>
          <table:table-cell table:style-name="ce5"/>
          <table:table-cell table:style-name="ce1"/>
          <table:table-cell office:value-type="string" table:style-name="ce1">
            <text:p>CEO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4">
            <text:p>Military</text:p>
          </table:table-cell>
          <table:table-cell office:value-type="string" table:style-name="ce4">
            <text:p>Communications</text:p>
          </table:table-cell>
          <table:table-cell office:value-type="string" table:style-name="ce1">
            <text:p>Robot</text:p>
          </table:table-cell>
          <table:table-cell table:style-name="ce1"/>
          <table:table-cell office:value-type="string" table:style-name="ce5">
            <text:p>SignalAnalysis</text:p>
          </table:table-cell>
          <table:table-cell office:value-type="string" table:style-name="ce1">
            <text:p>EvaluatingJobCandidates</text:p>
          </table:table-cell>
          <table:table-cell office:value-type="string" table:style-name="ce5">
            <text:p>GestureRecognition</text:p>
          </table:table-cell>
          <table:table-cell table:style-name="ce5"/>
          <table:table-cell table:style-name="ce1"/>
          <table:table-cell office:value-type="string" table:style-name="ce1">
            <text:p>Politician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4">
            <text:p>Investor</text:p>
          </table:table-cell>
          <table:table-cell office:value-type="string" table:style-name="ce4">
            <text:p>Command</text:p>
          </table:table-cell>
          <table:table-cell office:value-type="string" table:style-name="ce1">
            <text:p>Delivery</text:p>
          </table:table-cell>
          <table:table-cell table:style-name="ce1"/>
          <table:table-cell office:value-type="string" table:style-name="ce5">
            <text:p>DecisionTree</text:p>
          </table:table-cell>
          <table:table-cell office:value-type="string" table:style-name="ce1">
            <text:p>EvaluatingEmployeePerformance</text:p>
          </table:table-cell>
          <table:table-cell office:value-type="string" table:style-name="ce5">
            <text:p>ImageGeneration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4">
            <text:p>Institution</text:p>
          </table:table-cell>
          <table:table-cell table:style-name="ce1"/>
          <table:table-cell office:value-type="string" table:style-name="ce1">
            <text:p>CrowdControl</text:p>
          </table:table-cell>
          <table:table-cell table:style-name="ce1"/>
          <table:table-cell office:value-type="string" table:style-name="ce5">
            <text:p>PoseEstimation</text:p>
          </table:table-cell>
          <table:table-cell office:value-type="string" table:style-name="ce1">
            <text:p>AssessingPeopleRelatedRisk</text:p>
          </table:table-cell>
          <table:table-cell office:value-type="string" table:style-name="ce5">
            <text:p>InformationRetrieval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4">
            <text:p>Utility</text:p>
          </table:table-cell>
          <table:table-cell table:style-name="ce1"/>
          <table:table-cell office:value-type="string" table:style-name="ce1">
            <text:p>PrivateSecurity</text:p>
          </table:table-cell>
          <table:table-cell table:style-name="ce1"/>
          <table:table-cell office:value-type="string" table:style-name="ce7">
            <text:p>SpatialReasoning</text:p>
          </table:table-cell>
          <table:table-cell table:style-name="ce1"/>
          <table:table-cell office:value-type="string" table:style-name="ce5">
            <text:p>LieDetection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1">
            <text:p>BorderPatrol</text:p>
          </table:table-cell>
          <table:table-cell table:style-name="ce1"/>
          <table:table-cell office:value-type="string" table:style-name="ce7">
            <text:p>TemporalReasoning</text:p>
          </table:table-cell>
          <table:table-cell table:style-name="ce1"/>
          <table:table-cell office:value-type="string" table:style-name="ce5">
            <text:p>NamedEntityRecognition</text:p>
          </table:table-cell>
          <table:table-cell table:style-name="ce5"/>
          <table:table-cell table:number-columns-repeated="16375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7">
            <text:p>CommonSenseReasoning</text:p>
          </table:table-cell>
          <table:table-cell table:style-name="ce1"/>
          <table:table-cell office:value-type="string" table:style-name="ce5">
            <text:p>ObjectDetection</text:p>
          </table:table-cell>
          <table:table-cell table:style-name="ce5"/>
          <table:table-cell table:number-columns-repeated="16375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7">
            <text:p>PolicyReasoning</text:p>
          </table:table-cell>
          <table:table-cell table:style-name="ce1"/>
          <table:table-cell office:value-type="string" table:style-name="ce5">
            <text:p>ObjectRecognition</text:p>
          </table:table-cell>
          <table:table-cell table:style-name="ce5"/>
          <table:table-cell table:number-columns-repeated="16375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7">
            <text:p>SpeechSynthesis</text:p>
          </table:table-cell>
          <table:table-cell table:style-name="ce1"/>
          <table:table-cell office:value-type="string" table:style-name="ce5">
            <text:p>PoseEstimation</text:p>
          </table:table-cell>
          <table:table-cell table:style-name="ce5"/>
          <table:table-cell table:number-columns-repeated="16375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7">
            <text:p>SpeechAnalysis</text:p>
          </table:table-cell>
          <table:table-cell table:style-name="ce1"/>
          <table:table-cell office:value-type="string" table:style-name="ce5">
            <text:p>Profiling</text:p>
          </table:table-cell>
          <table:table-cell table:style-name="ce5"/>
          <table:table-cell table:number-columns-repeated="16375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7">
            <text:p>VoiceRecognition</text:p>
          </table:table-cell>
          <table:table-cell table:style-name="ce1"/>
          <table:table-cell office:value-type="string" table:style-name="ce5">
            <text:p>SignalTracking</text:p>
          </table:table-cell>
          <table:table-cell table:style-name="ce5"/>
          <table:table-cell table:number-columns-repeated="16375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5">
            <text:p>TextAnalysis</text:p>
          </table:table-cell>
          <table:table-cell table:style-name="ce1"/>
          <table:table-cell office:value-type="string" table:style-name="ce5">
            <text:p>RelationshipExtraction</text:p>
          </table:table-cell>
          <table:table-cell table:style-name="ce5"/>
          <table:table-cell table:number-columns-repeated="16375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7">
            <text:p>TextGeneration</text:p>
          </table:table-cell>
          <table:table-cell table:style-name="ce1"/>
          <table:table-cell office:value-type="string" table:style-name="ce5">
            <text:p>SensitiveAttributeInference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7">
            <text:p>ImageGeneration</text:p>
          </table:table-cell>
          <table:table-cell table:style-name="ce1"/>
          <table:table-cell office:value-type="string" table:style-name="ce5">
            <text:p>SentimentAnalysis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5">
            <text:p>Photogrammetry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7">
            <text:p>TransformerModel</text:p>
          </table:table-cell>
          <table:table-cell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7">
            <text:p>Clustering</text:p>
          </table:table-cell>
          <table:table-cell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7">
            <text:p>SentimentAnalysis</text:p>
          </table:table-cell>
          <table:table-cell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7">
            <text:p>SignalTracking</text:p>
          </table:table-cell>
          <table:table-cell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7">
            <text:p>KnowledgeBase</text:p>
          </table:table-cell>
          <table:table-cell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7">
            <text:p>InformationRetrieval</text:p>
          </table:table-cell>
          <table:table-cell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5"/>
          <table:table-cell table:number-columns-repeated="2" table:style-name="ce1"/>
          <table:table-cell table:style-name="ce5"/>
          <table:table-cell table:number-columns-repeated="16376"/>
        </table:table-row>
        <table:table-row table:style-name="ro1">
          <table:table-cell table:number-columns-repeated="5"/>
          <table:table-cell table:style-name="ce7"/>
          <table:table-cell table:style-name="ce1"/>
          <table:table-cell table:style-name="ce5"/>
          <table:table-cell table:number-columns-repeated="16376"/>
        </table:table-row>
        <table:table-row table:number-rows-repeated="2" table:style-name="ro1">
          <table:table-cell table:number-columns-repeated="5"/>
          <table:table-cell table:number-columns-repeated="2" table:style-name="ce1"/>
          <table:table-cell table:style-name="ce5"/>
          <table:table-cell table:number-columns-repeated="16376"/>
        </table:table-row>
        <table:table-row table:number-rows-repeated="1048540" table:style-name="ro1">
          <table:table-cell table:number-columns-repeated="16384"/>
        </table:table-row>
      </table:table>
      <table:table table:name="Nouns" table:style-name="ta2">
        <table:table-column table:style-name="co3" table:default-cell-style-name="ce1"/>
        <table:table-column table:style-name="co1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8">
            <text:p>id</text:p>
          </table:table-cell>
          <table:table-cell office:value-type="string" table:style-name="ce8">
            <text:p>name</text:p>
          </table:table-cell>
          <table:table-cell office:value-type="string" table:style-name="ce8">
            <text:p>credit</text:p>
          </table:table-cell>
          <table:table-cell office:value-type="string" table:style-name="ce8">
            <text:p>hover</text:p>
          </table:table-cell>
          <table:table-cell office:value-type="string" table:style-name="ce8">
            <text:p>unicode</text:p>
          </table:table-cell>
          <table:table-cell office:value-type="string" table:style-name="ce8">
            <text:p>shortcode</text:p>
          </table:table-cell>
          <table:table-cell office:value-type="string" table:style-name="ce8">
            <text:p>emoji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biometricData</text:p>
          </table:table-cell>
          <table:table-cell office:value-type="string" table:style-name="ce9">
            <text:p>noun-mobile-biometric-5477684</text:p>
          </table:table-cell>
          <table:table-cell office:value-type="string" table:style-name="ce9">
            <text:p>Vectors Market</text:p>
          </table:table-cell>
          <table:table-cell table:style-name="ce9"/>
          <table:table-cell office:value-type="string" table:style-name="ce9">
            <text:p>U+1FAC6</text:p>
          </table:table-cell>
          <table:table-cell office:value-type="string" table:style-name="ce9">
            <text:p>:fingerprint:</text:p>
          </table:table-cell>
          <table:table-cell office:value-type="string" table:style-name="ce9">
            <text:p>🫆</text:p>
          </table:table-cell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 office:value-type="string" table:style-name="ce9">
            <text:p>assistant</text:p>
          </table:table-cell>
          <table:table-cell office:value-type="string" table:style-name="ce1">
            <text:p>noun-chatbot-7107716</text:p>
          </table:table-cell>
          <table:table-cell office:value-type="string" table:style-name="ce1">
            <text:p>Sulistiana</text:p>
          </table:table-cell>
          <table:table-cell table:style-name="ce9"/>
          <table:table-cell office:value-type="string" table:style-name="ce9">
            <text:p>U+1F4AC</text:p>
          </table:table-cell>
          <table:table-cell office:value-type="string" table:style-name="ce9">
            <text:p>:speech_balloon:</text:p>
          </table:table-cell>
          <table:table-cell office:value-type="string" table:style-name="ce9">
            <text:p>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classifier</text:p>
          </table:table-cell>
          <table:table-cell office:value-type="string" table:style-name="ce1">
            <text:p>noun-classification-6860055</text:p>
          </table:table-cell>
          <table:table-cell office:value-type="string" table:style-name="ce1">
            <text:p>Sulistiana</text:p>
          </table:table-cell>
          <table:table-cell table:number-columns-repeated="11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cloud</text:p>
          </table:table-cell>
          <table:table-cell office:value-type="string" table:style-name="ce1">
            <text:p>noun-locked-cloud-5565062</text:p>
          </table:table-cell>
          <table:table-cell office:value-type="string" table:style-name="ce1">
            <text:p>iconfiel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code</text:p>
          </table:table-cell>
          <table:table-cell office:value-type="string" table:style-name="ce1">
            <text:p>noun-code-7338786</text:p>
          </table:table-cell>
          <table:table-cell office:value-type="string" table:style-name="ce1">
            <text:p>Puspa Kusuma</text:p>
          </table:table-cell>
          <table:table-cell table:number-columns-repeated="11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creditCardData</text:p>
          </table:table-cell>
          <table:table-cell office:value-type="string" table:style-name="ce9">
            <text:p>noun-credit-card-information-2545265</text:p>
          </table:table-cell>
          <table:table-cell office:value-type="string" table:style-name="ce9">
            <text:p>Oleksandr Panasovskyi</text:p>
          </table:table-cell>
          <table:table-cell table:style-name="ce9"/>
          <table:table-cell office:value-type="string" table:style-name="ce9">
            <text:p>U+1F4B8</text:p>
          </table:table-cell>
          <table:table-cell office:value-type="string" table:style-name="ce9">
            <text:p>:money_with_wings:</text:p>
          </table:table-cell>
          <table:table-cell office:value-type="string" table:style-name="ce9">
            <text:p>💸</text:p>
          </table:table-cell>
          <table:table-cell table:number-columns-repeated="7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dataCenter</text:p>
          </table:table-cell>
          <table:table-cell office:value-type="string" table:style-name="ce9">
            <text:p>noun-data-center-2301592</text:p>
          </table:table-cell>
          <table:table-cell office:value-type="string" table:style-name="ce9">
            <text:p>H Alberto Gongora</text:p>
          </table:table-cell>
          <table:table-cell table:style-name="ce9"/>
          <table:table-cell office:value-type="string" table:style-name="ce9">
            <text:p>U+1F5C4 U+FE0F</text:p>
          </table:table-cell>
          <table:table-cell office:value-type="string" table:style-name="ce9">
            <text:p>:file_cabinet:</text:p>
          </table:table-cell>
          <table:table-cell office:value-type="string" table:style-name="ce9">
            <text:p>🗄️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dataset</text:p>
          </table:table-cell>
          <table:table-cell office:value-type="string" table:style-name="ce9">
            <text:p>noun-dataset-2985133</text:p>
          </table:table-cell>
          <table:table-cell office:value-type="string" table:style-name="ce9">
            <text:p>Iconathon</text:p>
          </table:table-cell>
          <table:table-cell table:style-name="ce9"/>
          <table:table-cell office:value-type="string" table:style-name="ce9">
            <text:p>U+1F5C2 U+FE0F</text:p>
          </table:table-cell>
          <table:table-cell office:value-type="string" table:style-name="ce9">
            <text:p>:card_index_dividers:</text:p>
          </table:table-cell>
          <table:table-cell office:value-type="string" table:style-name="ce9">
            <text:p>🗂️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digitalFootprint</text:p>
          </table:table-cell>
          <table:table-cell office:value-type="string" table:style-name="ce9">
            <text:p>noun-digital-footprint-6806678</text:p>
          </table:table-cell>
          <table:table-cell office:value-type="string" table:style-name="ce9">
            <text:p>Wartina Anggraeni</text:p>
          </table:table-cell>
          <table:table-cell table:style-name="ce9"/>
          <table:table-cell office:value-type="string" table:style-name="ce9">
            <text:p>U+1F463</text:p>
          </table:table-cell>
          <table:table-cell office:value-type="string" table:style-name="ce9">
            <text:p>:footprints:</text:p>
          </table:table-cell>
          <table:table-cell office:value-type="string" table:style-name="ce9">
            <text:p>👣</text:p>
          </table:table-cell>
          <table:table-cell table:number-columns-repeated="7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targetPeople</text:p>
          </table:table-cell>
          <table:table-cell office:value-type="string" table:style-name="ce1">
            <text:p>noun-infrared-drone-4284335</text:p>
          </table:table-cell>
          <table:table-cell office:value-type="string" table:style-name="ce1">
            <text:p>Amethyst Studio</text:p>
          </table:table-cell>
          <table:table-cell table:style-name="ce9"/>
          <table:table-cell table:number-columns-repeated="10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border</text:p>
          </table:table-cell>
          <table:table-cell office:value-type="string" table:style-name="ce9">
            <text:p>noun-restricted-areas-6831263</text:p>
          </table:table-cell>
          <table:table-cell office:value-type="string" table:style-name="ce9">
            <text:p>diyah farida</text:p>
          </table:table-cell>
          <table:table-cell table:style-name="ce9"/>
          <table:table-cell office:value-type="string" table:style-name="ce9">
            <text:p>U+1F6C2</text:p>
          </table:table-cell>
          <table:table-cell office:value-type="string" table:style-name="ce9">
            <text:p>:passport_control:</text:p>
          </table:table-cell>
          <table:table-cell office:value-type="string" table:style-name="ce9">
            <text:p>🛂</text:p>
          </table:table-cell>
          <table:table-cell table:style-name="ce9"/>
          <table:table-cell table:number-columns-repeated="6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expertSystem</text:p>
          </table:table-cell>
          <table:table-cell office:value-type="string" table:style-name="ce1">
            <text:p>noun-data-science-6432260</text:p>
          </table:table-cell>
          <table:table-cell office:value-type="string" table:style-name="ce1">
            <text:p>Creative Stall</text:p>
          </table:table-cell>
          <table:table-cell table:number-columns-repeated="11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faceRecogition</text:p>
          </table:table-cell>
          <table:table-cell office:value-type="string" table:style-name="ce9">
            <text:p>noun-facial-recognition-4116350</text:p>
          </table:table-cell>
          <table:table-cell office:value-type="string" table:style-name="ce9">
            <text:p>Laymik</text:p>
          </table:table-cell>
          <table:table-cell table:number-columns-repeated="4" table:style-name="ce9"/>
          <table:table-cell table:number-columns-repeated="7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noun-passport-5368372</text:p>
          </table:table-cell>
          <table:table-cell office:value-type="string" table:style-name="ce9">
            <text:p>Mohamed Mb</text:p>
          </table:table-cell>
          <table:table-cell table:style-name="ce9"/>
          <table:table-cell office:value-type="string" table:style-name="ce9">
            <text:p>U+1FAAA</text:p>
          </table:table-cell>
          <table:table-cell office:value-type="string" table:style-name="ce9">
            <text:p>:identification_card:</text:p>
          </table:table-cell>
          <table:table-cell office:value-type="string" table:style-name="ce9">
            <text:p>🪪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imageGeneration</text:p>
          </table:table-cell>
          <table:table-cell office:value-type="string" table:style-name="ce1">
            <text:p>noun-ai-art-6855254</text:p>
          </table:table-cell>
          <table:table-cell office:value-type="string" table:style-name="ce1">
            <text:p>Wartina Anggraeni</text:p>
          </table:table-cell>
          <table:table-cell table:style-name="ce1"/>
          <table:table-cell office:value-type="string" table:style-name="ce9">
            <text:p>U+1F5BC U+FE0F</text:p>
          </table:table-cell>
          <table:table-cell office:value-type="string" table:style-name="ce9">
            <text:p>:framed_picture:</text:p>
          </table:table-cell>
          <table:table-cell office:value-type="string" table:style-name="ce9">
            <text:p>🖼️</text:p>
          </table:table-cell>
          <table:table-cell table:number-columns-repeated="7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biometric</text:p>
          </table:table-cell>
          <table:table-cell office:value-type="string" table:style-name="ce9">
            <text:p>noun-iris-recognition-6831344</text:p>
          </table:table-cell>
          <table:table-cell office:value-type="string" table:style-name="ce9">
            <text:p>diyah farida</text:p>
          </table:table-cell>
          <table:table-cell table:style-name="ce9"/>
          <table:table-cell office:value-type="string" table:style-name="ce9">
            <text:p>U+1F441 U+FE0F</text:p>
          </table:table-cell>
          <table:table-cell office:value-type="string" table:style-name="ce9">
            <text:p>:eye:</text:p>
          </table:table-cell>
          <table:table-cell office:value-type="string" table:style-name="ce9">
            <text:p>👁️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labeling</text:p>
          </table:table-cell>
          <table:table-cell office:value-type="string" table:style-name="ce9">
            <text:p>noun-label-398432</text:p>
          </table:table-cell>
          <table:table-cell office:value-type="string" table:style-name="ce9">
            <text:p>Nakul Dhaka</text:p>
          </table:table-cell>
          <table:table-cell table:style-name="ce9"/>
          <table:table-cell office:value-type="string" table:style-name="ce9">
            <text:p>U+1F3F7 U+FE0F</text:p>
          </table:table-cell>
          <table:table-cell office:value-type="string" table:style-name="ce9">
            <text:p>:label:</text:p>
          </table:table-cell>
          <table:table-cell office:value-type="string" table:style-name="ce9">
            <text:p>🏷️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decisionC2</text:p>
          </table:table-cell>
          <table:table-cell office:value-type="string" table:style-name="ce1">
            <text:p>noun-surveillance-monitor-6831349</text:p>
          </table:table-cell>
          <table:table-cell office:value-type="string" table:style-name="ce1">
            <text:p>diyah farida</text:p>
          </table:table-cell>
          <table:table-cell table:style-name="ce1"/>
          <table:table-cell office:value-type="string" table:style-name="ce9">
            <text:p>U+1F69B</text:p>
          </table:table-cell>
          <table:table-cell office:value-type="string" table:style-name="ce9">
            <text:p>:articulated_lorry:</text:p>
          </table:table-cell>
          <table:table-cell office:value-type="string" table:style-name="ce9">
            <text:p>🚛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void-military</text:p>
          </table:table-cell>
          <table:table-cell office:value-type="string" table:style-name="ce9">
            <text:p>military-7338796</text:p>
          </table:table-cell>
          <table:table-cell office:value-type="string" table:style-name="ce9">
            <text:p>Puspa Kusuma</text:p>
          </table:table-cell>
          <table:table-cell table:style-name="ce9"/>
          <table:table-cell office:value-type="string" table:style-name="ce9">
            <text:p>U+1FA96</text:p>
          </table:table-cell>
          <table:table-cell office:value-type="string" table:style-name="ce9">
            <text:p>:military_helmet:</text:p>
          </table:table-cell>
          <table:table-cell office:value-type="string" table:style-name="ce9">
            <text:p>🪖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machineLearning</text:p>
          </table:table-cell>
          <table:table-cell office:value-type="string" table:style-name="ce9">
            <text:p>noun-unsupervised-ai-learning-2985149</text:p>
          </table:table-cell>
          <table:table-cell office:value-type="string" table:style-name="ce9">
            <text:p>Iconathon</text:p>
          </table:table-cell>
          <table:table-cell table:style-name="ce9"/>
          <table:table-cell office:value-type="string" table:style-name="ce9">
            <text:p>U+1F3B0</text:p>
          </table:table-cell>
          <table:table-cell office:value-type="string" table:style-name="ce9">
            <text:p>:slot_machine:</text:p>
          </table:table-cell>
          <table:table-cell office:value-type="string" table:style-name="ce9">
            <text:p>🎰</text:p>
          </table:table-cell>
          <table:table-cell table:number-columns-repeated="7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model</text:p>
          </table:table-cell>
          <table:table-cell office:value-type="string" table:style-name="ce1">
            <text:p>noun-text-generation-5611856</text:p>
          </table:table-cell>
          <table:table-cell office:value-type="string" table:style-name="ce1">
            <text:p>Valentin Cazin</text:p>
          </table:table-cell>
          <table:table-cell table:number-columns-repeated="11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namedEntityRecognition</text:p>
          </table:table-cell>
          <table:table-cell office:value-type="string" table:style-name="ce9">
            <text:p>noun-named-entity-recognition-7107707</text:p>
          </table:table-cell>
          <table:table-cell office:value-type="string" table:style-name="ce9">
            <text:p>Sulistiana</text:p>
          </table:table-cell>
          <table:table-cell table:style-name="ce9"/>
          <table:table-cell office:value-type="string" table:style-name="ce9">
            <text:p>U+1F4DB</text:p>
          </table:table-cell>
          <table:table-cell office:value-type="string" table:style-name="ce9">
            <text:p>:name_badge:</text:p>
          </table:table-cell>
          <table:table-cell office:value-type="string" table:style-name="ce9">
            <text:p>📛</text:p>
          </table:table-cell>
          <table:table-cell table:number-columns-repeated="7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nation</text:p>
          </table:table-cell>
          <table:table-cell office:value-type="string" table:style-name="ce9">
            <text:p>noun-globe-1978565</text:p>
          </table:table-cell>
          <table:table-cell office:value-type="string" table:style-name="ce1">
            <text:p>ProSymbols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9">
            <text:p>neurofeedback</text:p>
          </table:table-cell>
          <table:table-cell office:value-type="string" table:style-name="ce1">
            <text:p>noun-neurofeedback-7447387</text:p>
          </table:table-cell>
          <table:table-cell office:value-type="string" table:style-name="ce1">
            <text:p>Sulistiana</text:p>
          </table:table-cell>
          <table:table-cell table:number-columns-repeated="11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objectDetection</text:p>
          </table:table-cell>
          <table:table-cell office:value-type="string" table:style-name="ce1">
            <text:p>noun-object-recognition-6963419</text:p>
          </table:table-cell>
          <table:table-cell office:value-type="string" table:style-name="ce1">
            <text:p>Joanne Lus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patternRecognition</text:p>
          </table:table-cell>
          <table:table-cell office:value-type="string" table:style-name="ce9">
            <text:p>noun-pattern-recognition-7365776</text:p>
          </table:table-cell>
          <table:table-cell office:value-type="string" table:style-name="ce9">
            <text:p>ProSymbols</text:p>
          </table:table-cell>
          <table:table-cell table:style-name="ce9"/>
          <table:table-cell office:value-type="string" table:style-name="ce9">
            <text:p>U+1F9E9</text:p>
          </table:table-cell>
          <table:table-cell office:value-type="string" table:style-name="ce9">
            <text:p>:jigsaw:</text:p>
          </table:table-cell>
          <table:table-cell office:value-type="string" table:style-name="ce9">
            <text:p>🧩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police</text:p>
          </table:table-cell>
          <table:table-cell office:value-type="string" table:style-name="ce9">
            <text:p>noun-riot-control-national-guards-1584300</text:p>
          </table:table-cell>
          <table:table-cell office:value-type="string" table:style-name="ce9">
            <text:p>Gan Khoon Lay</text:p>
          </table:table-cell>
          <table:table-cell table:style-name="ce9"/>
          <table:table-cell office:value-type="string" table:style-name="ce9">
            <text:p>U+1F694 U+1F46E U+1F3FB U+200D U+2642 U+FE0F</text:p>
          </table:table-cell>
          <table:table-cell office:value-type="string" table:style-name="ce9">
            <text:p>:oncoming_police_car: :man_police_officer_light_skin_tone:</text:p>
          </table:table-cell>
          <table:table-cell office:value-type="string" table:style-name="ce9">
            <text:p>🚔👮🏻‍♂️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poseRecognition</text:p>
          </table:table-cell>
          <table:table-cell office:value-type="string" table:style-name="ce9">
            <text:p>noun-pose-estimation-6860082</text:p>
          </table:table-cell>
          <table:table-cell office:value-type="string" table:style-name="ce9">
            <text:p>Sulistiana</text:p>
          </table:table-cell>
          <table:table-cell table:style-name="ce9"/>
          <table:table-cell office:value-type="string" table:style-name="ce9">
            <text:p>U+1F93A</text:p>
          </table:table-cell>
          <table:table-cell office:value-type="string" table:style-name="ce9">
            <text:p>:person_fencing:</text:p>
          </table:table-cell>
          <table:table-cell office:value-type="string" table:style-name="ce9">
            <text:p>🤺</text:p>
          </table:table-cell>
          <table:table-cell table:number-columns-repeated="7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questionAnswering</text:p>
          </table:table-cell>
          <table:table-cell office:value-type="string" table:style-name="ce1">
            <text:p>noun-question-answering-7107719</text:p>
          </table:table-cell>
          <table:table-cell office:value-type="string" table:style-name="ce1">
            <text:p>Sulistian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ranking</text:p>
          </table:table-cell>
          <table:table-cell office:value-type="string" table:style-name="ce1">
            <text:p>noun-ranking-6315996</text:p>
          </table:table-cell>
          <table:table-cell office:value-type="string" table:style-name="ce1">
            <text:p>Anggara Putra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9">
            <text:p>reinforcementLearning</text:p>
          </table:table-cell>
          <table:table-cell office:value-type="string" table:style-name="ce1">
            <text:p>noun-reinforcement-learning-7107687</text:p>
          </table:table-cell>
          <table:table-cell office:value-type="string" table:style-name="ce1">
            <text:p>Sulistiana</text:p>
          </table:table-cell>
          <table:table-cell table:number-columns-repeated="11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remoteSensing</text:p>
          </table:table-cell>
          <table:table-cell office:value-type="string" table:style-name="ce9">
            <text:p>noun-remote-team-6432341</text:p>
          </table:table-cell>
          <table:table-cell office:value-type="string" table:style-name="ce9">
            <text:p>Creative Stall</text:p>
          </table:table-cell>
          <table:table-cell table:style-name="ce9"/>
          <table:table-cell office:value-type="string" table:style-name="ce9">
            <text:p>U+1F4E1</text:p>
          </table:table-cell>
          <table:table-cell office:value-type="string" table:style-name="ce9">
            <text:p>:satellite:</text:p>
          </table:table-cell>
          <table:table-cell office:value-type="string" table:style-name="ce9">
            <text:p>📡</text:p>
          </table:table-cell>
          <table:table-cell table:number-columns-repeated="7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restrictedArea</text:p>
          </table:table-cell>
          <table:table-cell office:value-type="string" table:style-name="ce9">
            <text:p>noun-restricted-areas-6831263</text:p>
          </table:table-cell>
          <table:table-cell office:value-type="string" table:style-name="ce9">
            <text:p>diyah farida</text:p>
          </table:table-cell>
          <table:table-cell table:style-name="ce9"/>
          <table:table-cell office:value-type="string" table:style-name="ce9">
            <text:p>U+1F6AB</text:p>
          </table:table-cell>
          <table:table-cell office:value-type="string" table:style-name="ce9">
            <text:p>:prohibited:</text:p>
          </table:table-cell>
          <table:table-cell office:value-type="string" table:style-name="ce9">
            <text:p>🚫</text:p>
          </table:table-cell>
          <table:table-cell table:number-columns-repeated="7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robotHardware</text:p>
          </table:table-cell>
          <table:table-cell office:value-type="string" table:style-name="ce1">
            <text:p>noun-bomb-defusing-robot-1036305</text:p>
          </table:table-cell>
          <table:table-cell office:value-type="string" table:style-name="ce1">
            <text:p>Lluisa Iborra</text:p>
          </table:table-cell>
          <table:table-cell table:style-name="ce1"/>
          <table:table-cell office:value-type="string" table:style-name="ce9">
            <text:p>U+1F4A5</text:p>
          </table:table-cell>
          <table:table-cell office:value-type="string" table:style-name="ce9">
            <text:p>:collision:</text:p>
          </table:table-cell>
          <table:table-cell office:value-type="string" table:style-name="ce9">
            <text:p>💥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robotPolice</text:p>
          </table:table-cell>
          <table:table-cell office:value-type="string" table:style-name="ce1">
            <text:p>noun-robotic-dog-5565087</text:p>
          </table:table-cell>
          <table:table-cell office:value-type="string" table:style-name="ce1">
            <text:p>iconfield</text:p>
          </table:table-cell>
          <table:table-cell table:style-name="ce1"/>
          <table:table-cell office:value-type="string" table:style-name="ce9">
            <text:p>U+1F916</text:p>
          </table:table-cell>
          <table:table-cell office:value-type="string" table:style-name="ce9">
            <text:p>:robot:</text:p>
          </table:table-cell>
          <table:table-cell office:value-type="string" table:style-name="ce9">
            <text:p>🤖</text:p>
          </table:table-cell>
          <table:table-cell table:number-columns-repeated="7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smartHome</text:p>
          </table:table-cell>
          <table:table-cell office:value-type="string" table:style-name="ce1">
            <text:p>noun-robot-vacuum-6793770</text:p>
          </table:table-cell>
          <table:table-cell office:value-type="string" table:style-name="ce1">
            <text:p>Hye Jee Ki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satellite</text:p>
          </table:table-cell>
          <table:table-cell office:value-type="string" table:style-name="ce1">
            <text:p>noun-satelite-5565092</text:p>
          </table:table-cell>
          <table:table-cell office:value-type="string" table:style-name="ce1">
            <text:p>iconfield</text:p>
          </table:table-cell>
          <table:table-cell table:style-name="ce9"/>
          <table:table-cell office:value-type="string" table:style-name="ce9">
            <text:p>U+1F4E1</text:p>
          </table:table-cell>
          <table:table-cell office:value-type="string" table:style-name="ce9">
            <text:p>:satellite:</text:p>
          </table:table-cell>
          <table:table-cell office:value-type="string" table:style-name="ce9">
            <text:p>📡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sentimentAnalysis</text:p>
          </table:table-cell>
          <table:table-cell office:value-type="string" table:style-name="ce9">
            <text:p>noun-emotion-7368928</text:p>
          </table:table-cell>
          <table:table-cell office:value-type="string" table:style-name="ce9">
            <text:p>Edy Susanto</text:p>
          </table:table-cell>
          <table:table-cell table:style-name="ce9"/>
          <table:table-cell office:value-type="string" table:style-name="ce9">
            <text:p>U+1F3AD</text:p>
          </table:table-cell>
          <table:table-cell office:value-type="string" table:style-name="ce9">
            <text:p>:performing_arts:</text:p>
          </table:table-cell>
          <table:table-cell office:value-type="string" table:style-name="ce9">
            <text:p>🎭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smartWatch</text:p>
          </table:table-cell>
          <table:table-cell office:value-type="string" table:style-name="ce9">
            <text:p>noun-fitness-tracker-6953556</text:p>
          </table:table-cell>
          <table:table-cell office:value-type="string" table:style-name="ce9">
            <text:p>Sulistiana</text:p>
          </table:table-cell>
          <table:table-cell table:style-name="ce9"/>
          <table:table-cell office:value-type="string" table:style-name="ce9">
            <text:p>U+231A</text:p>
          </table:table-cell>
          <table:table-cell office:value-type="string" table:style-name="ce9">
            <text:p>:watch:</text:p>
          </table:table-cell>
          <table:table-cell office:value-type="string" table:style-name="ce9">
            <text:p>⌚</text:p>
          </table:table-cell>
          <table:table-cell table:number-columns-repeated="7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network</text:p>
          </table:table-cell>
          <table:table-cell office:value-type="string" table:style-name="ce9">
            <text:p>noun-networking-2909312</text:p>
          </table:table-cell>
          <table:table-cell office:value-type="string" table:style-name="ce9">
            <text:p>Iconathon</text:p>
          </table:table-cell>
          <table:table-cell table:style-name="ce9"/>
          <table:table-cell office:value-type="string" table:style-name="ce9">
            <text:p>U+1F4C7</text:p>
          </table:table-cell>
          <table:table-cell office:value-type="string" table:style-name="ce9">
            <text:p>:card_index:</text:p>
          </table:table-cell>
          <table:table-cell office:value-type="string" table:style-name="ce9">
            <text:p>📇</text:p>
          </table:table-cell>
          <table:table-cell table:number-columns-repeated="7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speechRecognition</text:p>
          </table:table-cell>
          <table:table-cell office:value-type="string" table:style-name="ce1">
            <text:p>noun-speech-recognition-1870316</text:p>
          </table:table-cell>
          <table:table-cell office:value-type="string" table:style-name="ce1">
            <text:p>ProSymbols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9">
            <text:p>stakeholderDefenseCo</text:p>
          </table:table-cell>
          <table:table-cell office:value-type="string" table:style-name="ce1">
            <text:p>noun-radiation-205518</text:p>
          </table:table-cell>
          <table:table-cell office:value-type="string" table:style-name="ce1">
            <text:p>P Thanga Vignesh</text:p>
          </table:table-cell>
          <table:table-cell table:number-columns-repeated="11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stakeholderInvestor</text:p>
          </table:table-cell>
          <table:table-cell office:value-type="string" table:style-name="ce1">
            <text:p>noun-museum-198296</text:p>
          </table:table-cell>
          <table:table-cell office:value-type="string" table:style-name="ce1">
            <text:p>P Thanga Vignesh</text:p>
          </table:table-cell>
          <table:table-cell table:number-columns-repeated="11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stakeholderMilitary</text:p>
          </table:table-cell>
          <table:table-cell office:value-type="string" table:style-name="ce1">
            <text:p>noun-locked-location-198286</text:p>
          </table:table-cell>
          <table:table-cell office:value-type="string" table:style-name="ce1">
            <text:p>P Thanga Vignesh</text:p>
          </table:table-cell>
          <table:table-cell table:number-columns-repeated="11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stakeholderNation</text:p>
          </table:table-cell>
          <table:table-cell office:value-type="string" table:style-name="ce1">
            <text:p>noun-flagged-location-198290</text:p>
          </table:table-cell>
          <table:table-cell office:value-type="string" table:style-name="ce1">
            <text:p>P Thanga Vignesh</text:p>
          </table:table-cell>
          <table:table-cell table:number-columns-repeated="11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stakeholderNonprofit</text:p>
          </table:table-cell>
          <table:table-cell office:value-type="string" table:style-name="ce1">
            <text:p>noun-research-center-198322</text:p>
          </table:table-cell>
          <table:table-cell office:value-type="string" table:style-name="ce1">
            <text:p>P Thanga Vignesh</text:p>
          </table:table-cell>
          <table:table-cell table:number-columns-repeated="11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stakeholderTarget</text:p>
          </table:table-cell>
          <table:table-cell office:value-type="string" table:style-name="ce1">
            <text:p>noun-target-location-198264</text:p>
          </table:table-cell>
          <table:table-cell office:value-type="string" table:style-name="ce1">
            <text:p>P Thanga Vignes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stakeholderTechCo</text:p>
          </table:table-cell>
          <table:table-cell office:value-type="string" table:style-name="ce1">
            <text:p>noun-software-industry-198331</text:p>
          </table:table-cell>
          <table:table-cell office:value-type="string" table:style-name="ce1">
            <text:p>P Thanga Vignes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streaming</text:p>
          </table:table-cell>
          <table:table-cell office:value-type="string" table:style-name="ce1">
            <text:p>noun-mobile-streaming-6432337</text:p>
          </table:table-cell>
          <table:table-cell office:value-type="string" table:style-name="ce1">
            <text:p>Creative Sta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surveillanceCamera</text:p>
          </table:table-cell>
          <table:table-cell office:value-type="string" table:style-name="ce9">
            <text:p>noun-cctv-5477699</text:p>
          </table:table-cell>
          <table:table-cell office:value-type="string" table:style-name="ce9">
            <text:p>Vectors Market</text:p>
          </table:table-cell>
          <table:table-cell table:style-name="ce9"/>
          <table:table-cell office:value-type="string" table:style-name="ce9">
            <text:p>U+1F4F8</text:p>
          </table:table-cell>
          <table:table-cell office:value-type="string" table:style-name="ce9">
            <text:p>:camera_with_flash:</text:p>
          </table:table-cell>
          <table:table-cell office:value-type="string" table:style-name="ce9">
            <text:p>📸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targetedData</text:p>
          </table:table-cell>
          <table:table-cell office:value-type="string" table:style-name="ce1">
            <text:p>noun-target-data-6432306</text:p>
          </table:table-cell>
          <table:table-cell office:value-type="string" table:style-name="ce1">
            <text:p>Creative Sta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terrainMapping</text:p>
          </table:table-cell>
          <table:table-cell office:value-type="string" table:style-name="ce1">
            <text:p>noun-photogrammetry-4284363</text:p>
          </table:table-cell>
          <table:table-cell office:value-type="string" table:style-name="ce1">
            <text:p>Amethyst Studio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9">
            <text:p>textGen</text:p>
          </table:table-cell>
          <table:table-cell office:value-type="string" table:style-name="ce1">
            <text:p>noun-text-generator-6059191</text:p>
          </table:table-cell>
          <table:table-cell office:value-type="string" table:style-name="ce1">
            <text:p>LUTFI GANI AL ACHMAD</text:p>
          </table:table-cell>
          <table:table-cell table:style-name="ce1"/>
          <table:table-cell office:value-type="string" table:style-name="ce9">
            <text:p>U+1F9F6</text:p>
          </table:table-cell>
          <table:table-cell office:value-type="string" table:style-name="ce9">
            <text:p>:yarn:</text:p>
          </table:table-cell>
          <table:table-cell office:value-type="string" table:style-name="ce9">
            <text:p>🧶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trainingData</text:p>
          </table:table-cell>
          <table:table-cell office:value-type="string" table:style-name="ce9">
            <text:p>noun-ai-training-data-2985134</text:p>
          </table:table-cell>
          <table:table-cell office:value-type="string" table:style-name="ce9">
            <text:p>Iconathon</text:p>
          </table:table-cell>
          <table:table-cell table:style-name="ce9"/>
          <table:table-cell office:value-type="string" table:style-name="ce9">
            <text:p>U+1F5C3 U+FE0F</text:p>
          </table:table-cell>
          <table:table-cell office:value-type="string" table:style-name="ce9">
            <text:p>:card_file_box:</text:p>
          </table:table-cell>
          <table:table-cell office:value-type="string" table:style-name="ce9">
            <text:p>🗃️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uav</text:p>
          </table:table-cell>
          <table:table-cell office:value-type="string" table:style-name="ce9">
            <text:p>noun-drone-strike-75130</text:p>
          </table:table-cell>
          <table:table-cell office:value-type="string" table:style-name="ce9">
            <text:p>Dan Hetteix</text:p>
          </table:table-cell>
          <table:table-cell table:style-name="ce9"/>
          <table:table-cell office:value-type="string" table:style-name="ce9">
            <text:p>n-a</text:p>
          </table:table-cell>
          <table:table-cell office:value-type="string" table:style-name="ce9">
            <text:p>n-a</text:p>
          </table:table-cell>
          <table:table-cell table:style-name="ce9"/>
          <table:table-cell table:number-columns-repeated="7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void-vehicleTracking</text:p>
          </table:table-cell>
          <table:table-cell office:value-type="string" table:style-name="ce1">
            <text:p>noun-location-analytics-1631006</text:p>
          </table:table-cell>
          <table:table-cell office:value-type="string" table:style-name="ce1">
            <text:p>diyah farida</text:p>
          </table:table-cell>
          <table:table-cell table:style-name="ce1"/>
          <table:table-cell office:value-type="string" table:style-name="ce9">
            <text:p>U+1F69B</text:p>
          </table:table-cell>
          <table:table-cell office:value-type="string" table:style-name="ce9">
            <text:p>:articulated_lorry:</text:p>
          </table:table-cell>
          <table:table-cell office:value-type="string" table:style-name="ce9">
            <text:p>🚛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faceScan</text:p>
          </table:table-cell>
          <table:table-cell office:value-type="string" table:style-name="ce1">
            <text:p>noun-face-id-scan-1890640.png</text:p>
          </table:table-cell>
          <table:table-cell table:number-columns-repeated="12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database</text:p>
          </table:table-cell>
          <table:table-cell office:value-type="string" table:style-name="ce9">
            <text:p>noun-relational-database-5160523</text:p>
          </table:table-cell>
          <table:table-cell office:value-type="string" table:style-name="ce9">
            <text:p>Srinivas Agr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edge</text:p>
          </table:table-cell>
          <table:table-cell office:value-type="string" table:style-name="ce1">
            <text:p>noun-walkie-talkie-2052176</text:p>
          </table:table-cell>
          <table:table-cell office:value-type="string" table:style-name="ce1">
            <text:p>Vectors Market</text:p>
          </table:table-cell>
          <table:table-cell table:number-columns-repeated="11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socialPlatform</text:p>
          </table:table-cell>
          <table:table-cell office:value-type="string" table:style-name="ce9">
            <text:p>noun-social-media-platform-7481620</text:p>
          </table:table-cell>
          <table:table-cell office:value-type="string" table:style-name="ce9">
            <text:p>Pentagon8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location</text:p>
          </table:table-cell>
          <table:table-cell office:value-type="string" table:style-name="ce1">
            <text:p>noun-mobile-tracking-5477710</text:p>
          </table:table-cell>
          <table:table-cell office:value-type="string" table:style-name="ce1">
            <text:p>Vectors Market</text:p>
          </table:table-cell>
          <table:table-cell table:number-columns-repeated="11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targetBuilding</text:p>
          </table:table-cell>
          <table:table-cell office:value-type="string" table:style-name="ce9">
            <text:p>noun-earthquake-damage-6326583</text:p>
          </table:table-cell>
          <table:table-cell office:value-type="string" table:style-name="ce9">
            <text:p>bsd stud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automatedGuards</text:p>
          </table:table-cell>
          <table:table-cell office:value-type="string" table:style-name="ce9">
            <text:p>noun-police-robot-1119907</text:p>
          </table:table-cell>
          <table:table-cell office:value-type="string" table:style-name="ce9">
            <text:p>H Alberto Gongora</text:p>
          </table:table-cell>
          <table:table-cell table:number-columns-repeated="11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void-logisticsAssign</text:p>
          </table:table-cell>
          <table:table-cell office:value-type="string" table:style-name="ce1">
            <text:p>noun-threat-7566001</text:p>
          </table:table-cell>
          <table:table-cell office:value-type="string" table:style-name="ce1">
            <text:p>Dierys Desig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automatedGuns</text:p>
          </table:table-cell>
          <table:table-cell office:value-type="string" table:style-name="ce9">
            <text:p>noun-turret-6749967</text:p>
          </table:table-cell>
          <table:table-cell office:value-type="string" table:style-name="ce9">
            <text:p>Good Fath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decisionWeapons</text:p>
          </table:table-cell>
          <table:table-cell office:value-type="string" table:style-name="ce1">
            <text:p>noun-missile-launcher-2052140</text:p>
          </table:table-cell>
          <table:table-cell office:value-type="string" table:style-name="ce1">
            <text:p>Vectors Marke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vr</text:p>
          </table:table-cell>
          <table:table-cell office:value-type="string" table:style-name="ce9">
            <text:p>noun-virtual-headset-7137401</text:p>
          </table:table-cell>
          <table:table-cell office:value-type="string" table:style-name="ce9">
            <text:p>Freb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punchcard</text:p>
          </table:table-cell>
          <table:table-cell office:value-type="string" table:style-name="ce1">
            <text:p>noun-punch-card-5134996</text:p>
          </table:table-cell>
          <table:table-cell office:value-type="string" table:style-name="ce1">
            <text:p>lastspark</text:p>
          </table:table-cell>
          <table:table-cell table:number-columns-repeated="11" table:style-name="ce1"/>
          <table:table-cell table:style-name="ce9"/>
          <table:table-cell table:number-columns-repeated="16369"/>
        </table:table-row>
        <table:table-row table:style-name="ro1">
          <table:table-cell office:value-type="string" table:style-name="ce9">
            <text:p>infrastructure</text:p>
          </table:table-cell>
          <table:table-cell office:value-type="string" table:style-name="ce9">
            <text:p>noun-infrastructure-6195519</text:p>
          </table:table-cell>
          <table:table-cell office:value-type="string" table:style-name="ce9">
            <text:p>Dewi Novita Sar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stakeholderPerson</text:p>
          </table:table-cell>
          <table:table-cell office:value-type="string" table:style-name="ce1">
            <text:p>noun-person-2649456</text:p>
          </table:table-cell>
          <table:table-cell office:value-type="string" table:style-name="ce1">
            <text:p>Guilherme Furtad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healthcare</text:p>
          </table:table-cell>
          <table:table-cell office:value-type="string" table:style-name="ce9">
            <text:p>noun-health-insurance-7667596</text:p>
          </table:table-cell>
          <table:table-cell office:value-type="string" table:style-name="ce9">
            <text:p>Alvian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tower</text:p>
          </table:table-cell>
          <table:table-cell office:value-type="string" table:style-name="ce1">
            <text:p>noun-tower-111722</text:p>
          </table:table-cell>
          <table:table-cell office:value-type="string" table:style-name="ce1">
            <text:p>Creative Stall</text:p>
          </table:table-cell>
          <table:table-cell table:number-columns-repeated="16381" table:style-name="ce1"/>
        </table:table-row>
        <table:table-row table:number-rows-repeated="1048503" table:style-name="ro1">
          <table:table-cell table:number-columns-repeated="16384"/>
        </table:table-row>
      </table:table>
      <table:table table:name="N_Systems" table:style-name="ta2">
        <table:table-column table:style-name="co4" table:number-columns-repeated="2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3" table:default-cell-style-name="ce5"/>
        <table:table-column table:style-name="co7" table:default-cell-style-name="ce5" table:visibility="collapse"/>
        <table:table-column table:style-name="co7" table:number-columns-repeated="2" table:default-cell-style-name="ce5"/>
        <table:table-column table:style-name="co7" table:default-cell-style-name="ce11" table:visibility="collapse"/>
        <table:table-column table:style-name="co7" table:default-cell-style-name="ce5"/>
        <table:table-column table:style-name="co7" table:default-cell-style-name="ce5" table:visibility="collap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6367" table:default-cell-style-name="ce5"/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nam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currentStatus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MLTask</text:p>
          </table:table-cell>
          <table:table-cell office:value-type="string" table:style-name="ce3">
            <text:p>militaryUse</text:p>
          </table:table-cell>
          <table:table-cell office:value-type="string" table:style-name="ce3">
            <text:p>civicUse</text:p>
          </table:table-cell>
          <table:table-cell office:value-type="string" table:style-name="ce3">
            <text:p>MLTasks</text:p>
          </table:table-cell>
          <table:table-cell office:value-type="string" table:style-name="ce2">
            <text:p>purpose</text:p>
          </table:table-cell>
          <table:table-cell office:value-type="string" table:style-name="ce2">
            <text:p>capacity</text:p>
          </table:table-cell>
          <table:table-cell office:value-type="string" table:style-name="ce10">
            <text:p>vair:technique</text:p>
          </table:table-cell>
          <table:table-cell office:value-type="string" table:style-name="ce3">
            <text:p>output</text:p>
          </table:table-cell>
          <table:table-cell office:value-type="string" table:style-name="ce3">
            <text:p>vair:riskSources</text:p>
          </table:table-cell>
          <table:table-cell office:value-type="string" table:style-name="ce3">
            <text:p>impact</text:p>
          </table:table-cell>
          <table:table-cell office:value-type="string" table:style-name="ce6">
            <text:p>hover</text:p>
          </table:table-cell>
          <table:table-cell office:value-type="string" table:style-name="ce6">
            <text:p>image</text:p>
          </table:table-cell>
          <table:table-cell office:value-type="string" table:style-name="ce6">
            <text:p>nounKey</text:p>
          </table:table-cell>
          <table:table-cell table:number-columns-repeated="16366" table:style-name="ce6"/>
        </table:table-row>
        <table:table-row table:style-name="ro1">
          <table:table-cell office:value-type="string" table:style-name="ce5">
            <text:p>LargeGeospatialModels</text:p>
          </table:table-cell>
          <table:table-cell office:value-type="string" table:style-name="ce5">
            <text:p>Large Geospatial Models</text:p>
          </table:table-cell>
          <table:table-cell office:value-type="float" office:value="2025" table:style-name="ce5">
            <text:p>2025</text:p>
          </table:table-cell>
          <table:table-cell office:value-type="string" table:style-name="ce5">
            <text:p>Development</text:p>
          </table:table-cell>
          <table:table-cell office:value-type="string" table:style-name="ce5">
            <text:p>GenerativeAI</text:p>
          </table:table-cell>
          <table:table-cell office:value-type="string" table:style-name="ce5">
            <text:p>Generate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AR, Games</text:p>
          </table:table-cell>
          <table:table-cell office:value-type="string" table:style-name="ce5">
            <text:p>imageGeneration, Photogrammetry, TransformerModel</text:p>
          </table:table-cell>
          <table:table-cell office:value-type="string" table:style-name="ce5">
            <text:p>PredictiveMapping</text:p>
          </table:table-cell>
          <table:table-cell office:value-type="string" table:style-name="ce5">
            <text:p>ImageGeneration</text:p>
          </table:table-cell>
          <table:table-cell office:value-type="string" table:style-name="ce11">
            <text:p>DeepLearning</text:p>
          </table:table-cell>
          <table:table-cell office:value-type="string" table:style-name="ce5">
            <text:p>Content</text:p>
          </table:table-cell>
          <table:table-cell office:value-type="string" table:style-name="ce5">
            <text:p>InaccuratePrediction, BiasedTrainingData,<text:s/></text:p>
          </table:table-cell>
          <table:table-cell office:value-type="string" table:style-name="ce5">
            <text:p>PhysicalInjury, Overreliance, DistortionInHumanBehavior</text:p>
          </table:table-cell>
          <table:table-cell office:value-type="string" office:string-value="name: Large Geospatial Models; task: GenerativeAI; AI type: Generate; P3; Military use: Intelligence; Civic use: AR, Games; year: 2025" table:formula="of:= COM.MICROSOFT.CONCAT(&quot;name: &quot;; [.B2]; &quot;; task: &quot;; [.E2]; &quot;; AI type: &quot;; [.F2]; &quot;; P3; Military use: &quot;; [.G2]; &quot;; Civic use: &quot;; [.H2]; &quot;; year: &quot;;[.C2])" table:style-name="ce12">
            <text:p>name: Large Geospatial Models; task: GenerativeAI; AI type: Generate; P3; Military use: Intelligence; Civic use: AR, Games; year: 2025</text:p>
          </table:table-cell>
          <table:table-cell office:value-type="string" table:style-name="ce5">
            <text:p>./assets/noun-photogrammetry-4284363.png</text:p>
          </table:table-cell>
          <table:table-cell office:value-type="string" table:style-name="ce12">
            <text:p>terrainMapping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PolygraphPlus</text:p>
          </table:table-cell>
          <table:table-cell office:value-type="string" table:style-name="ce5">
            <text:p>Polygraph+</text:p>
          </table:table-cell>
          <table:table-cell office:value-type="float" office:value="2024" table:style-name="ce5">
            <text:p>2024</text:p>
          </table:table-cell>
          <table:table-cell office:value-type="string" table:style-name="ce5">
            <text:p>Development</text:p>
          </table:table-cell>
          <table:table-cell office:value-type="string" table:style-name="ce5">
            <text:p>BehaviorModeling, AnomalyDetection, ComputerVision, VoiceRecognition, IoT</text:p>
          </table:table-cell>
          <table:table-cell office:value-type="string" table:style-name="ce5">
            <text:p>Recognize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BehaviorEvaluation</text:p>
          </table:table-cell>
          <table:table-cell office:value-type="string" table:style-name="ce5">
            <text:p>SignalAnalysis</text:p>
          </table:table-cell>
          <table:table-cell office:value-type="string" table:style-name="ce5">
            <text:p>DetectingLies, DetectingCriminalOffences, AssessingRiskOfOffending, AssessingPeopleRelatedRisk, EvaluatingEmployeePerformance, EvaluatingJobCandidates, ProducingRecommendation</text:p>
          </table:table-cell>
          <table:table-cell office:value-type="string" table:style-name="ce5">
            <text:p>LieDetection, BehaviourAnalysis, BiometricsBasedEmotionRecognition, BiometricCategorisation, EmotionRecognition, GestureRecognition, Profiling,<text:s/></text:p>
          </table:table-cell>
          <table:table-cell office:value-type="string" table:style-name="ce13">
            <text:p>SemiUnsupervisedLearning, StatisticalTechnique</text:p>
          </table:table-cell>
          <table:table-cell office:value-type="string" table:style-name="ce5">
            <text:p>Decision</text:p>
          </table:table-cell>
          <table:table-cell table:style-name="ce5"/>
          <table:table-cell office:value-type="string" table:style-name="ce5">
            <text:p>WellbeingImpact, PsychologicalHarm</text:p>
          </table:table-cell>
          <table:table-cell office:value-type="string" office:string-value="name: Polygraph+; task: BehaviorModeling, AnomalyDetection, ComputerVision, VoiceRecognition, IoT; AI type: Recognize; P3; Military use: Intelligence; Civic use: BehaviorEvaluation; year: 2024" table:formula="of:= COM.MICROSOFT.CONCAT(&quot;name: &quot;; [.B3]; &quot;; task: &quot;; [.E3]; &quot;; AI type: &quot;; [.F3]; &quot;; P3; Military use: &quot;; [.G3]; &quot;; Civic use: &quot;; [.H3]; &quot;; year: &quot;;[.C3])" table:style-name="ce12">
            <text:p>name: Polygraph+; task: BehaviorModeling, AnomalyDetection, ComputerVision, VoiceRecognition, IoT; AI type: Recognize; P3; Military use: Intelligence; Civic use: BehaviorEvaluation; year: 2024</text:p>
          </table:table-cell>
          <table:table-cell office:value-type="string" table:style-name="ce5">
            <text:p>./assets/noun-neurofeedback-7447387.png</text:p>
          </table:table-cell>
          <table:table-cell office:value-type="string" table:style-name="ce5">
            <text:p>neurofeedback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Lavender</text:p>
          </table:table-cell>
          <table:table-cell office:value-type="string" table:style-name="ce5">
            <text:p>Lavender</text:p>
          </table:table-cell>
          <table:table-cell office:value-type="float" office:value="2023" table:style-name="ce5">
            <text:p>2023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RecommendationSystem, PredictiveAnalytics, BehaviorModeling</text:p>
          </table:table-cell>
          <table:table-cell office:value-type="string" table:style-name="ce5">
            <text:p>Predict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RecommenderSystem</text:p>
          </table:table-cell>
          <table:table-cell office:value-type="string" table:style-name="ce5">
            <text:p>Ranking, Recommendation</text:p>
          </table:table-cell>
          <table:table-cell office:value-type="string" table:style-name="ce5">
            <text:p>ProducingRecommendation</text:p>
          </table:table-cell>
          <table:table-cell office:value-type="string" table:style-name="ce5">
            <text:p>Profiling, InformationRetrieval, NamedEntityRecognition, RelationshipExtraction, SensitiveAttributeInference, SentimentAnalysis</text:p>
          </table:table-cell>
          <table:table-cell office:value-type="string" table:style-name="ce11">
            <text:p>LanguageModels</text:p>
          </table:table-cell>
          <table:table-cell office:value-type="string" table:style-name="ce5">
            <text:p>Recommendation</text:p>
          </table:table-cell>
          <table:table-cell office:value-type="string" table:style-name="ce5">
            <text:p>InaccurateRecommendation, BiasedTrainingData, ErrorInDataCollection, ErrorInDataPreparation, WrongDataDesignChoice, LowAccuracy</text:p>
          </table:table-cell>
          <table:table-cell office:value-type="string" table:style-name="ce5">
            <text:p>PhysicalInjury, WellbeingImpact, PsychologicalHarm</text:p>
          </table:table-cell>
          <table:table-cell office:value-type="string" office:string-value="name: Lavender; task: RecommendationSystem, PredictiveAnalytics, BehaviorModeling; AI type: Predict; P3; Military use: Intelligence; Civic use: RecommenderSystem; year: 2023" table:formula="of:= COM.MICROSOFT.CONCAT(&quot;name: &quot;; [.B4]; &quot;; task: &quot;; [.E4]; &quot;; AI type: &quot;; [.F4]; &quot;; P3; Military use: &quot;; [.G4]; &quot;; Civic use: &quot;; [.H4]; &quot;; year: &quot;;[.C4])" table:style-name="ce12">
            <text:p>name: Lavender; task: RecommendationSystem, PredictiveAnalytics, BehaviorModeling; AI type: Predict; P3; Military use: Intelligence; Civic use: RecommenderSystem; year: 2023</text:p>
          </table:table-cell>
          <table:table-cell office:value-type="string" table:style-name="ce5">
            <text:p>./assets/noun-target-7619584.png</text:p>
          </table:table-cell>
          <table:table-cell office:value-type="string" table:style-name="ce12">
            <text:p>ml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WheresDaddy</text:p>
          </table:table-cell>
          <table:table-cell office:value-type="string" table:style-name="ce5">
            <text:p>Where's Daddy</text:p>
          </table:table-cell>
          <table:table-cell office:value-type="float" office:value="2023" table:style-name="ce5">
            <text:p>2023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LocationAwareness</text:p>
          </table:table-cell>
          <table:table-cell office:value-type="string" table:style-name="ce5">
            <text:p>Predict</text:p>
          </table:table-cell>
          <table:table-cell office:value-type="string" table:style-name="ce5">
            <text:p>Command</text:p>
          </table:table-cell>
          <table:table-cell office:value-type="string" table:style-name="ce5">
            <text:p>Logistics, Delivery, Advertising</text:p>
          </table:table-cell>
          <table:table-cell office:value-type="string" table:style-name="ce5">
            <text:p>PatternRecognition, DataSynthesis, SignalAnalysis, TextAnalysis,<text:s/></text:p>
          </table:table-cell>
          <table:table-cell office:value-type="string" table:style-name="ce5">
            <text:p>ProducingRecommendation, DetectingIndividuals</text:p>
          </table:table-cell>
          <table:table-cell office:value-type="string" table:style-name="ce5">
            <text:p>Geolocation, ComputerVision, ObjectRecognition, SignalTracking</text:p>
          </table:table-cell>
          <table:table-cell table:style-name="ce11"/>
          <table:table-cell office:value-type="string" table:style-name="ce5">
            <text:p>Prediction</text:p>
          </table:table-cell>
          <table:table-cell office:value-type="string" table:style-name="ce5">
            <text:p>InaccurateRecommendation, BiasedTrainingData, ErrorInDataCollection, ErrorInDataPreparation, WrongDataDesignChoice, LowAccuracy</text:p>
          </table:table-cell>
          <table:table-cell office:value-type="string" table:style-name="ce5">
            <text:p>PhysicalInjury, WellbeingImpact, PsychologicalHarm</text:p>
          </table:table-cell>
          <table:table-cell office:value-type="string" office:string-value="name: Where's Daddy; task: LocationAwareness; AI type: Predict; P3; Military use: Command; Civic use: Logistics, Delivery, Advertising; year: 2023" table:formula="of:= COM.MICROSOFT.CONCAT(&quot;name: &quot;; [.B5]; &quot;; task: &quot;; [.E5]; &quot;; AI type: &quot;; [.F5]; &quot;; P3; Military use: &quot;; [.G5]; &quot;; Civic use: &quot;; [.H5]; &quot;; year: &quot;;[.C5])" table:style-name="ce12">
            <text:p>name: Where's Daddy; task: LocationAwareness; AI type: Predict; P3; Military use: Command; Civic use: Logistics, Delivery, Advertising; year: 2023</text:p>
          </table:table-cell>
          <table:table-cell office:value-type="string" table:style-name="ce5">
            <text:p>./assets/noun-infrared-drone-4284335.png</text:p>
          </table:table-cell>
          <table:table-cell office:value-type="string" table:style-name="ce5">
            <text:p>locationTracking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LegionX</text:p>
          </table:table-cell>
          <table:table-cell office:value-type="string" table:style-name="ce5">
            <text:p>LegionX</text:p>
          </table:table-cell>
          <table:table-cell office:value-type="float" office:value="2022" table:style-name="ce5">
            <text:p>2022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Robotics/Navigation, MultiAgentSystem</text:p>
          </table:table-cell>
          <table:table-cell office:value-type="string" table:style-name="ce5">
            <text:p>Automate</text:p>
          </table:table-cell>
          <table:table-cell office:value-type="string" table:style-name="ce5">
            <text:p>Operations, Intelligence</text:p>
          </table:table-cell>
          <table:table-cell office:value-type="string" table:style-name="ce5">
            <text:p>Policing, CrowdControl, PrivateSecurity, BehaviorEvaluation</text:p>
          </table:table-cell>
          <table:table-cell office:value-type="string" table:style-name="ce5">
            <text:p>PatternRecognition, ObjectRecognition, PoseEstimation</text:p>
          </table:table-cell>
          <table:table-cell office:value-type="string" table:style-name="ce5">
            <text:p>ProducingRecommendation, DetectingIndividuals</text:p>
          </table:table-cell>
          <table:table-cell office:value-type="string" table:style-name="ce5">
            <text:p>ObjectDetection, PoseEstimation, Geolocation</text:p>
          </table:table-cell>
          <table:table-cell table:style-name="ce11"/>
          <table:table-cell office:value-type="string" table:style-name="ce5">
            <text:p>Action, Decision</text:p>
          </table:table-cell>
          <table:table-cell table:style-name="ce5"/>
          <table:table-cell office:value-type="string" table:style-name="ce5">
            <text:p>PhysicalInjury, Overreliance, DistortionInHumanBehavior</text:p>
          </table:table-cell>
          <table:table-cell office:value-type="string" office:string-value="name: LegionX; task: Robotics/Navigation, MultiAgentSystem; AI type: Automate; P3; Military use: Operations, Intelligence; Civic use: Policing, CrowdControl, PrivateSecurity, BehaviorEvaluation; year: 2022" table:formula="of:= COM.MICROSOFT.CONCAT(&quot;name: &quot;; [.B6]; &quot;; task: &quot;; [.E6]; &quot;; AI type: &quot;; [.F6]; &quot;; P3; Military use: &quot;; [.G6]; &quot;; Civic use: &quot;; [.H6]; &quot;; year: &quot;;[.C6])" table:style-name="ce12">
            <text:p>name: LegionX; task: Robotics/Navigation, MultiAgentSystem; AI type: Automate; P3; Military use: Operations, Intelligence; Civic use: Policing, CrowdControl, PrivateSecurity, BehaviorEvaluation; year: 2022</text:p>
          </table:table-cell>
          <table:table-cell office:value-type="string" table:style-name="ce5">
            <text:p>./assets/noun-drone-strike-75130.png</text:p>
          </table:table-cell>
          <table:table-cell office:value-type="string" table:style-name="ce5">
            <text:p>poseRecognition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WolfPack</text:p>
          </table:table-cell>
          <table:table-cell office:value-type="string" table:style-name="ce5">
            <text:p>Wolf Pack</text:p>
          </table:table-cell>
          <table:table-cell office:value-type="float" office:value="2018" table:style-name="ce5">
            <text:p>2018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DataManagment</text:p>
          </table:table-cell>
          <table:table-cell office:value-type="string" table:style-name="ce5">
            <text:p>Store</text:p>
          </table:table-cell>
          <table:table-cell office:value-type="string" table:style-name="ce5">
            <text:p>Logistics</text:p>
          </table:table-cell>
          <table:table-cell office:value-type="string" table:style-name="ce5">
            <text:p>ConsumerTracking, Marketing, Security, SocialWelfareSystems</text:p>
          </table:table-cell>
          <table:table-cell table:style-name="ce5"/>
          <table:table-cell office:value-type="string" table:style-name="ce5">
            <text:p>Monitoring, PerformingBackgroundChecks, RecognizingIndividuals</text:p>
          </table:table-cell>
          <table:table-cell table:style-name="ce5"/>
          <table:table-cell table:style-name="ce11"/>
          <table:table-cell table:number-columns-repeated="2" table:style-name="ce5"/>
          <table:table-cell office:value-type="string" table:style-name="ce1">
            <text:p>PhysicalInjury, WellbeingImpact, PsychologicalHarm, Overreliance, DistortionInHumanBehavior</text:p>
          </table:table-cell>
          <table:table-cell office:value-type="string" office:string-value="name: Wolf Pack; task: DataManagment; AI type: Store; P3; Military use: Logistics; Civic use: ConsumerTracking, Marketing, Security, SocialWelfareSystems; year: 2018" table:formula="of:= COM.MICROSOFT.CONCAT(&quot;name: &quot;; [.B7]; &quot;; task: &quot;; [.E7]; &quot;; AI type: &quot;; [.F7]; &quot;; P3; Military use: &quot;; [.G7]; &quot;; Civic use: &quot;; [.H7]; &quot;; year: &quot;;[.C7])" table:style-name="ce12">
            <text:p>name: Wolf Pack; task: DataManagment; AI type: Store; P3; Military use: Logistics; Civic use: ConsumerTracking, Marketing, Security, SocialWelfareSystems; year: 2018</text:p>
          </table:table-cell>
          <table:table-cell office:value-type="string" table:style-name="ce5">
            <text:p>./assets/noun-ai-training-data-2985134.png</text:p>
          </table:table-cell>
          <table:table-cell office:value-type="string" table:style-name="ce12">
            <text:p>trainingData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AIP</text:p>
          </table:table-cell>
          <table:table-cell office:value-type="string" table:style-name="ce5">
            <text:p>Artificial Intelligence Platform</text:p>
          </table:table-cell>
          <table:table-cell office:value-type="float" office:value="2022" table:style-name="ce5">
            <text:p>2022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NLP, GenerativeAI</text:p>
          </table:table-cell>
          <table:table-cell office:value-type="string" table:style-name="ce5">
            <text:p>Generate</text:p>
          </table:table-cell>
          <table:table-cell office:value-type="string" table:style-name="ce5">
            <text:p>Command</text:p>
          </table:table-cell>
          <table:table-cell office:value-type="string" table:style-name="ce5">
            <text:p>Dashboard, ProjectManagment</text:p>
          </table:table-cell>
          <table:table-cell table:number-columns-repeated="3" table:style-name="ce5"/>
          <table:table-cell table:style-name="ce11"/>
          <table:table-cell office:value-type="string" table:style-name="ce5">
            <text:p>Action, Content, Decision, Prediction, Recommendation</text:p>
          </table:table-cell>
          <table:table-cell table:number-columns-repeated="2" table:style-name="ce5"/>
          <table:table-cell office:value-type="string" office:string-value="name: Artificial Intelligence Platform; task: NLP, GenerativeAI; AI type: Generate; P3; Military use: Command; Civic use: Dashboard, ProjectManagment; year: 2022" table:formula="of:= COM.MICROSOFT.CONCAT(&quot;name: &quot;; [.B8]; &quot;; task: &quot;; [.E8]; &quot;; AI type: &quot;; [.F8]; &quot;; P3; Military use: &quot;; [.G8]; &quot;; Civic use: &quot;; [.H8]; &quot;; year: &quot;;[.C8])" table:style-name="ce12">
            <text:p>name: Artificial Intelligence Platform; task: NLP, GenerativeAI; AI type: Generate; P3; Military use: Command; Civic use: Dashboard, ProjectManagment; year: 2022</text:p>
          </table:table-cell>
          <table:table-cell office:value-type="string" table:style-name="ce5">
            <text:p>./assets/noun-surveillance-monitor-6831349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MetaConstellation</text:p>
          </table:table-cell>
          <table:table-cell office:value-type="string" table:style-name="ce5">
            <text:p>Meta Constellation</text:p>
          </table:table-cell>
          <table:table-cell office:value-type="float" office:value="2022" table:style-name="ce5">
            <text:p>2022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PlanningSystem, MultiAgentSystem, RecommenderSystem</text:p>
          </table:table-cell>
          <table:table-cell office:value-type="string" table:style-name="ce5">
            <text:p>Assign</text:p>
          </table:table-cell>
          <table:table-cell office:value-type="string" table:style-name="ce1">
            <text:p>Intelligence</text:p>
          </table:table-cell>
          <table:table-cell office:value-type="string" table:style-name="ce5">
            <text:p>Dashboard, SupplyChainManagment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Meta Constellation; task: PlanningSystem, MultiAgentSystem, RecommenderSystem; AI type: Assign; P3; Military use: Intelligence; Civic use: Dashboard, SupplyChainManagment; year: 2022" table:formula="of:= COM.MICROSOFT.CONCAT(&quot;name: &quot;; [.B9]; &quot;; task: &quot;; [.E9]; &quot;; AI type: &quot;; [.F9]; &quot;; P3; Military use: &quot;; [.G9]; &quot;; Civic use: &quot;; [.H9]; &quot;; year: &quot;;[.C9])" table:style-name="ce12">
            <text:p>name: Meta Constellation; task: PlanningSystem, MultiAgentSystem, RecommenderSystem; AI type: Assign; P3; Military use: Intelligence; Civic use: Dashboard, SupplyChainManagment; year: 2022</text:p>
          </table:table-cell>
          <table:table-cell office:value-type="string" table:style-name="ce5">
            <text:p>./assets/noun-remote-team-6432341.png</text:p>
          </table:table-cell>
          <table:table-cell office:value-type="string" table:style-name="ce5">
            <text:p>locationTracking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Clearview</text:p>
          </table:table-cell>
          <table:table-cell office:value-type="string" table:style-name="ce5">
            <text:p>Clearview</text:p>
          </table:table-cell>
          <table:table-cell office:value-type="float" office:value="2022" table:style-name="ce5">
            <text:p>2022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FacialRecognition; ComputerVision</text:p>
          </table:table-cell>
          <table:table-cell office:value-type="string" table:style-name="ce5">
            <text:p>Recognize</text:p>
          </table:table-cell>
          <table:table-cell office:value-type="string" table:style-name="ce1">
            <text:p>Intelligence</text:p>
          </table:table-cell>
          <table:table-cell office:value-type="string" table:style-name="ce5">
            <text:p>IdentityVerification, AppUnlocking, AccessGranting</text:p>
          </table:table-cell>
          <table:table-cell table:style-name="ce5"/>
          <table:table-cell office:value-type="string" table:style-name="ce5">
            <text:p>IdentifyingIndividuals, RecognizingIndividuals, RemoteIdentification</text:p>
          </table:table-cell>
          <table:table-cell office:value-type="string" table:style-name="ce5">
            <text:p>FaceRecognition</text:p>
          </table:table-cell>
          <table:table-cell table:style-name="ce11"/>
          <table:table-cell table:number-columns-repeated="3" table:style-name="ce5"/>
          <table:table-cell office:value-type="string" office:string-value="name: Clearview; task: FacialRecognition; ComputerVision; AI type: Recognize; P3; Military use: Intelligence; Civic use: IdentityVerification, AppUnlocking, AccessGranting; year: 2022" table:formula="of:= COM.MICROSOFT.CONCAT(&quot;name: &quot;; [.B10]; &quot;; task: &quot;; [.E10]; &quot;; AI type: &quot;; [.F10]; &quot;; P3; Military use: &quot;; [.G10]; &quot;; Civic use: &quot;; [.H10]; &quot;; year: &quot;;[.C10])" table:style-name="ce12">
            <text:p>name: Clearview; task: FacialRecognition; ComputerVision; AI type: Recognize; P3; Military use: Intelligence; Civic use: IdentityVerification, AppUnlocking, AccessGranting; year: 2022</text:p>
          </table:table-cell>
          <table:table-cell office:value-type="string" table:style-name="ce5">
            <text:p>./assets/noun-facial-recognition-4116350.png</text:p>
          </table:table-cell>
          <table:table-cell office:value-type="string" table:style-name="ce5">
            <text:p>faceRecognition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Wolly</text:p>
          </table:table-cell>
          <table:table-cell office:value-type="string" table:style-name="ce5">
            <text:p>Wolly</text:p>
          </table:table-cell>
          <table:table-cell office:value-type="float" office:value="2022" table:style-name="ce5">
            <text:p>2022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Robotics/Navigation, ComputerVision, RecommenderSystem</text:p>
          </table:table-cell>
          <table:table-cell office:value-type="string" table:style-name="ce5">
            <text:p>Automate</text:p>
          </table:table-cell>
          <table:table-cell office:value-type="string" table:style-name="ce5">
            <text:p>Operations</text:p>
          </table:table-cell>
          <table:table-cell office:value-type="string" table:style-name="ce5">
            <text:p>Policing, CrowdControl, PrivateSecurity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Wolly; task: Robotics/Navigation, ComputerVision, RecommenderSystem; AI type: Automate; P3; Military use: Operations; Civic use: Policing, CrowdControl, PrivateSecurity; year: 2022" table:formula="of:= COM.MICROSOFT.CONCAT(&quot;name: &quot;; [.B11]; &quot;; task: &quot;; [.E11]; &quot;; AI type: &quot;; [.F11]; &quot;; P3; Military use: &quot;; [.G11]; &quot;; Civic use: &quot;; [.H11]; &quot;; year: &quot;;[.C11])" table:style-name="ce12">
            <text:p>name: Wolly; task: Robotics/Navigation, ComputerVision, RecommenderSystem; AI type: Automate; P3; Military use: Operations; Civic use: Policing, CrowdControl, PrivateSecurity; year: 2022</text:p>
          </table:table-cell>
          <table:table-cell office:value-type="string" table:style-name="ce5">
            <text:p>./assets/noun-turret-6749967.png</text:p>
          </table:table-cell>
          <table:table-cell office:value-type="string" table:style-name="ce5">
            <text:p>robotPolicing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FirstPOVDrones</text:p>
          </table:table-cell>
          <table:table-cell office:value-type="string" table:style-name="ce5">
            <text:p>First <text:s/>Person View Drones</text:p>
          </table:table-cell>
          <table:table-cell office:value-type="float" office:value="2022" table:style-name="ce5">
            <text:p>2022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Robotics/Navigation</text:p>
          </table:table-cell>
          <table:table-cell office:value-type="string" table:style-name="ce5">
            <text:p>Automate</text:p>
          </table:table-cell>
          <table:table-cell office:value-type="string" table:style-name="ce5">
            <text:p>Operations</text:p>
          </table:table-cell>
          <table:table-cell office:value-type="string" table:style-name="ce5">
            <text:p>Policing, Surveillance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First  Person View Drones; task: Robotics/Navigation; AI type: Automate; P3; Military use: Operations; Civic use: Policing, Surveillance; year: 2022" table:formula="of:= COM.MICROSOFT.CONCAT(&quot;name: &quot;; [.B12]; &quot;; task: &quot;; [.E12]; &quot;; AI type: &quot;; [.F12]; &quot;; P3; Military use: &quot;; [.G12]; &quot;; Civic use: &quot;; [.H12]; &quot;; year: &quot;;[.C12])" table:style-name="ce12">
            <text:p>name: First <text:s/>Person View Drones; task: Robotics/Navigation; AI type: Automate; P3; Military use: Operations; Civic use: Policing, Surveillance; year: 2022</text:p>
          </table:table-cell>
          <table:table-cell office:value-type="string" table:style-name="ce5">
            <text:p>./assets/noun-drone-strike-75130.png</text:p>
          </table:table-cell>
          <table:table-cell office:value-type="string" table:style-name="ce5">
            <text:p>uav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MAPLE</text:p>
          </table:table-cell>
          <table:table-cell office:value-type="string" table:style-name="ce5">
            <text:p>MAPLE</text:p>
          </table:table-cell>
          <table:table-cell office:value-type="float" office:value="2022" table:style-name="ce5">
            <text:p>2022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IntelligentControlSystem, Simulation</text:p>
          </table:table-cell>
          <table:table-cell office:value-type="string" table:style-name="ce5">
            <text:p>Assign</text:p>
          </table:table-cell>
          <table:table-cell office:value-type="string" table:style-name="ce5">
            <text:p>Command</text:p>
          </table:table-cell>
          <table:table-cell office:value-type="string" table:style-name="ce5">
            <text:p>Logistics, Delivery, SupplyChainManagment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MAPLE; task: IntelligentControlSystem, Simulation; AI type: Assign; P3; Military use: Command; Civic use: Logistics, Delivery, SupplyChainManagment; year: 2022" table:formula="of:= COM.MICROSOFT.CONCAT(&quot;name: &quot;; [.B13]; &quot;; task: &quot;; [.E13]; &quot;; AI type: &quot;; [.F13]; &quot;; P3; Military use: &quot;; [.G13]; &quot;; Civic use: &quot;; [.H13]; &quot;; year: &quot;;[.C13])" table:style-name="ce12">
            <text:p>name: MAPLE; task: IntelligentControlSystem, Simulation; AI type: Assign; P3; Military use: Command; Civic use: Logistics, Delivery, SupplyChainManagment; year: 2022</text:p>
          </table:table-cell>
          <table:table-cell office:value-type="string" table:style-name="ce5">
            <text:p>./assets/noun-surveillance-monitor-6831349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Gospel</text:p>
          </table:table-cell>
          <table:table-cell office:value-type="string" table:style-name="ce5">
            <text:p>The Gospel</text:p>
          </table:table-cell>
          <table:table-cell office:value-type="float" office:value="2021" table:style-name="ce5">
            <text:p>2021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ExpertSystem, Classification</text:p>
          </table:table-cell>
          <table:table-cell office:value-type="string" table:style-name="ce5">
            <text:p>Sort</text:p>
          </table:table-cell>
          <table:table-cell office:value-type="string" table:style-name="ce5">
            <text:p>Command</text:p>
          </table:table-cell>
          <table:table-cell office:value-type="string" table:style-name="ce5">
            <text:p>ConsumerTracking, Security, SocialWelfareSystems</text:p>
          </table:table-cell>
          <table:table-cell office:value-type="string" table:style-name="ce5">
            <text:p>Automate</text:p>
          </table:table-cell>
          <table:table-cell table:number-columns-repeated="2" table:style-name="ce5"/>
          <table:table-cell table:style-name="ce11"/>
          <table:table-cell table:number-columns-repeated="3" table:style-name="ce5"/>
          <table:table-cell office:value-type="string" office:string-value="name: The Gospel; task: ExpertSystem, Classification; AI type: Sort; P3; Military use: Command; Civic use: ConsumerTracking, Security, SocialWelfareSystems; year: 2021" table:formula="of:= COM.MICROSOFT.CONCAT(&quot;name: &quot;; [.B14]; &quot;; task: &quot;; [.E14]; &quot;; AI type: &quot;; [.F14]; &quot;; P3; Military use: &quot;; [.G14]; &quot;; Civic use: &quot;; [.H14]; &quot;; year: &quot;;[.C14])" table:style-name="ce12">
            <text:p>name: The Gospel; task: ExpertSystem, Classification; AI type: Sort; P3; Military use: Command; Civic use: ConsumerTracking, Security, SocialWelfareSystems; year: 2021</text:p>
          </table:table-cell>
          <table:table-cell office:value-type="string" table:style-name="ce5">
            <text:p>./assets/noun-earthquake-damage-6326583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Alchemist</text:p>
          </table:table-cell>
          <table:table-cell office:value-type="string" table:style-name="ce5">
            <text:p>Alchemist</text:p>
          </table:table-cell>
          <table:table-cell office:value-type="float" office:value="2021" table:style-name="ce5">
            <text:p>2021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LocationAwareness, AnomalyDetection</text:p>
          </table:table-cell>
          <table:table-cell office:value-type="string" table:style-name="ce5">
            <text:p>Recognize</text:p>
          </table:table-cell>
          <table:table-cell office:value-type="string" table:style-name="ce5">
            <text:p>Operations, Intelligence</text:p>
          </table:table-cell>
          <table:table-cell office:value-type="string" table:style-name="ce5">
            <text:p>Policing, Security, BorderPatrol</text:p>
          </table:table-cell>
          <table:table-cell table:number-columns-repeated="3" table:style-name="ce5"/>
          <table:table-cell office:value-type="string" table:style-name="ce11">
            <text:p>realTime</text:p>
          </table:table-cell>
          <table:table-cell table:number-columns-repeated="3" table:style-name="ce5"/>
          <table:table-cell office:value-type="string" office:string-value="name: Alchemist; task: LocationAwareness, AnomalyDetection; AI type: Recognize; P3; Military use: Operations, Intelligence; Civic use: Policing, Security, BorderPatrol; year: 2021" table:formula="of:= COM.MICROSOFT.CONCAT(&quot;name: &quot;; [.B15]; &quot;; task: &quot;; [.E15]; &quot;; AI type: &quot;; [.F15]; &quot;; P3; Military use: &quot;; [.G15]; &quot;; Civic use: &quot;; [.H15]; &quot;; year: &quot;;[.C15])" table:style-name="ce12">
            <text:p>name: Alchemist; task: LocationAwareness, AnomalyDetection; AI type: Recognize; P3; Military use: Operations, Intelligence; Civic use: Policing, Security, BorderPatrol; year: 2021</text:p>
          </table:table-cell>
          <table:table-cell office:value-type="string" table:style-name="ce5">
            <text:p>./assets/noun-mobile-tracking-5477710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Nimbus</text:p>
          </table:table-cell>
          <table:table-cell office:value-type="string" table:style-name="ce5">
            <text:p>Project Nimbus</text:p>
          </table:table-cell>
          <table:table-cell office:value-type="float" office:value="2021" table:style-name="ce5">
            <text:p>2021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DataManagment</text:p>
          </table:table-cell>
          <table:table-cell office:value-type="string" table:style-name="ce5">
            <text:p>Store</text:p>
          </table:table-cell>
          <table:table-cell office:value-type="string" table:style-name="ce5">
            <text:p>Logistics</text:p>
          </table:table-cell>
          <table:table-cell office:value-type="string" table:style-name="ce5">
            <text:p>CloudComputing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Project Nimbus; task: DataManagment; AI type: Store; P3; Military use: Logistics; Civic use: CloudComputing; year: 2021" table:formula="of:= COM.MICROSOFT.CONCAT(&quot;name: &quot;; [.B16]; &quot;; task: &quot;; [.E16]; &quot;; AI type: &quot;; [.F16]; &quot;; P3; Military use: &quot;; [.G16]; &quot;; Civic use: &quot;; [.H16]; &quot;; year: &quot;;[.C16])" table:style-name="ce12">
            <text:p>name: Project Nimbus; task: DataManagment; AI type: Store; P3; Military use: Logistics; Civic use: CloudComputing; year: 2021</text:p>
          </table:table-cell>
          <table:table-cell office:value-type="string" table:style-name="ce5">
            <text:p>./assets/noun-data-center-2301592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ARCA</text:p>
          </table:table-cell>
          <table:table-cell office:value-type="string" table:style-name="ce5">
            <text:p>Assault Rifle Combat Application System</text:p>
          </table:table-cell>
          <table:table-cell office:value-type="float" office:value="2021" table:style-name="ce5">
            <text:p>2021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Robotics/Navigation, ComputerVision, BehaviorModeling</text:p>
          </table:table-cell>
          <table:table-cell office:value-type="string" table:style-name="ce5">
            <text:p>Automate</text:p>
          </table:table-cell>
          <table:table-cell office:value-type="string" table:style-name="ce5">
            <text:p>Operations</text:p>
          </table:table-cell>
          <table:table-cell office:value-type="string" table:style-name="ce5">
            <text:p>Policing, CrowdControl, PrivateSecurity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Assault Rifle Combat Application System; task: Robotics/Navigation, ComputerVision, BehaviorModeling; AI type: Automate; P3; Military use: Operations; Civic use: Policing, CrowdControl, PrivateSecurity; year: 2021" table:formula="of:= COM.MICROSOFT.CONCAT(&quot;name: &quot;; [.B17]; &quot;; task: &quot;; [.E17]; &quot;; AI type: &quot;; [.F17]; &quot;; P3; Military use: &quot;; [.G17]; &quot;; Civic use: &quot;; [.H17]; &quot;; year: &quot;;[.C17])" table:style-name="ce12">
            <text:p>name: Assault Rifle Combat Application System; task: Robotics/Navigation, ComputerVision, BehaviorModeling; AI type: Automate; P3; Military use: Operations; Civic use: Policing, CrowdControl, PrivateSecurity; year: 2021</text:p>
          </table:table-cell>
          <table:table-cell office:value-type="string" table:style-name="ce5">
            <text:p>./assets/noun-target-7619584.png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LAW</text:p>
          </table:table-cell>
          <table:table-cell office:value-type="string" table:style-name="ce5">
            <text:p>Lethal Autonomous Weapons</text:p>
          </table:table-cell>
          <table:table-cell office:value-type="float" office:value="2021" table:style-name="ce5">
            <text:p>2021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Robotics/Navigation, <text:s/>IntelligentControlSystem</text:p>
          </table:table-cell>
          <table:table-cell office:value-type="string" table:style-name="ce5">
            <text:p>Automate</text:p>
          </table:table-cell>
          <table:table-cell office:value-type="string" table:style-name="ce5">
            <text:p>Operations</text:p>
          </table:table-cell>
          <table:table-cell office:value-type="string" table:style-name="ce5">
            <text:p>Policing, CrowdControl, PrivateSecurity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Lethal Autonomous Weapons; task: Robotics/Navigation,  IntelligentControlSystem; AI type: Automate; P3; Military use: Operations; Civic use: Policing, CrowdControl, PrivateSecurity; year: 2021" table:formula="of:= COM.MICROSOFT.CONCAT(&quot;name: &quot;; [.B18]; &quot;; task: &quot;; [.E18]; &quot;; AI type: &quot;; [.F18]; &quot;; P3; Military use: &quot;; [.G18]; &quot;; Civic use: &quot;; [.H18]; &quot;; year: &quot;;[.C18])" table:style-name="ce12">
            <text:p>name: Lethal Autonomous Weapons; task: Robotics/Navigation, <text:s/>IntelligentControlSystem; AI type: Automate; P3; Military use: Operations; Civic use: Policing, CrowdControl, PrivateSecurity; year: 2021</text:p>
          </table:table-cell>
          <table:table-cell office:value-type="string" table:style-name="ce5">
            <text:p>./assets/noun-infrared-drone-4284335.png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Gotham</text:p>
          </table:table-cell>
          <table:table-cell office:value-type="string" table:style-name="ce5">
            <text:p>Gotham</text:p>
          </table:table-cell>
          <table:table-cell office:value-type="float" office:value="2021" table:style-name="ce5">
            <text:p>2021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DataManagment, AnomalyDetection, BehaviorModeling</text:p>
          </table:table-cell>
          <table:table-cell office:value-type="string" table:style-name="ce5">
            <text:p>Recognize</text:p>
          </table:table-cell>
          <table:table-cell office:value-type="string" table:style-name="ce5">
            <text:p>Command, Logistics, Operations</text:p>
          </table:table-cell>
          <table:table-cell office:value-type="string" table:style-name="ce5">
            <text:p>Dashboard, ProjectManagment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Gotham; task: DataManagment, AnomalyDetection, BehaviorModeling; AI type: Recognize; P3; Military use: Command, Logistics, Operations; Civic use: Dashboard, ProjectManagment; year: 2021" table:formula="of:= COM.MICROSOFT.CONCAT(&quot;name: &quot;; [.B19]; &quot;; task: &quot;; [.E19]; &quot;; AI type: &quot;; [.F19]; &quot;; P3; Military use: &quot;; [.G19]; &quot;; Civic use: &quot;; [.H19]; &quot;; year: &quot;;[.C19])" table:style-name="ce12">
            <text:p>name: Gotham; task: DataManagment, AnomalyDetection, BehaviorModeling; AI type: Recognize; P3; Military use: Command, Logistics, Operations; Civic use: Dashboard, ProjectManagment; year: 2021</text:p>
          </table:table-cell>
          <table:table-cell office:value-type="string" table:style-name="ce5">
            <text:p>./assets/noun-missile-launcher-2052140.png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JEDI</text:p>
          </table:table-cell>
          <table:table-cell office:value-type="string" table:style-name="ce5">
            <text:p>JEDI</text:p>
          </table:table-cell>
          <table:table-cell office:value-type="float" office:value="2021" table:style-name="ce5">
            <text:p>2021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DataManagment</text:p>
          </table:table-cell>
          <table:table-cell office:value-type="string" table:style-name="ce5">
            <text:p>Store</text:p>
          </table:table-cell>
          <table:table-cell office:value-type="string" table:style-name="ce5">
            <text:p>Logistics</text:p>
          </table:table-cell>
          <table:table-cell office:value-type="string" table:style-name="ce5">
            <text:p>CloudComputing, EdgeComputing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error" office:string-value="#REF!" table:formula="of:= COM.MICROSOFT.CONCAT(&quot;name: &quot;; [.B20]; &quot;; task: &quot;; [.E20]; &quot;; AI type: &quot;; [.F20]; &quot;; P3; Military use: &quot;; [.G20]; &quot;; Civic use: &quot;;[.#REF!]; &quot;; year: &quot;;[.C20])" table:style-name="ce12">
            <text:p>#REF!</text:p>
          </table:table-cell>
          <table:table-cell office:value-type="string" table:style-name="ce5">
            <text:p>./assets/noun-locked-cloud-5565062.png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FireWeaver</text:p>
          </table:table-cell>
          <table:table-cell office:value-type="string" table:style-name="ce5">
            <text:p>Fire Weaver</text:p>
          </table:table-cell>
          <table:table-cell office:value-type="float" office:value="2020" table:style-name="ce5">
            <text:p>2020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MultiAgentSystem, PlanningSystem, RecommenderSystem</text:p>
          </table:table-cell>
          <table:table-cell office:value-type="string" table:style-name="ce5">
            <text:p>Assign</text:p>
          </table:table-cell>
          <table:table-cell office:value-type="string" table:style-name="ce5">
            <text:p>Command</text:p>
          </table:table-cell>
          <table:table-cell office:value-type="string" table:style-name="ce5">
            <text:p>Unknown</text:p>
          </table:table-cell>
          <table:table-cell table:number-columns-repeated="3" table:style-name="ce5"/>
          <table:table-cell table:style-name="ce11"/>
          <table:table-cell office:value-type="string" table:style-name="ce5">
            <text:p>Action</text:p>
          </table:table-cell>
          <table:table-cell table:number-columns-repeated="2" table:style-name="ce5"/>
          <table:table-cell office:value-type="string" office:string-value="name: Fire Weaver; task: MultiAgentSystem, PlanningSystem, RecommenderSystem; AI type: Assign; P3; Military use: Command; Civic use: CloudComputing, EdgeComputing; year: 2020" table:formula="of:= COM.MICROSOFT.CONCAT(&quot;name: &quot;; [.B21]; &quot;; task: &quot;; [.E21]; &quot;; AI type: &quot;; [.F21]; &quot;; P3; Military use: &quot;; [.G21]; &quot;; Civic use: &quot;; [.H20]; &quot;; year: &quot;;[.C21])" table:style-name="ce12">
            <text:p>name: Fire Weaver; task: MultiAgentSystem, PlanningSystem, RecommenderSystem; AI type: Assign; P3; Military use: Command; Civic use: CloudComputing, EdgeComputing; year: 2020</text:p>
          </table:table-cell>
          <table:table-cell office:value-type="string" table:style-name="ce5">
            <text:p>./assets/noun-virtual-headset-7137401.png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FireFactory</text:p>
          </table:table-cell>
          <table:table-cell office:value-type="string" table:style-name="ce5">
            <text:p>Fire Factory</text:p>
          </table:table-cell>
          <table:table-cell office:value-type="float" office:value="2020" table:style-name="ce5">
            <text:p>2020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Robotics/Navigation, IntelligentControlSystem</text:p>
          </table:table-cell>
          <table:table-cell office:value-type="string" table:style-name="ce5">
            <text:p>Automate</text:p>
          </table:table-cell>
          <table:table-cell office:value-type="string" table:style-name="ce5">
            <text:p>Operations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Prediction</text:p>
          </table:table-cell>
          <table:table-cell table:number-columns-repeated="2" table:style-name="ce5"/>
          <table:table-cell table:style-name="ce11"/>
          <table:table-cell table:number-columns-repeated="3" table:style-name="ce5"/>
          <table:table-cell office:value-type="string" office:string-value="name: Fire Factory; task: Robotics/Navigation, IntelligentControlSystem; AI type: Automate; P3; Military use: Operations; Civic use: Unknown; year: 2020" table:formula="of:= COM.MICROSOFT.CONCAT(&quot;name: &quot;; [.B22]; &quot;; task: &quot;; [.E22]; &quot;; AI type: &quot;; [.F22]; &quot;; P3; Military use: &quot;; [.G22]; &quot;; Civic use: &quot;; [.H22]; &quot;; year: &quot;;[.C22])" table:style-name="ce12">
            <text:p>name: Fire Factory; task: Robotics/Navigation, IntelligentControlSystem; AI type: Automate; P3; Military use: Operations; Civic use: Unknown; year: 2020</text:p>
          </table:table-cell>
          <table:table-cell office:value-type="string" table:style-name="ce5">
            <text:p>./assets/noun-missile-launcher-2052140.png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DIAS</text:p>
          </table:table-cell>
          <table:table-cell office:value-type="string" table:style-name="ce1">
            <text:p>Dialect Recognition Assistant (DIAS)</text:p>
          </table:table-cell>
          <table:table-cell office:value-type="float" office:value="2019" table:style-name="ce5">
            <text:p>2019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NLP</text:p>
          </table:table-cell>
          <table:table-cell office:value-type="string" table:style-name="ce5">
            <text:p>Sort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IdentityVerification</text:p>
          </table:table-cell>
          <table:table-cell table:number-columns-repeated="2" table:style-name="ce5"/>
          <table:table-cell office:value-type="string" table:style-name="ce5">
            <text:p>AudioProcessing, DialectRecognition</text:p>
          </table:table-cell>
          <table:table-cell table:style-name="ce11"/>
          <table:table-cell table:number-columns-repeated="3" table:style-name="ce5"/>
          <table:table-cell office:value-type="string" office:string-value="name: Dialect Recognition Assistant (DIAS); task: NLP; AI type: Sort; P3; Military use: Intelligence; Civic use: IdentityVerification; year: 2019" table:formula="of:= COM.MICROSOFT.CONCAT(&quot;name: &quot;; [.B23]; &quot;; task: &quot;; [.E23]; &quot;; AI type: &quot;; [.F23]; &quot;; P3; Military use: &quot;; [.G23]; &quot;; Civic use: &quot;; [.H23]; &quot;; year: &quot;;[.C23])" table:style-name="ce12">
            <text:p>name: Dialect Recognition Assistant (DIAS); task: NLP; AI type: Sort; P3; Military use: Intelligence; Civic use: IdentityVerification; year: 2019</text:p>
          </table:table-cell>
          <table:table-cell office:value-type="string" table:style-name="ce5">
            <text:p>./assets/noun-speech-recognition-1870316.png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AFRS</text:p>
          </table:table-cell>
          <table:table-cell office:value-type="string" table:style-name="ce1">
            <text:p>Automated Facial Recognition System</text:p>
          </table:table-cell>
          <table:table-cell office:value-type="float" office:value="2019" table:style-name="ce5">
            <text:p>2019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FacialRecognition; ComputerVision</text:p>
          </table:table-cell>
          <table:table-cell office:value-type="string" table:style-name="ce5">
            <text:p>Recognize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IdentityVerification, AppUnlocking, AccessGranting</text:p>
          </table:table-cell>
          <table:table-cell table:number-columns-repeated="2" table:style-name="ce5"/>
          <table:table-cell office:value-type="string" table:style-name="ce5">
            <text:p>FaceRecognition</text:p>
          </table:table-cell>
          <table:table-cell table:style-name="ce11"/>
          <table:table-cell table:number-columns-repeated="3" table:style-name="ce5"/>
          <table:table-cell office:value-type="string" office:string-value="name: Automated Facial Recognition System; task: FacialRecognition; ComputerVision; AI type: Recognize; P3; Military use: Intelligence; Civic use: IdentityVerification, AppUnlocking, AccessGranting; year: 2019" table:formula="of:= COM.MICROSOFT.CONCAT(&quot;name: &quot;; [.B24]; &quot;; task: &quot;; [.E24]; &quot;; AI type: &quot;; [.F24]; &quot;; P3; Military use: &quot;; [.G24]; &quot;; Civic use: &quot;; [.H24]; &quot;; year: &quot;;[.C24])" table:style-name="ce12">
            <text:p>name: Automated Facial Recognition System; task: FacialRecognition; ComputerVision; AI type: Recognize; P3; Military use: Intelligence; Civic use: IdentityVerification, AppUnlocking, AccessGranting; year: 2019</text:p>
          </table:table-cell>
          <table:table-cell office:value-type="string" table:style-name="ce5">
            <text:p>./assets/noun-facial-recognition-4116350.png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Starshield</text:p>
          </table:table-cell>
          <table:table-cell office:value-type="string" table:style-name="ce5">
            <text:p>Starshield</text:p>
          </table:table-cell>
          <table:table-cell office:value-type="float" office:value="2024" table:style-name="ce5">
            <text:p>2024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IoT, LocationAwareness</text:p>
          </table:table-cell>
          <table:table-cell office:value-type="string" table:style-name="ce5">
            <text:p>Capture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InternetAccess, DataDistribution, SecureTransmission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Starshield; task: IoT, LocationAwareness; AI type: Capture; P3; Military use: Intelligence; Civic use: InternetAccess, DataDistribution, SecureTransmission; year: 2024" table:formula="of:= COM.MICROSOFT.CONCAT(&quot;name: &quot;; [.B25]; &quot;; task: &quot;; [.E25]; &quot;; AI type: &quot;; [.F25]; &quot;; P3; Military use: &quot;; [.G25]; &quot;; Civic use: &quot;; [.H25]; &quot;; year: &quot;;[.C25])" table:style-name="ce12">
            <text:p>name: Starshield; task: IoT, LocationAwareness; AI type: Capture; P3; Military use: Intelligence; Civic use: InternetAccess, DataDistribution, SecureTransmission; year: 2024</text:p>
          </table:table-cell>
          <table:table-cell office:value-type="string" table:style-name="ce5">
            <text:p>./assets/noun-satelite-5565092.png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Starlink</text:p>
          </table:table-cell>
          <table:table-cell office:value-type="string" table:style-name="ce5">
            <text:p>Starlink</text:p>
          </table:table-cell>
          <table:table-cell office:value-type="float" office:value="2019" table:style-name="ce5">
            <text:p>2019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IoT, LocationAwareness</text:p>
          </table:table-cell>
          <table:table-cell office:value-type="string" table:style-name="ce5">
            <text:p>Capture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InternetAccess, DataDistribution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Starlink; task: IoT, LocationAwareness; AI type: Capture; P3; Military use: Intelligence; Civic use: InternetAccess, DataDistribution; year: 2019" table:formula="of:= COM.MICROSOFT.CONCAT(&quot;name: &quot;; [.B26]; &quot;; task: &quot;; [.E26]; &quot;; AI type: &quot;; [.F26]; &quot;; P3; Military use: &quot;; [.G26]; &quot;; Civic use: &quot;; [.H26]; &quot;; year: &quot;;[.C26])" table:style-name="ce12">
            <text:p>name: Starlink; task: IoT, LocationAwareness; AI type: Capture; P3; Military use: Intelligence; Civic use: InternetAccess, DataDistribution; year: 2019</text:p>
          </table:table-cell>
          <table:table-cell office:value-type="string" table:style-name="ce5">
            <text:p>./assets/noun-satelite-5565092.png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Pantir-SM</text:p>
          </table:table-cell>
          <table:table-cell office:value-type="string" table:style-name="ce5">
            <text:p>Pantir-SM</text:p>
          </table:table-cell>
          <table:table-cell office:value-type="float" office:value="2019" table:style-name="ce5">
            <text:p>2019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Robotics/Navigation, IntelligentControlSystem, Classification</text:p>
          </table:table-cell>
          <table:table-cell office:value-type="string" table:style-name="ce5">
            <text:p>Automate</text:p>
          </table:table-cell>
          <table:table-cell office:value-type="string" table:style-name="ce5">
            <text:p>Operations</text:p>
          </table:table-cell>
          <table:table-cell office:value-type="string" table:style-name="ce5">
            <text:p>Policing, CrowdControl, PrivateSecurity</text:p>
          </table:table-cell>
          <table:table-cell office:value-type="string" table:style-name="ce5">
            <text:p>Classification</text:p>
          </table:table-cell>
          <table:table-cell table:number-columns-repeated="2" table:style-name="ce5"/>
          <table:table-cell office:value-type="string" table:style-name="ce11">
            <text:p>Classification</text:p>
          </table:table-cell>
          <table:table-cell table:number-columns-repeated="3" table:style-name="ce5"/>
          <table:table-cell office:value-type="string" office:string-value="name: Pantir-SM; task: Robotics/Navigation, IntelligentControlSystem, Classification; AI type: Automate; P3; Military use: Operations; Civic use: Policing, CrowdControl, PrivateSecurity; year: 2019" table:formula="of:= COM.MICROSOFT.CONCAT(&quot;name: &quot;; [.B27]; &quot;; task: &quot;; [.E27]; &quot;; AI type: &quot;; [.F27]; &quot;; P3; Military use: &quot;; [.G27]; &quot;; Civic use: &quot;; [.H27]; &quot;; year: &quot;;[.C27])" table:style-name="ce12">
            <text:p>name: Pantir-SM; task: Robotics/Navigation, IntelligentControlSystem, Classification; AI type: Automate; P3; Military use: Operations; Civic use: Policing, CrowdControl, PrivateSecurity; year: 2019</text:p>
          </table:table-cell>
          <table:table-cell office:value-type="string" table:style-name="ce5">
            <text:p>./assets/noun-classification-6860055.png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RedWolf</text:p>
          </table:table-cell>
          <table:table-cell office:value-type="string" table:style-name="ce5">
            <text:p>Red Wolf</text:p>
          </table:table-cell>
          <table:table-cell office:value-type="float" office:value="2019" table:style-name="ce5">
            <text:p>2019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FacialRecognition, ComputerVision</text:p>
          </table:table-cell>
          <table:table-cell office:value-type="string" table:style-name="ce5">
            <text:p>Recognize</text:p>
          </table:table-cell>
          <table:table-cell office:value-type="string" table:style-name="ce5">
            <text:p>Operations</text:p>
          </table:table-cell>
          <table:table-cell office:value-type="string" table:style-name="ce5">
            <text:p>IdentityVerification, Security, Policing</text:p>
          </table:table-cell>
          <table:table-cell office:value-type="string" table:style-name="ce5">
            <text:p>Classification</text:p>
          </table:table-cell>
          <table:table-cell table:style-name="ce5"/>
          <table:table-cell office:value-type="string" table:style-name="ce5">
            <text:p>FaceRecognition</text:p>
          </table:table-cell>
          <table:table-cell office:value-type="string" table:style-name="ce11">
            <text:p>FaceRecognition</text:p>
          </table:table-cell>
          <table:table-cell table:number-columns-repeated="3" table:style-name="ce5"/>
          <table:table-cell office:value-type="string" office:string-value="name: Red Wolf; task: FacialRecognition, ComputerVision; AI type: Recognize; P3; Military use: Operations; Civic use: IdentityVerification, Security, Policing; year: 2019" table:formula="of:= COM.MICROSOFT.CONCAT(&quot;name: &quot;; [.B28]; &quot;; task: &quot;; [.E28]; &quot;; AI type: &quot;; [.F28]; &quot;; P3; Military use: &quot;; [.G28]; &quot;; Civic use: &quot;; [.H28]; &quot;; year: &quot;;[.C28])" table:style-name="ce12">
            <text:p>name: Red Wolf; task: FacialRecognition, ComputerVision; AI type: Recognize; P3; Military use: Operations; Civic use: IdentityVerification, Security, Policing; year: 2019</text:p>
          </table:table-cell>
          <table:table-cell office:value-type="string" table:style-name="ce5">
            <text:p>./assets/noun-facial-recognition-4116350.png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BlueWolf</text:p>
          </table:table-cell>
          <table:table-cell office:value-type="string" table:style-name="ce5">
            <text:p>BlueWolf</text:p>
          </table:table-cell>
          <table:table-cell office:value-type="float" office:value="2018" table:style-name="ce5">
            <text:p>2018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FacialRecognition, ComputerVision</text:p>
          </table:table-cell>
          <table:table-cell office:value-type="string" table:style-name="ce5">
            <text:p>Recognize</text:p>
          </table:table-cell>
          <table:table-cell office:value-type="string" table:style-name="ce5">
            <text:p>Operations</text:p>
          </table:table-cell>
          <table:table-cell office:value-type="string" table:style-name="ce5">
            <text:p>IdentityVerification, Security, Policing</text:p>
          </table:table-cell>
          <table:table-cell office:value-type="string" table:style-name="ce5">
            <text:p>Classification</text:p>
          </table:table-cell>
          <table:table-cell table:style-name="ce5"/>
          <table:table-cell office:value-type="string" table:style-name="ce5">
            <text:p>FaceRecognition</text:p>
          </table:table-cell>
          <table:table-cell office:value-type="string" table:style-name="ce11">
            <text:p>FaceRecognition</text:p>
          </table:table-cell>
          <table:table-cell table:number-columns-repeated="3" table:style-name="ce5"/>
          <table:table-cell office:value-type="string" office:string-value="name: BlueWolf; task: FacialRecognition, ComputerVision; AI type: Recognize; P3; Military use: Operations; Civic use: IdentityVerification, Security, Policing; year: 2018" table:formula="of:= COM.MICROSOFT.CONCAT(&quot;name: &quot;; [.B29]; &quot;; task: &quot;; [.E29]; &quot;; AI type: &quot;; [.F29]; &quot;; P3; Military use: &quot;; [.G29]; &quot;; Civic use: &quot;; [.H29]; &quot;; year: &quot;;[.C29])" table:style-name="ce12">
            <text:p>name: BlueWolf; task: FacialRecognition, ComputerVision; AI type: Recognize; P3; Military use: Operations; Civic use: IdentityVerification, Security, Policing; year: 2018</text:p>
          </table:table-cell>
          <table:table-cell office:value-type="string" table:style-name="ce5">
            <text:p>./assets/noun-face-id-scan-1890640.png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Mabat2000</text:p>
          </table:table-cell>
          <table:table-cell office:value-type="string" table:style-name="ce5">
            <text:p>Mabat 2000</text:p>
          </table:table-cell>
          <table:table-cell office:value-type="float" office:value="2018" table:style-name="ce5">
            <text:p>2018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ComputerVision</text:p>
          </table:table-cell>
          <table:table-cell office:value-type="string" table:style-name="ce5">
            <text:p>Capture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Surveillance, Policing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Mabat 2000; task: ComputerVision; AI type: Capture; P3; Military use: Intelligence; Civic use: Surveillance, Policing; year: 2018" table:formula="of:= COM.MICROSOFT.CONCAT(&quot;name: &quot;; [.B30]; &quot;; task: &quot;; [.E30]; &quot;; AI type: &quot;; [.F30]; &quot;; P3; Military use: &quot;; [.G30]; &quot;; Civic use: &quot;; [.H30]; &quot;; year: &quot;;[.C30])" table:style-name="ce12">
            <text:p>name: Mabat 2000; task: ComputerVision; AI type: Capture; P3; Military use: Intelligence; Civic use: Surveillance, Policing; year: 2018</text:p>
          </table:table-cell>
          <table:table-cell office:value-type="string" table:style-name="ce5">
            <text:p>./assets/noun-cctv-5477699.png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URSA</text:p>
          </table:table-cell>
          <table:table-cell office:value-type="string" table:style-name="ce5">
            <text:p>URSA</text:p>
          </table:table-cell>
          <table:table-cell office:value-type="float" office:value="2018" table:style-name="ce5">
            <text:p>2018</text:p>
          </table:table-cell>
          <table:table-cell office:value-type="string" table:style-name="ce5">
            <text:p>Retirement</text:p>
          </table:table-cell>
          <table:table-cell office:value-type="string" table:style-name="ce5">
            <text:p>LocationAwareness</text:p>
          </table:table-cell>
          <table:table-cell office:value-type="string" table:style-name="ce5">
            <text:p>Recognize</text:p>
          </table:table-cell>
          <table:table-cell office:value-type="string" table:style-name="ce5">
            <text:p>Operations</text:p>
          </table:table-cell>
          <table:table-cell office:value-type="string" table:style-name="ce5">
            <text:p>Retired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URSA; task: LocationAwareness; AI type: Recognize; P3; Military use: Operations; Civic use: Retired; year: 2018" table:formula="of:= COM.MICROSOFT.CONCAT(&quot;name: &quot;; [.B31]; &quot;; task: &quot;; [.E31]; &quot;; AI type: &quot;; [.F31]; &quot;; P3; Military use: &quot;; [.G31]; &quot;; Civic use: &quot;; [.H31]; &quot;; year: &quot;;[.C31])" table:style-name="ce12">
            <text:p>name: URSA; task: LocationAwareness; AI type: Recognize; P3; Military use: Operations; Civic use: Retired; year: 2018</text:p>
          </table:table-cell>
          <table:table-cell office:value-type="string" table:style-name="ce5">
            <text:p>./assets/noun-data-science-6432260.png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TacNet</text:p>
          </table:table-cell>
          <table:table-cell office:value-type="string" table:style-name="ce5">
            <text:p>TacNet</text:p>
          </table:table-cell>
          <table:table-cell office:value-type="float" office:value="2017" table:style-name="ce5">
            <text:p>2017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MultiAgentSystem, PlanningSystem, RecommenderSystem</text:p>
          </table:table-cell>
          <table:table-cell office:value-type="string" table:style-name="ce5">
            <text:p>Assign</text:p>
          </table:table-cell>
          <table:table-cell office:value-type="string" table:style-name="ce5">
            <text:p>Command</text:p>
          </table:table-cell>
          <table:table-cell office:value-type="string" table:style-name="ce5">
            <text:p>Policing, CrowdControl, PrivateSecurity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TacNet; task: MultiAgentSystem, PlanningSystem, RecommenderSystem; AI type: Assign; P3; Military use: Command; Civic use: Policing, CrowdControl, PrivateSecurity; year: 2017" table:formula="of:= COM.MICROSOFT.CONCAT(&quot;name: &quot;; [.B32]; &quot;; task: &quot;; [.E32]; &quot;; AI type: &quot;; [.F32]; &quot;; P3; Military use: &quot;; [.G32]; &quot;; Civic use: &quot;; [.H32]; &quot;; year: &quot;;[.C32])" table:style-name="ce12">
            <text:p>name: TacNet; task: MultiAgentSystem, PlanningSystem, RecommenderSystem; AI type: Assign; P3; Military use: Command; Civic use: Policing, CrowdControl, PrivateSecurity; year: 2017</text:p>
          </table:table-cell>
          <table:table-cell office:value-type="string" table:style-name="ce5">
            <text:p>./assets/noun-surveillance-monitor-6831349.png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Bylina</text:p>
          </table:table-cell>
          <table:table-cell office:value-type="string" table:style-name="ce5">
            <text:p>Bylina</text:p>
          </table:table-cell>
          <table:table-cell office:value-type="float" office:value="2017" table:style-name="ce5">
            <text:p>2017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PredictiveAnalytics</text:p>
          </table:table-cell>
          <table:table-cell office:value-type="string" table:style-name="ce5">
            <text:p>Predict</text:p>
          </table:table-cell>
          <table:table-cell office:value-type="string" table:style-name="ce5">
            <text:p>Command</text:p>
          </table:table-cell>
          <table:table-cell office:value-type="string" table:style-name="ce5">
            <text:p>Unknown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Bylina; task: PredictiveAnalytics; AI type: Predict; P3; Military use: Command; Civic use: Unknown; year: 2017" table:formula="of:= COM.MICROSOFT.CONCAT(&quot;name: &quot;; [.B33]; &quot;; task: &quot;; [.E33]; &quot;; AI type: &quot;; [.F33]; &quot;; P3; Military use: &quot;; [.G33]; &quot;; Civic use: &quot;; [.H33]; &quot;; year: &quot;;[.C33])" table:style-name="ce12">
            <text:p>name: Bylina; task: PredictiveAnalytics; AI type: Predict; P3; Military use: Command; Civic use: Unknown; year: 2017</text:p>
          </table:table-cell>
          <table:table-cell office:value-type="string" table:style-name="ce5">
            <text:p>./assets/noun-earthquake-damage-6326583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Maven</text:p>
          </table:table-cell>
          <table:table-cell office:value-type="string" table:style-name="ce5">
            <text:p>Maven Smart System</text:p>
          </table:table-cell>
          <table:table-cell office:value-type="float" office:value="2016" table:style-name="ce5">
            <text:p>2016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ComputerVision</text:p>
          </table:table-cell>
          <table:table-cell office:value-type="string" table:style-name="ce5">
            <text:p>Recognize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Policing, Security, BorderPatrol, ScientificResearch</text:p>
          </table:table-cell>
          <table:table-cell office:value-type="string" table:style-name="ce5">
            <text:p>ObjectDetection</text:p>
          </table:table-cell>
          <table:table-cell table:style-name="ce5"/>
          <table:table-cell office:value-type="string" table:style-name="ce5">
            <text:p>ObjectDetection</text:p>
          </table:table-cell>
          <table:table-cell office:value-type="string" table:style-name="ce11">
            <text:p>ObjectDetection</text:p>
          </table:table-cell>
          <table:table-cell table:number-columns-repeated="3" table:style-name="ce5"/>
          <table:table-cell office:value-type="string" office:string-value="name: Maven Smart System; task: ComputerVision; AI type: Recognize; P3; Military use: Intelligence; Civic use: Policing, Security, BorderPatrol, ScientificResearch; year: 2016" table:formula="of:= COM.MICROSOFT.CONCAT(&quot;name: &quot;; [.B34]; &quot;; task: &quot;; [.E34]; &quot;; AI type: &quot;; [.F34]; &quot;; P3; Military use: &quot;; [.G34]; &quot;; Civic use: &quot;; [.H34]; &quot;; year: &quot;;[.C34])" table:style-name="ce12">
            <text:p>name: Maven Smart System; task: ComputerVision; AI type: Recognize; P3; Military use: Intelligence; Civic use: Policing, Security, BorderPatrol, ScientificResearch; year: 2016</text:p>
          </table:table-cell>
          <table:table-cell office:value-type="string" table:style-name="ce5">
            <text:p>./assets/noun-object-recognition-6963419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PackBot</text:p>
          </table:table-cell>
          <table:table-cell office:value-type="string" table:style-name="ce5">
            <text:p>PackBot</text:p>
          </table:table-cell>
          <table:table-cell office:value-type="float" office:value="2016" table:style-name="ce5">
            <text:p>2016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Robotics/Navigation</text:p>
          </table:table-cell>
          <table:table-cell office:value-type="string" table:style-name="ce5">
            <text:p>Automate</text:p>
          </table:table-cell>
          <table:table-cell office:value-type="string" table:style-name="ce5">
            <text:p>Operations</text:p>
          </table:table-cell>
          <table:table-cell office:value-type="string" table:style-name="ce5">
            <text:p>SmartHome, Security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PackBot; task: Robotics/Navigation; AI type: Automate; P3; Military use: Operations; Civic use: SmartHome, Security; year: 2016" table:formula="of:= COM.MICROSOFT.CONCAT(&quot;name: &quot;; [.B35]; &quot;; task: &quot;; [.E35]; &quot;; AI type: &quot;; [.F35]; &quot;; P3; Military use: &quot;; [.G35]; &quot;; Civic use: &quot;; [.H35]; &quot;; year: &quot;;[.C35])" table:style-name="ce12">
            <text:p>name: PackBot; task: Robotics/Navigation; AI type: Automate; P3; Military use: Operations; Civic use: SmartHome, Security; year: 2016</text:p>
          </table:table-cell>
          <table:table-cell office:value-type="string" table:style-name="ce5">
            <text:p>./assets/noun-bomb-defusing-robot-1036305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GISArta</text:p>
          </table:table-cell>
          <table:table-cell office:value-type="string" table:style-name="ce5">
            <text:p>GIS Arta</text:p>
          </table:table-cell>
          <table:table-cell office:value-type="float" office:value="2014" table:style-name="ce5">
            <text:p>2014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PlanningSystem, MultiAgentSystem, RecommenderSystem</text:p>
          </table:table-cell>
          <table:table-cell office:value-type="string" table:style-name="ce5">
            <text:p>Assign</text:p>
          </table:table-cell>
          <table:table-cell office:value-type="string" table:style-name="ce5">
            <text:p>Logistics</text:p>
          </table:table-cell>
          <table:table-cell office:value-type="string" table:style-name="ce5">
            <text:p>VehicleTasking, Logistics</text:p>
          </table:table-cell>
          <table:table-cell table:style-name="ce11"/>
          <table:table-cell table:number-columns-repeated="2" table:style-name="ce5"/>
          <table:table-cell office:value-type="string" table:style-name="ce11">
            <text:p>dispatch</text:p>
          </table:table-cell>
          <table:table-cell table:number-columns-repeated="3" table:style-name="ce5"/>
          <table:table-cell office:value-type="string" office:string-value="name: GIS Arta; task: PlanningSystem, MultiAgentSystem, RecommenderSystem; AI type: Assign; P3; Military use: Logistics; Civic use: VehicleTasking, Logistics; year: 2014" table:formula="of:= COM.MICROSOFT.CONCAT(&quot;name: &quot;; [.B36]; &quot;; task: &quot;; [.E36]; &quot;; AI type: &quot;; [.F36]; &quot;; P3; Military use: &quot;; [.G36]; &quot;; Civic use: &quot;; [.H36]; &quot;; year: &quot;;[.C36])" table:style-name="ce12">
            <text:p>name: GIS Arta; task: PlanningSystem, MultiAgentSystem, RecommenderSystem; AI type: Assign; P3; Military use: Logistics; Civic use: VehicleTasking, Logistics; year: 2014</text:p>
          </table:table-cell>
          <table:table-cell office:value-type="string" table:style-name="ce5">
            <text:p>./assets/noun-threat-7566001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IrisGuard</text:p>
          </table:table-cell>
          <table:table-cell office:value-type="string" table:style-name="ce5">
            <text:p>IrisGuard</text:p>
          </table:table-cell>
          <table:table-cell office:value-type="float" office:value="2013" table:style-name="ce5">
            <text:p>2013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ComputerVision</text:p>
          </table:table-cell>
          <table:table-cell office:value-type="string" table:style-name="ce5">
            <text:p>Recognize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IdentityVerification, AppUnlocking, AccessGranting</text:p>
          </table:table-cell>
          <table:table-cell table:number-columns-repeated="2" table:style-name="ce5"/>
          <table:table-cell office:value-type="string" table:style-name="ce5">
            <text:p>BiometricIdentification</text:p>
          </table:table-cell>
          <table:table-cell table:style-name="ce11"/>
          <table:table-cell table:number-columns-repeated="3" table:style-name="ce5"/>
          <table:table-cell office:value-type="string" office:string-value="name: IrisGuard; task: ComputerVision; AI type: Recognize; P3; Military use: Intelligence; Civic use: IdentityVerification, AppUnlocking, AccessGranting; year: 2013" table:formula="of:= COM.MICROSOFT.CONCAT(&quot;name: &quot;; [.B37]; &quot;; task: &quot;; [.E37]; &quot;; AI type: &quot;; [.F37]; &quot;; P3; Military use: &quot;; [.G37]; &quot;; Civic use: &quot;; [.H37]; &quot;; year: &quot;;[.C37])" table:style-name="ce12">
            <text:p>name: IrisGuard; task: ComputerVision; AI type: Recognize; P3; Military use: Intelligence; Civic use: IdentityVerification, AppUnlocking, AccessGranting; year: 2013</text:p>
          </table:table-cell>
          <table:table-cell office:value-type="string" table:style-name="ce5">
            <text:p>./assets/noun-iris-recognition-6831344.png</text:p>
          </table:table-cell>
          <table:table-cell office:value-type="string" table:style-name="ce5">
            <text:p>biometric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Skynet-US</text:p>
          </table:table-cell>
          <table:table-cell office:value-type="string" table:style-name="ce5">
            <text:p>Skynet-US</text:p>
          </table:table-cell>
          <table:table-cell office:value-type="float" office:value="2012" table:style-name="ce5">
            <text:p>2012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AnomalyDetection, MultiAgentSystem, BehaviorModeling, RecommenderSystem</text:p>
          </table:table-cell>
          <table:table-cell office:value-type="string" table:style-name="ce5">
            <text:p>Predict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DataBrokers, Marketing, BehaviorEvaluation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Skynet-US; task: AnomalyDetection, MultiAgentSystem, BehaviorModeling, RecommenderSystem; AI type: Predict; P3; Military use: Intelligence; Civic use: DataBrokers, Marketing, BehaviorEvaluation; year: 2012" table:formula="of:= COM.MICROSOFT.CONCAT(&quot;name: &quot;; [.B38]; &quot;; task: &quot;; [.E38]; &quot;; AI type: &quot;; [.F38]; &quot;; P3; Military use: &quot;; [.G38]; &quot;; Civic use: &quot;; [.H38]; &quot;; year: &quot;;[.C38])" table:style-name="ce12">
            <text:p>name: Skynet-US; task: AnomalyDetection, MultiAgentSystem, BehaviorModeling, RecommenderSystem; AI type: Predict; P3; Military use: Intelligence; Civic use: DataBrokers, Marketing, BehaviorEvaluation; year: 2012</text:p>
          </table:table-cell>
          <table:table-cell office:value-type="string" table:style-name="ce5">
            <text:p>./assets/noun-digital-footprint-6806678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RobotRiotControl</text:p>
          </table:table-cell>
          <table:table-cell office:value-type="string" table:style-name="ce5">
            <text:p>Robot Riot Control</text:p>
          </table:table-cell>
          <table:table-cell office:value-type="float" office:value="2011" table:style-name="ce5">
            <text:p>2011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AnomalyDetection, LocationAwareness, BehaviorModeling</text:p>
          </table:table-cell>
          <table:table-cell office:value-type="string" table:style-name="ce1">
            <text:p>Recognize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Policing, Security, BorderPatrol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Robot Riot Control; task: AnomalyDetection, LocationAwareness, BehaviorModeling; AI type: Recognize; P3; Military use: Intelligence; Civic use: Policing, Security, BorderPatrol; year: 2011" table:formula="of:= COM.MICROSOFT.CONCAT(&quot;name: &quot;; [.B39]; &quot;; task: &quot;; [.E39]; &quot;; AI type: &quot;; [.F39]; &quot;; P3; Military use: &quot;; [.G39]; &quot;; Civic use: &quot;; [.H39]; &quot;; year: &quot;;[.C39])" table:style-name="ce12">
            <text:p>name: Robot Riot Control; task: AnomalyDetection, LocationAwareness, BehaviorModeling; AI type: Recognize; P3; Military use: Intelligence; Civic use: Policing, Security, BorderPatrol; year: 2011</text:p>
          </table:table-cell>
          <table:table-cell office:value-type="string" table:style-name="ce5">
            <text:p>./assets/noun-riot-control-national-guards-1584300.png</text:p>
          </table:table-cell>
          <table:table-cell office:value-type="string" table:style-name="ce12">
            <text:p>police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PrisonGuard</text:p>
          </table:table-cell>
          <table:table-cell office:value-type="string" table:style-name="ce5">
            <text:p>Prison Guard</text:p>
          </table:table-cell>
          <table:table-cell office:value-type="float" office:value="2011" table:style-name="ce5">
            <text:p>2011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AnomalyDetection, LocationAwareness, BehaviorModeling</text:p>
          </table:table-cell>
          <table:table-cell office:value-type="string" table:style-name="ce1">
            <text:p>Recognize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Policing, Security, BorderPatrol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Prison Guard; task: AnomalyDetection, LocationAwareness, BehaviorModeling; AI type: Recognize; P3; Military use: Intelligence; Civic use: Policing, Security, BorderPatrol; year: 2011" table:formula="of:= COM.MICROSOFT.CONCAT(&quot;name: &quot;; [.B40]; &quot;; task: &quot;; [.E40]; &quot;; AI type: &quot;; [.F40]; &quot;; P3; Military use: &quot;; [.G40]; &quot;; Civic use: &quot;; [.H40]; &quot;; year: &quot;;[.C40])" table:style-name="ce12">
            <text:p>name: Prison Guard; task: AnomalyDetection, LocationAwareness, BehaviorModeling; AI type: Recognize; P3; Military use: Intelligence; Civic use: Policing, Security, BorderPatrol; year: 2011</text:p>
          </table:table-cell>
          <table:table-cell office:value-type="string" table:style-name="ce5">
            <text:p>./assets/noun-police-robot-1119907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Pegasus</text:p>
          </table:table-cell>
          <table:table-cell office:value-type="string" table:style-name="ce5">
            <text:p>Pegasus</text:p>
          </table:table-cell>
          <table:table-cell office:value-type="float" office:value="2011" table:style-name="ce5">
            <text:p>2011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AnomalyDetection, BehaviorModeling</text:p>
          </table:table-cell>
          <table:table-cell office:value-type="string" table:style-name="ce5">
            <text:p>Capture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BehaviorEvaluation, Surveillance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Pegasus; task: AnomalyDetection, BehaviorModeling; AI type: Capture; P3; Military use: Intelligence; Civic use: BehaviorEvaluation, Surveillance; year: 2011" table:formula="of:= COM.MICROSOFT.CONCAT(&quot;name: &quot;; [.B41]; &quot;; task: &quot;; [.E41]; &quot;; AI type: &quot;; [.F41]; &quot;; P3; Military use: &quot;; [.G41]; &quot;; Civic use: &quot;; [.H41]; &quot;; year: &quot;;[.C41])" table:style-name="ce12">
            <text:p>name: Pegasus; task: AnomalyDetection, BehaviorModeling; AI type: Capture; P3; Military use: Intelligence; Civic use: BehaviorEvaluation, Surveillance; year: 2011</text:p>
          </table:table-cell>
          <table:table-cell office:value-type="string" table:style-name="ce5">
            <text:p>./assets/noun-digital-footprint-6806678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SentryTech</text:p>
          </table:table-cell>
          <table:table-cell office:value-type="string" table:style-name="ce5">
            <text:p>Sentry-Tech</text:p>
          </table:table-cell>
          <table:table-cell office:value-type="float" office:value="2010" table:style-name="ce5">
            <text:p>2010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Robotics/Navigation, IntelligentControlSystem</text:p>
          </table:table-cell>
          <table:table-cell office:value-type="string" table:style-name="ce5">
            <text:p>Automate</text:p>
          </table:table-cell>
          <table:table-cell office:value-type="string" table:style-name="ce5">
            <text:p>Operations</text:p>
          </table:table-cell>
          <table:table-cell office:value-type="string" table:style-name="ce5">
            <text:p>Policing, Security, BorderPatrol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Sentry-Tech; task: Robotics/Navigation, IntelligentControlSystem; AI type: Automate; P3; Military use: Operations; Civic use: Policing, Security, BorderPatrol; year: 2010" table:formula="of:= COM.MICROSOFT.CONCAT(&quot;name: &quot;; [.B42]; &quot;; task: &quot;; [.E42]; &quot;; AI type: &quot;; [.F42]; &quot;; P3; Military use: &quot;; [.G42]; &quot;; Civic use: &quot;; [.H42]; &quot;; year: &quot;;[.C42])" table:style-name="ce12">
            <text:p>name: Sentry-Tech; task: Robotics/Navigation, IntelligentControlSystem; AI type: Automate; P3; Military use: Operations; Civic use: Policing, Security, BorderPatrol; year: 2010</text:p>
          </table:table-cell>
          <table:table-cell office:value-type="string" table:style-name="ce5">
            <text:p>./assets/noun-turret-6749967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SuperAegis</text:p>
          </table:table-cell>
          <table:table-cell office:value-type="string" table:style-name="ce5">
            <text:p>Super Aegis</text:p>
          </table:table-cell>
          <table:table-cell office:value-type="float" office:value="2010" table:style-name="ce5">
            <text:p>2010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Robotics/Navigation, IntelligentControlSystem</text:p>
          </table:table-cell>
          <table:table-cell office:value-type="string" table:style-name="ce5">
            <text:p>Automate</text:p>
          </table:table-cell>
          <table:table-cell office:value-type="string" table:style-name="ce5">
            <text:p>Operations</text:p>
          </table:table-cell>
          <table:table-cell office:value-type="string" table:style-name="ce5">
            <text:p>Policing, Security, BorderPatrol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Super Aegis; task: Robotics/Navigation, IntelligentControlSystem; AI type: Automate; P3; Military use: Operations; Civic use: Policing, Security, BorderPatrol; year: 2010" table:formula="of:= COM.MICROSOFT.CONCAT(&quot;name: &quot;; [.B43]; &quot;; task: &quot;; [.E43]; &quot;; AI type: &quot;; [.F43]; &quot;; P3; Military use: &quot;; [.G43]; &quot;; Civic use: &quot;; [.H43]; &quot;; year: &quot;;[.C43])" table:style-name="ce12">
            <text:p>name: Super Aegis; task: Robotics/Navigation, IntelligentControlSystem; AI type: Automate; P3; Military use: Operations; Civic use: Policing, Security, BorderPatrol; year: 2010</text:p>
          </table:table-cell>
          <table:table-cell office:value-type="string" table:style-name="ce5">
            <text:p>./assets/noun-turret-6749967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SentryRobot</text:p>
          </table:table-cell>
          <table:table-cell office:value-type="string" table:style-name="ce5">
            <text:p>Sentry Robot</text:p>
          </table:table-cell>
          <table:table-cell office:value-type="float" office:value="2010" table:style-name="ce5">
            <text:p>2010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Robotics/Navigation, IntelligentControlSystem</text:p>
          </table:table-cell>
          <table:table-cell office:value-type="string" table:style-name="ce5">
            <text:p>Automate</text:p>
          </table:table-cell>
          <table:table-cell office:value-type="string" table:style-name="ce5">
            <text:p>Operations</text:p>
          </table:table-cell>
          <table:table-cell office:value-type="string" table:style-name="ce5">
            <text:p>Policing, Security, BorderPatrol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Sentry Robot; task: Robotics/Navigation, IntelligentControlSystem; AI type: Automate; P3; Military use: Operations; Civic use: Policing, Security, BorderPatrol; year: 2010" table:formula="of:= COM.MICROSOFT.CONCAT(&quot;name: &quot;; [.B44]; &quot;; task: &quot;; [.E44]; &quot;; AI type: &quot;; [.F44]; &quot;; P3; Military use: &quot;; [.G44]; &quot;; Civic use: &quot;; [.H44]; &quot;; year: &quot;;[.C44])" table:style-name="ce12">
            <text:p>name: Sentry Robot; task: Robotics/Navigation, IntelligentControlSystem; AI type: Automate; P3; Military use: Operations; Civic use: Policing, Security, BorderPatrol; year: 2010</text:p>
          </table:table-cell>
          <table:table-cell office:value-type="string" table:style-name="ce5">
            <text:p>./assets/noun-turret-6749967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PRISM</text:p>
          </table:table-cell>
          <table:table-cell office:value-type="string" table:style-name="ce5">
            <text:p>PRISM/XKEYSCORE</text:p>
          </table:table-cell>
          <table:table-cell office:value-type="float" office:value="2007" table:style-name="ce5">
            <text:p>2007</text:p>
          </table:table-cell>
          <table:table-cell office:value-type="string" table:style-name="ce5">
            <text:p>Retirement</text:p>
          </table:table-cell>
          <table:table-cell office:value-type="string" table:style-name="ce5">
            <text:p>DataManagment, AnomalyDetection</text:p>
          </table:table-cell>
          <table:table-cell office:value-type="string" table:style-name="ce5">
            <text:p>Capture, Store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BehaviorEvaluation, Surveillance, Marketing, DataBrokers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PRISM/XKEYSCORE; task: DataManagment, AnomalyDetection; AI type: Capture, Store; P3; Military use: Intelligence; Civic use: BehaviorEvaluation, Surveillance, Marketing, DataBrokers; year: 2007" table:formula="of:= COM.MICROSOFT.CONCAT(&quot;name: &quot;; [.B45]; &quot;; task: &quot;; [.E45]; &quot;; AI type: &quot;; [.F45]; &quot;; P3; Military use: &quot;; [.G45]; &quot;; Civic use: &quot;; [.H45]; &quot;; year: &quot;;[.C45])" table:style-name="ce12">
            <text:p>name: PRISM/XKEYSCORE; task: DataManagment, AnomalyDetection; AI type: Capture, Store; P3; Military use: Intelligence; Civic use: BehaviorEvaluation, Surveillance, Marketing, DataBrokers; year: 2007</text:p>
          </table:table-cell>
          <table:table-cell office:value-type="string" table:style-name="ce5">
            <text:p>./assets/noun-digital-footprint-6806678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DynaSpeak</text:p>
          </table:table-cell>
          <table:table-cell office:value-type="string" table:style-name="ce5">
            <text:p>DynaSpeak</text:p>
          </table:table-cell>
          <table:table-cell office:value-type="float" office:value="2006" table:style-name="ce5">
            <text:p>2006</text:p>
          </table:table-cell>
          <table:table-cell office:value-type="string" table:style-name="ce5">
            <text:p>Retirement</text:p>
          </table:table-cell>
          <table:table-cell office:value-type="string" table:style-name="ce5">
            <text:p>NLP</text:p>
          </table:table-cell>
          <table:table-cell office:value-type="string" table:style-name="ce5">
            <text:p>Recognize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NaturalLanguageProcessing, TranslationApps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DynaSpeak; task: NLP; AI type: Recognize; P3; Military use: Intelligence; Civic use: NaturalLanguageProcessing, TranslationApps; year: 2006" table:formula="of:= COM.MICROSOFT.CONCAT(&quot;name: &quot;; [.B46]; &quot;; task: &quot;; [.E46]; &quot;; AI type: &quot;; [.F46]; &quot;; P3; Military use: &quot;; [.G46]; &quot;; Civic use: &quot;; [.H46]; &quot;; year: &quot;;[.C46])" table:style-name="ce12">
            <text:p>name: DynaSpeak; task: NLP; AI type: Recognize; P3; Military use: Intelligence; Civic use: NaturalLanguageProcessing, TranslationApps; year: 2006</text:p>
          </table:table-cell>
          <table:table-cell office:value-type="string" table:style-name="ce5">
            <text:p>./assets/noun-speech-recognition-1870316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CALO</text:p>
          </table:table-cell>
          <table:table-cell office:value-type="string" table:style-name="ce5">
            <text:p>CALO</text:p>
          </table:table-cell>
          <table:table-cell office:value-type="float" office:value="2003" table:style-name="ce5">
            <text:p>2003</text:p>
          </table:table-cell>
          <table:table-cell office:value-type="string" table:style-name="ce5">
            <text:p>Retirement</text:p>
          </table:table-cell>
          <table:table-cell office:value-type="string" table:style-name="ce5">
            <text:p>Agent</text:p>
          </table:table-cell>
          <table:table-cell office:value-type="string" table:style-name="ce5">
            <text:p>Generate</text:p>
          </table:table-cell>
          <table:table-cell office:value-type="string" table:style-name="ce5">
            <text:p>Command</text:p>
          </table:table-cell>
          <table:table-cell office:value-type="string" table:style-name="ce5">
            <text:p>AIAssistants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CALO; task: Agent; AI type: Generate; P3; Military use: Command; Civic use: AIAssistants; year: 2003" table:formula="of:= COM.MICROSOFT.CONCAT(&quot;name: &quot;; [.B47]; &quot;; task: &quot;; [.E47]; &quot;; AI type: &quot;; [.F47]; &quot;; P3; Military use: &quot;; [.G47]; &quot;; Civic use: &quot;; [.H47]; &quot;; year: &quot;;[.C47])" table:style-name="ce12">
            <text:p>name: CALO; task: Agent; AI type: Generate; P3; Military use: Command; Civic use: AIAssistants; year: 2003</text:p>
          </table:table-cell>
          <table:table-cell office:value-type="string" table:style-name="ce1">
            <text:p>./assets/noun-chatbot-7107716.png</text:p>
          </table:table-cell>
          <table:table-cell office:value-type="string" table:style-name="ce5">
            <text:p>chatbot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GoldenShield</text:p>
          </table:table-cell>
          <table:table-cell office:value-type="string" table:style-name="ce5">
            <text:p>Golden Shield</text:p>
          </table:table-cell>
          <table:table-cell office:value-type="float" office:value="2003" table:style-name="ce5">
            <text:p>2003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DataManagment, AnomalyDetection</text:p>
          </table:table-cell>
          <table:table-cell office:value-type="string" table:style-name="ce5">
            <text:p>Recognize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BehaviorEvaluation, Surveillance, Marketing, DataBrokers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Golden Shield; task: DataManagment, AnomalyDetection; AI type: Recognize; P3; Military use: Intelligence; Civic use: BehaviorEvaluation, Surveillance, Marketing, DataBrokers; year: 2003" table:formula="of:= COM.MICROSOFT.CONCAT(&quot;name: &quot;; [.B48]; &quot;; task: &quot;; [.E48]; &quot;; AI type: &quot;; [.F48]; &quot;; P3; Military use: &quot;; [.G48]; &quot;; Civic use: &quot;; [.H48]; &quot;; year: &quot;;[.C48])" table:style-name="ce12">
            <text:p>name: Golden Shield; task: DataManagment, AnomalyDetection; AI type: Recognize; P3; Military use: Intelligence; Civic use: BehaviorEvaluation, Surveillance, Marketing, DataBrokers; year: 2003</text:p>
          </table:table-cell>
          <table:table-cell office:value-type="string" table:style-name="ce5">
            <text:p>./assets/noun-cctv-5477699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SharpEyes</text:p>
          </table:table-cell>
          <table:table-cell office:value-type="string" table:style-name="ce5">
            <text:p>Sharp Eyes</text:p>
          </table:table-cell>
          <table:table-cell office:value-type="float" office:value="2003" table:style-name="ce5">
            <text:p>2003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FacialRecognition, ComputerVision</text:p>
          </table:table-cell>
          <table:table-cell office:value-type="string" table:style-name="ce5">
            <text:p>Recognize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IdentityVerification, Security, Policing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Sharp Eyes; task: FacialRecognition, ComputerVision; AI type: Recognize; P3; Military use: Intelligence; Civic use: IdentityVerification, Security, Policing; year: 2003" table:formula="of:= COM.MICROSOFT.CONCAT(&quot;name: &quot;; [.B49]; &quot;; task: &quot;; [.E49]; &quot;; AI type: &quot;; [.F49]; &quot;; P3; Military use: &quot;; [.G49]; &quot;; Civic use: &quot;; [.H49]; &quot;; year: &quot;;[.C49])" table:style-name="ce12">
            <text:p>name: Sharp Eyes; task: FacialRecognition, ComputerVision; AI type: Recognize; P3; Military use: Intelligence; Civic use: IdentityVerification, Security, Policing; year: 2003</text:p>
          </table:table-cell>
          <table:table-cell office:value-type="string" table:style-name="ce5">
            <text:p>./assets/noun-cctv-5477699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Skynet-PRC</text:p>
          </table:table-cell>
          <table:table-cell office:value-type="string" table:style-name="ce5">
            <text:p>Skynet-PRC</text:p>
          </table:table-cell>
          <table:table-cell office:value-type="float" office:value="2003" table:style-name="ce5">
            <text:p>2003</text:p>
          </table:table-cell>
          <table:table-cell office:value-type="string" table:style-name="ce5">
            <text:p>Operation</text:p>
          </table:table-cell>
          <table:table-cell office:value-type="string" table:style-name="ce5">
            <text:p>LocationAwareness</text:p>
          </table:table-cell>
          <table:table-cell office:value-type="string" table:style-name="ce5">
            <text:p>Recognize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Security, Policing, LocationAnalytics</text:p>
          </table:table-cell>
          <table:table-cell table:number-columns-repeated="3" table:style-name="ce5"/>
          <table:table-cell table:style-name="ce11"/>
          <table:table-cell table:number-columns-repeated="3" table:style-name="ce5"/>
          <table:table-cell office:value-type="string" office:string-value="name: Skynet-PRC; task: LocationAwareness; AI type: Recognize; P3; Military use: Intelligence; Civic use: Security, Policing, LocationAnalytics; year: 2003" table:formula="of:= COM.MICROSOFT.CONCAT(&quot;name: &quot;; [.B50]; &quot;; task: &quot;; [.E50]; &quot;; AI type: &quot;; [.F50]; &quot;; P3; Military use: &quot;; [.G50]; &quot;; Civic use: &quot;; [.H50]; &quot;; year: &quot;;[.C50])" table:style-name="ce12">
            <text:p>name: Skynet-PRC; task: LocationAwareness; AI type: Recognize; P3; Military use: Intelligence; Civic use: Security, Policing, LocationAnalytics; year: 2003</text:p>
          </table:table-cell>
          <table:table-cell office:value-type="string" table:style-name="ce5">
            <text:p>./assets/noun-cctv-5477699.png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5">
            <text:p>Lattice</text:p>
          </table:table-cell>
          <table:table-cell office:value-type="string" table:style-name="ce5">
            <text:p>Lattice</text:p>
          </table:table-cell>
          <table:table-cell office:value-type="float" office:value="2025" table:style-name="ce5">
            <text:p>2025</text:p>
          </table:table-cell>
          <table:table-cell office:value-type="string" table:style-name="ce5">
            <text:p>Deployment</text:p>
          </table:table-cell>
          <table:table-cell office:value-type="string" table:style-name="ce5">
            <text:p>PlanningSystem, MultiAgentSystem, RecommenderSystem</text:p>
          </table:table-cell>
          <table:table-cell office:value-type="string" table:style-name="ce5">
            <text:p>Assign</text:p>
          </table:table-cell>
          <table:table-cell office:value-type="string" table:style-name="ce5">
            <text:p>Command</text:p>
          </table:table-cell>
          <table:table-cell office:value-type="string" table:style-name="ce5">
            <text:p>Policing, ScientificResearch</text:p>
          </table:table-cell>
          <table:table-cell office:value-type="string" table:style-name="ce5">
            <text:p>ComputerVision, Classification, Tracking, Detection, EdgeComputing, SignalAnalysis, ObjectRecognition</text:p>
          </table:table-cell>
          <table:table-cell table:number-columns-repeated="3" table:style-name="ce5"/>
          <table:table-cell office:value-type="string" table:style-name="ce5">
            <text:p>Action, Content, Decision</text:p>
          </table:table-cell>
          <table:table-cell table:style-name="ce5"/>
          <table:table-cell office:value-type="string" table:style-name="ce5">
            <text:p>PhysicalInjury, Overreliance, DistortionInHumanBehavior</text:p>
          </table:table-cell>
          <table:table-cell office:value-type="string" office:string-value="name: Lattice; task: PlanningSystem, MultiAgentSystem, RecommenderSystem; AI type: Assign; P3; Military use: Command; Civic use: Policing, ScientificResearch; year: 2025" table:formula="of:= COM.MICROSOFT.CONCAT(&quot;name: &quot;; [.B51]; &quot;; task: &quot;; [.E51]; &quot;; AI type: &quot;; [.F51]; &quot;; P3; Military use: &quot;; [.G51]; &quot;; Civic use: &quot;; [.H51]; &quot;; year: &quot;;[.C51])" table:style-name="ce12">
            <text:p>name: Lattice; task: PlanningSystem, MultiAgentSystem, RecommenderSystem; AI type: Assign; P3; Military use: Command; Civic use: Policing, ScientificResearch; year: 2025</text:p>
          </table:table-cell>
          <table:table-cell office:value-type="string" table:style-name="ce5">
            <text:p>./assets/noun-surveillance-monitor-6831349.png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Foundry</text:p>
          </table:table-cell>
          <table:table-cell office:value-type="string" table:style-name="ce1">
            <text:p>Foundry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Operation</text:p>
          </table:table-cell>
          <table:table-cell office:value-type="string" table:style-name="ce1">
            <text:p>DataManagment, Agent</text:p>
          </table:table-cell>
          <table:table-cell office:value-type="string" table:style-name="ce5">
            <text:p>Store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Policing, PrivateSecurity, BorderPatrol, BehaviorEvaluation, Surveillance, Marketing, DataBrokers</text:p>
          </table:table-cell>
          <table:table-cell office:value-type="string" table:style-name="ce1">
            <text:p>SemanticSearch, Ontologies, DataAnalysis</text:p>
          </table:table-cell>
          <table:table-cell table:number-columns-repeated="6" table:style-name="ce1"/>
          <table:table-cell office:value-type="string" office:string-value="name: Foundry; task: DataManagment, Agent; AI type: Store; P3; Military use: Intelligence; Civic use: Policing, PrivateSecurity, BorderPatrol, BehaviorEvaluation, Surveillance, Marketing, DataBrokers; year: 2022" table:formula="of:= COM.MICROSOFT.CONCAT(&quot;name: &quot;; [.B52]; &quot;; task: &quot;; [.E52]; &quot;; AI type: &quot;; [.F52]; &quot;; P3; Military use: &quot;; [.G52]; &quot;; Civic use: &quot;; [.H52]; &quot;; year: &quot;;[.C52])" table:style-name="ce12">
            <text:p>name: Foundry; task: DataManagment, Agent; AI type: Store; P3; Military use: Intelligence; Civic use: Policing, PrivateSecurity, BorderPatrol, BehaviorEvaluation, Surveillance, Marketing, DataBrokers; year: 2022</text:p>
          </table:table-cell>
          <table:table-cell office:value-type="string" table:style-name="ce5">
            <text:p>./assets/noun-ai-training-data-2985134.png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Fortify</text:p>
          </table:table-cell>
          <table:table-cell office:value-type="string" table:style-name="ce5">
            <text:p>(Mobile) Fortify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Operation</text:p>
          </table:table-cell>
          <table:table-cell office:value-type="string" table:style-name="ce1">
            <text:p>DataManagment, FacialRecognition, ComputerVision</text:p>
          </table:table-cell>
          <table:table-cell office:value-type="string" table:style-name="ce5">
            <text:p>Recognize</text:p>
          </table:table-cell>
          <table:table-cell office:value-type="string" table:style-name="ce5">
            <text:p>Intelligence</text:p>
          </table:table-cell>
          <table:table-cell office:value-type="string" table:style-name="ce5">
            <text:p>IdentityVerification, Security, Policing</text:p>
          </table:table-cell>
          <table:table-cell office:value-type="string" table:style-name="ce5">
            <text:p>Classification</text:p>
          </table:table-cell>
          <table:table-cell table:style-name="ce1"/>
          <table:table-cell office:value-type="string" table:style-name="ce5">
            <text:p>FaceRecognition</text:p>
          </table:table-cell>
          <table:table-cell table:number-columns-repeated="4" table:style-name="ce1"/>
          <table:table-cell office:value-type="string" office:string-value="name: (Mobile) Fortify; task: DataManagment, FacialRecognition, ComputerVision; AI type: Recognize; P3; Military use: Intelligence; Civic use: IdentityVerification, Security, Policing; year: 2020" table:formula="of:= COM.MICROSOFT.CONCAT(&quot;name: &quot;; [.B53]; &quot;; task: &quot;; [.E53]; &quot;; AI type: &quot;; [.F53]; &quot;; P3; Military use: &quot;; [.G53]; &quot;; Civic use: &quot;; [.H53]; &quot;; year: &quot;;[.C53])" table:style-name="ce12">
            <text:p>name: (Mobile) Fortify; task: DataManagment, FacialRecognition, ComputerVision; AI type: Recognize; P3; Military use: Intelligence; Civic use: IdentityVerification, Security, Policing; year: 2020</text:p>
          </table:table-cell>
          <table:table-cell office:value-type="string" table:style-name="ce5">
            <text:p>./assets/noun-facial-recognition-4116350.png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Sentry</text:p>
          </table:table-cell>
          <table:table-cell office:value-type="string" table:style-name="ce24">
            <text:p>Sentry</text:p>
          </table:table-cell>
          <table:table-cell office:value-type="float" office:value="2018" table:style-name="ce24">
            <text:p>2018</text:p>
          </table:table-cell>
          <table:table-cell office:value-type="string" table:style-name="ce24">
            <text:p>Operation</text:p>
          </table:table-cell>
          <table:table-cell office:value-type="string" table:style-name="ce24">
            <text:p>IntelligentControlSystem, IoT</text:p>
          </table:table-cell>
          <table:table-cell office:value-type="string" table:style-name="ce24">
            <text:p>Automate</text:p>
          </table:table-cell>
          <table:table-cell office:value-type="string" table:style-name="ce24">
            <text:p>Intelligence</text:p>
          </table:table-cell>
          <table:table-cell office:value-type="string" table:style-name="ce24">
            <text:p>BorderPatrol, Policing</text:p>
          </table:table-cell>
          <table:table-cell table:number-columns-repeated="7" table:style-name="ce24"/>
          <table:table-cell office:value-type="string" office:string-value="name: Sentry; task: IntelligentControlSystem, IoT; AI type: Automate; P3; Military use: Intelligence; Civic use: BorderPatrol, Policing; year: 2018" table:formula="of:= COM.MICROSOFT.CONCAT(&quot;name: &quot;; [.B54]; &quot;; task: &quot;; [.E54]; &quot;; AI type: &quot;; [.F54]; &quot;; P3; Military use: &quot;; [.G54]; &quot;; Civic use: &quot;; [.H54]; &quot;; year: &quot;;[.C54])" table:style-name="ce12">
            <text:p>name: Sentry; task: IntelligentControlSystem, IoT; AI type: Automate; P3; Military use: Intelligence; Civic use: BorderPatrol, Policing; year: 2018</text:p>
          </table:table-cell>
          <table:table-cell office:value-type="string" table:style-name="ce24">
            <text:p>./assets/noun-tower-111722.png</text:p>
          </table:table-cell>
          <table:table-cell table:number-columns-repeated="16367" table:style-name="ce24"/>
        </table:table-row>
        <table:table-row table:style-name="ro1">
          <table:table-cell office:value-type="string" table:style-name="ce24">
            <text:p>Mantacus</text:p>
          </table:table-cell>
          <table:table-cell office:value-type="string" table:style-name="ce24">
            <text:p>Mantacus</text:p>
          </table:table-cell>
          <table:table-cell office:value-type="float" office:value="2022" table:style-name="ce24">
            <text:p>2022</text:p>
          </table:table-cell>
          <table:table-cell office:value-type="string" table:style-name="ce24">
            <text:p>Development</text:p>
          </table:table-cell>
          <table:table-cell office:value-type="string" table:style-name="ce24">
            <text:p>ComputerVision, AnomalyDetection</text:p>
          </table:table-cell>
          <table:table-cell office:value-type="string" table:style-name="ce24">
            <text:p>Recognize</text:p>
          </table:table-cell>
          <table:table-cell office:value-type="string" table:style-name="ce24">
            <text:p>Intelligence</text:p>
          </table:table-cell>
          <table:table-cell office:value-type="string" table:style-name="ce24">
            <text:p>Policing, CrowdControl, PrivateSecurity</text:p>
          </table:table-cell>
          <table:table-cell office:value-type="string" table:style-name="ce24">
            <text:p>SignalAnalysis</text:p>
          </table:table-cell>
          <table:table-cell table:style-name="ce24"/>
          <table:table-cell office:value-type="string" table:style-name="ce24">
            <text:p>ObjectRecognition</text:p>
          </table:table-cell>
          <table:table-cell table:style-name="ce24"/>
          <table:table-cell office:value-type="string" table:style-name="ce24">
            <text:p>Decision</text:p>
          </table:table-cell>
          <table:table-cell table:style-name="ce24"/>
          <table:table-cell office:value-type="string" table:style-name="ce24">
            <text:p>Overreliance, WellbeingImpact</text:p>
          </table:table-cell>
          <table:table-cell office:value-type="string" office:string-value="name: Mantacus; task: ComputerVision, AnomalyDetection; AI type: Recognize; P3; Military use: Intelligence; Civic use: Policing, CrowdControl, PrivateSecurity; year: 2022" table:formula="of:= COM.MICROSOFT.CONCAT(&quot;name: &quot;; [.B55]; &quot;; task: &quot;; [.E55]; &quot;; AI type: &quot;; [.F55]; &quot;; P3; Military use: &quot;; [.G55]; &quot;; Civic use: &quot;; [.H55]; &quot;; year: &quot;;[.C55])" table:style-name="ce12">
            <text:p>name: Mantacus; task: ComputerVision, AnomalyDetection; AI type: Recognize; P3; Military use: Intelligence; Civic use: Policing, CrowdControl, PrivateSecurity; year: 2022</text:p>
          </table:table-cell>
          <table:table-cell office:value-type="string" table:style-name="ce9">
            <text:p>./assets/noun-pose-estimation-6860082.png</text:p>
          </table:table-cell>
          <table:table-cell table:number-columns-repeated="16367" table:style-name="ce24"/>
        </table:table-row>
        <table:table-row table:style-name="ro1">
          <table:table-cell office:value-type="string" table:style-name="ce24">
            <text:p>AIVerse</text:p>
          </table:table-cell>
          <table:table-cell office:value-type="string" table:style-name="ce24">
            <text:p>AIVerse</text:p>
          </table:table-cell>
          <table:table-cell office:value-type="float" office:value="2021" table:style-name="ce24">
            <text:p>2021</text:p>
          </table:table-cell>
          <table:table-cell office:value-type="string" table:style-name="ce24">
            <text:p>Deployment</text:p>
          </table:table-cell>
          <table:table-cell office:value-type="string" table:style-name="ce24">
            <text:p>GenerativeAI</text:p>
          </table:table-cell>
          <table:table-cell office:value-type="string" table:style-name="ce24">
            <text:p>Generate</text:p>
          </table:table-cell>
          <table:table-cell office:value-type="string" table:style-name="ce24">
            <text:p>Command</text:p>
          </table:table-cell>
          <table:table-cell office:value-type="string" table:style-name="ce24">
            <text:p>SmartHome, Security</text:p>
          </table:table-cell>
          <table:table-cell office:value-type="string" table:style-name="ce24">
            <text:p>SyntheticData, ObjectRecognition, PoseRecognition, Classification</text:p>
          </table:table-cell>
          <table:table-cell office:value-type="string" table:style-name="ce24">
            <text:p>Monitoring, DetectingIndividuals</text:p>
          </table:table-cell>
          <table:table-cell office:value-type="string" table:style-name="ce24">
            <text:p>ObjectDetection, PoseEstimation, Classification</text:p>
          </table:table-cell>
          <table:table-cell table:number-columns-repeated="4" table:style-name="ce24"/>
          <table:table-cell office:value-type="string" office:string-value="name: AIVerse; task: GenerativeAI; AI type: Generate; P3; Military use: Command; Civic use: SmartHome, Security; year: 2021" table:formula="of:= COM.MICROSOFT.CONCAT(&quot;name: &quot;; [.B56]; &quot;; task: &quot;; [.E56]; &quot;; AI type: &quot;; [.F56]; &quot;; P3; Military use: &quot;; [.G56]; &quot;; Civic use: &quot;; [.H56]; &quot;; year: &quot;;[.C56])" table:style-name="ce12">
            <text:p>name: AIVerse; task: GenerativeAI; AI type: Generate; P3; Military use: Command; Civic use: SmartHome, Security; year: 2021</text:p>
          </table:table-cell>
          <table:table-cell office:value-type="string" table:style-name="ce24">
            <text:p>./assets/noun-classification-6860055.png</text:p>
          </table:table-cell>
          <table:table-cell table:number-columns-repeated="16367" table:style-name="ce24"/>
        </table:table-row>
        <table:table-row table:style-name="ro1">
          <table:table-cell office:value-type="string" table:style-name="ce24">
            <text:p>Vector</text:p>
          </table:table-cell>
          <table:table-cell office:value-type="string" table:style-name="ce24">
            <text:p>Vector</text:p>
          </table:table-cell>
          <table:table-cell office:value-type="float" office:value="2020" table:style-name="ce24">
            <text:p>2020</text:p>
          </table:table-cell>
          <table:table-cell office:value-type="string" table:style-name="ce24">
            <text:p>Deployment</text:p>
          </table:table-cell>
          <table:table-cell office:value-type="string" table:style-name="ce24">
            <text:p>Robotics/Navigation</text:p>
          </table:table-cell>
          <table:table-cell office:value-type="string" table:style-name="ce24">
            <text:p>Automate</text:p>
          </table:table-cell>
          <table:table-cell office:value-type="string" table:style-name="ce24">
            <text:p>Operations</text:p>
          </table:table-cell>
          <table:table-cell office:value-type="string" table:style-name="ce24">
            <text:p>Policing, Surveillance</text:p>
          </table:table-cell>
          <table:table-cell table:number-columns-repeated="4" table:style-name="ce24"/>
          <table:table-cell office:value-type="string" table:style-name="ce24">
            <text:p>Action, Content</text:p>
          </table:table-cell>
          <table:table-cell table:style-name="ce24"/>
          <table:table-cell office:value-type="string" table:style-name="ce24">
            <text:p>PhysicalInjury, WellbeingImpact, PsychologicalHarm</text:p>
          </table:table-cell>
          <table:table-cell office:value-type="string" office:string-value="name: Vector; task: Robotics/Navigation; AI type: Automate; P3; Military use: Operations; Civic use: Policing, Surveillance; year: 2020" table:formula="of:= COM.MICROSOFT.CONCAT(&quot;name: &quot;; [.B57]; &quot;; task: &quot;; [.E57]; &quot;; AI type: &quot;; [.F57]; &quot;; P3; Military use: &quot;; [.G57]; &quot;; Civic use: &quot;; [.H57]; &quot;; year: &quot;;[.C57])" table:style-name="ce12">
            <text:p>name: Vector; task: Robotics/Navigation; AI type: Automate; P3; Military use: Operations; Civic use: Policing, Surveillance; year: 2020</text:p>
          </table:table-cell>
          <table:table-cell office:value-type="string" table:style-name="ce24">
            <text:p>./assets/noun-drone-strike-75130.png</text:p>
          </table:table-cell>
          <table:table-cell table:number-columns-repeated="16367" table:style-name="ce24"/>
        </table:table-row>
        <table:table-row table:style-name="ro1">
          <table:table-cell office:value-type="string" table:style-name="ce24">
            <text:p>EagleEye</text:p>
          </table:table-cell>
          <table:table-cell office:value-type="string" table:style-name="ce24">
            <text:p>Eagle Eye / SBMC Next</text:p>
          </table:table-cell>
          <table:table-cell office:value-type="float" office:value="2025" table:style-name="ce24">
            <text:p>2025</text:p>
          </table:table-cell>
          <table:table-cell office:value-type="string" table:style-name="ce24">
            <text:p>Development</text:p>
          </table:table-cell>
          <table:table-cell office:value-type="string" table:style-name="ce24">
            <text:p>ComputerVision</text:p>
          </table:table-cell>
          <table:table-cell office:value-type="string" table:style-name="ce24">
            <text:p>Recognize</text:p>
          </table:table-cell>
          <table:table-cell office:value-type="string" table:style-name="ce24">
            <text:p>Intelligence</text:p>
          </table:table-cell>
          <table:table-cell office:value-type="string" table:style-name="ce24">
            <text:p>AR, VR, Games</text:p>
          </table:table-cell>
          <table:table-cell office:value-type="string" table:style-name="ce24">
            <text:p>ObjectClassification, PoseEstimation</text:p>
          </table:table-cell>
          <table:table-cell table:number-columns-repeated="6" table:style-name="ce24"/>
          <table:table-cell office:value-type="string" office:string-value="name: Eagle Eye / SBMC Next; task: ComputerVision; AI type: Recognize; P3; Military use: Intelligence; Civic use: AR, VR, Games; year: 2025" table:formula="of:= COM.MICROSOFT.CONCAT(&quot;name: &quot;; [.B58]; &quot;; task: &quot;; [.E58]; &quot;; AI type: &quot;; [.F58]; &quot;; P3; Military use: &quot;; [.G58]; &quot;; Civic use: &quot;; [.H58]; &quot;; year: &quot;;[.C58])" table:style-name="ce12">
            <text:p>name: Eagle Eye / SBMC Next; task: ComputerVision; AI type: Recognize; P3; Military use: Intelligence; Civic use: AR, VR, Games; year: 2025</text:p>
          </table:table-cell>
          <table:table-cell office:value-type="string" table:style-name="ce24">
            <text:p>./assets/noun-virtual-headset-7137401.png</text:p>
          </table:table-cell>
          <table:table-cell table:number-columns-repeated="16367" table:style-name="ce24"/>
        </table:table-row>
        <table:table-row table:style-name="ro1">
          <table:table-cell office:value-type="string" table:style-name="ce23">
            <text:p>Thunderforge</text:p>
          </table:table-cell>
          <table:table-cell office:value-type="string" table:style-name="ce23">
            <text:p>Project Thunderforge</text:p>
          </table:table-cell>
          <table:table-cell office:value-type="float" office:value="2025" table:style-name="ce23">
            <text:p>2025</text:p>
          </table:table-cell>
          <table:table-cell office:value-type="string" table:style-name="ce23">
            <text:p>Development</text:p>
          </table:table-cell>
          <table:table-cell office:value-type="string" table:style-name="ce23">
            <text:p>Agent, MultiAgentSystem, PlanningSystem</text:p>
          </table:table-cell>
          <table:table-cell office:value-type="string" table:style-name="ce23">
            <text:p>Generate</text:p>
          </table:table-cell>
          <table:table-cell office:value-type="string" table:style-name="ce23">
            <text:p>Command</text:p>
          </table:table-cell>
          <table:table-cell office:value-type="string" table:style-name="ce23">
            <text:p>AIAssistants, Chatbots</text:p>
          </table:table-cell>
          <table:table-cell table:number-columns-repeated="3" table:style-name="ce23"/>
          <table:table-cell table:style-name="ce11"/>
          <table:table-cell table:number-columns-repeated="3" table:style-name="ce23"/>
          <table:table-cell office:value-type="string" office:string-value="name: Project Thunderforge; task: Agent, MultiAgentSystem, PlanningSystem; AI type: Generate; P3; Military use: Command; Civic use: AIAssistants, Chatbots; year: 2025" table:formula="of:= COM.MICROSOFT.CONCAT(&quot;name: &quot;; [.B59]; &quot;; task: &quot;; [.E59]; &quot;; AI type: &quot;; [.F59]; &quot;; P3; Military use: &quot;; [.G59]; &quot;; Civic use: &quot;; [.H59]; &quot;; year: &quot;;[.C59])" table:style-name="ce12">
            <text:p>name: Project Thunderforge; task: Agent, MultiAgentSystem, PlanningSystem; AI type: Generate; P3; Military use: Command; Civic use: AIAssistants, Chatbots; year: 2025</text:p>
          </table:table-cell>
          <table:table-cell office:value-type="string" table:style-name="ce23">
            <text:p>./assets/noun-chatbot-7107716.png</text:p>
          </table:table-cell>
          <table:table-cell table:style-name="ce23"/>
          <table:table-cell table:number-columns-repeated="16366" table:style-name="ce24"/>
        </table:table-row>
        <table:table-row table:style-name="ro1">
          <table:table-cell office:value-type="string" table:style-name="ce24">
            <text:p>Jericho</text:p>
          </table:table-cell>
          <table:table-cell office:value-type="string" table:style-name="ce23">
            <text:p>Jericho, StrikeWeb</text:p>
          </table:table-cell>
          <table:table-cell office:value-type="float" office:value="2021" table:style-name="ce23">
            <text:p>2021</text:p>
          </table:table-cell>
          <table:table-cell office:value-type="string" table:style-name="ce23">
            <text:p>Deployment</text:p>
          </table:table-cell>
          <table:table-cell office:value-type="string" table:style-name="ce23">
            <text:p>IntelligentControlSystem, IoT</text:p>
          </table:table-cell>
          <table:table-cell office:value-type="string" table:style-name="ce23">
            <text:p>Automate</text:p>
          </table:table-cell>
          <table:table-cell office:value-type="string" table:style-name="ce23">
            <text:p>Intelligence</text:p>
          </table:table-cell>
          <table:table-cell office:value-type="string" table:style-name="ce23">
            <text:p>SmartHome, EdgeComputing</text:p>
          </table:table-cell>
          <table:table-cell table:number-columns-repeated="3" table:style-name="ce23"/>
          <table:table-cell table:style-name="ce11"/>
          <table:table-cell table:number-columns-repeated="3" table:style-name="ce23"/>
          <table:table-cell office:value-type="string" office:string-value="name: Jericho, StrikeWeb; task: IntelligentControlSystem, IoT; AI type: Automate; P3; Military use: Intelligence; Civic use: SmartHome, EdgeComputing; year: 2021" table:formula="of:= COM.MICROSOFT.CONCAT(&quot;name: &quot;; [.B60]; &quot;; task: &quot;; [.E60]; &quot;; AI type: &quot;; [.F60]; &quot;; P3; Military use: &quot;; [.G60]; &quot;; Civic use: &quot;; [.H60]; &quot;; year: &quot;;[.C60])" table:style-name="ce12">
            <text:p>name: Jericho, StrikeWeb; task: IntelligentControlSystem, IoT; AI type: Automate; P3; Military use: Intelligence; Civic use: SmartHome, EdgeComputing; year: 2021</text:p>
          </table:table-cell>
          <table:table-cell office:value-type="string" table:style-name="ce23">
            <text:p>./assets/noun-tower-111722.png</text:p>
          </table:table-cell>
          <table:table-cell table:style-name="ce23"/>
          <table:table-cell table:number-columns-repeated="16366" table:style-name="ce24"/>
        </table:table-row>
        <table:table-row table:style-name="ro1">
          <table:table-cell office:value-type="string" table:style-name="ce23">
            <text:p>Atlas</text:p>
          </table:table-cell>
          <table:table-cell office:value-type="string" table:style-name="ce23">
            <text:p>Atlas</text:p>
          </table:table-cell>
          <table:table-cell office:value-type="string" table:style-name="ce23">
            <text:p>n.d.</text:p>
          </table:table-cell>
          <table:table-cell office:value-type="string" table:style-name="ce23">
            <text:p>Operation</text:p>
          </table:table-cell>
          <table:table-cell office:value-type="string" table:style-name="ce24">
            <text:p>Robotics/Navigation</text:p>
          </table:table-cell>
          <table:table-cell office:value-type="string" table:style-name="ce23">
            <text:p>Automate</text:p>
          </table:table-cell>
          <table:table-cell office:value-type="string" table:style-name="ce23">
            <text:p>Operations</text:p>
          </table:table-cell>
          <table:table-cell office:value-type="string" table:style-name="ce23">
            <text:p>Policing, CrowdControl, PrivateSecurity, ScientificResearch</text:p>
          </table:table-cell>
          <table:table-cell office:value-type="string" table:style-name="ce23">
            <text:p>SignalAnalysis, ObjectDetection, Classification</text:p>
          </table:table-cell>
          <table:table-cell table:number-columns-repeated="2" table:style-name="ce23"/>
          <table:table-cell table:style-name="ce11"/>
          <table:table-cell table:number-columns-repeated="3" table:style-name="ce23"/>
          <table:table-cell office:value-type="string" office:string-value="name: Atlas; task: Robotics/Navigation; AI type: Automate; P3; Military use: Operations; Civic use: Policing, CrowdControl, PrivateSecurity, ScientificResearch; year: n.d." table:formula="of:= COM.MICROSOFT.CONCAT(&quot;name: &quot;; [.B61]; &quot;; task: &quot;; [.E61]; &quot;; AI type: &quot;; [.F61]; &quot;; P3; Military use: &quot;; [.G61]; &quot;; Civic use: &quot;; [.H61]; &quot;; year: &quot;;[.C61])" table:style-name="ce12">
            <text:p>name: Atlas; task: Robotics/Navigation; AI type: Automate; P3; Military use: Operations; Civic use: Policing, CrowdControl, PrivateSecurity, ScientificResearch; year: n.d.</text:p>
          </table:table-cell>
          <table:table-cell office:value-type="string" table:style-name="ce23">
            <text:p>./assets/noun-drone-strike-75130.png</text:p>
          </table:table-cell>
          <table:table-cell table:style-name="ce23"/>
          <table:table-cell table:number-columns-repeated="16366" table:style-name="ce24"/>
        </table:table-row>
        <table:table-row table:style-name="ro1">
          <table:table-cell office:value-type="string" table:style-name="ce23">
            <text:p>Mithra</text:p>
          </table:table-cell>
          <table:table-cell office:value-type="string" table:style-name="ce23">
            <text:p>MithraOS</text:p>
          </table:table-cell>
          <table:table-cell office:value-type="float" office:value="2022" table:style-name="ce23">
            <text:p>2022</text:p>
          </table:table-cell>
          <table:table-cell office:value-type="string" table:style-name="ce23">
            <text:p>Deployment</text:p>
          </table:table-cell>
          <table:table-cell office:value-type="string" table:style-name="ce23">
            <text:p>Robotics/Navigation</text:p>
          </table:table-cell>
          <table:table-cell office:value-type="string" table:style-name="ce23">
            <text:p>Automate</text:p>
          </table:table-cell>
          <table:table-cell office:value-type="string" table:style-name="ce23">
            <text:p>Operations</text:p>
          </table:table-cell>
          <table:table-cell office:value-type="string" table:style-name="ce23">
            <text:p>SmartHome, Security</text:p>
          </table:table-cell>
          <table:table-cell table:number-columns-repeated="3" table:style-name="ce23"/>
          <table:table-cell table:style-name="ce11"/>
          <table:table-cell table:number-columns-repeated="3" table:style-name="ce23"/>
          <table:table-cell office:value-type="string" office:string-value="name: MithraOS; task: Robotics/Navigation; AI type: Automate; P3; Military use: Operations; Civic use: SmartHome, Security; year: 2022" table:formula="of:= COM.MICROSOFT.CONCAT(&quot;name: &quot;; [.B62]; &quot;; task: &quot;; [.E62]; &quot;; AI type: &quot;; [.F62]; &quot;; P3; Military use: &quot;; [.G62]; &quot;; Civic use: &quot;; [.H62]; &quot;; year: &quot;;[.C62])" table:style-name="ce12">
            <text:p>name: MithraOS; task: Robotics/Navigation; AI type: Automate; P3; Military use: Operations; Civic use: SmartHome, Security; year: 2022</text:p>
          </table:table-cell>
          <table:table-cell office:value-type="string" table:style-name="ce23">
            <text:p>./assets/noun-bomb-defusing-robot-1036305.png</text:p>
          </table:table-cell>
          <table:table-cell table:style-name="ce23"/>
          <table:table-cell table:number-columns-repeated="16366" table:style-name="ce24"/>
        </table:table-row>
        <table:table-row table:style-name="ro1">
          <table:table-cell office:value-type="string" table:style-name="ce23">
            <text:p>Donovan</text:p>
          </table:table-cell>
          <table:table-cell office:value-type="string" table:style-name="ce23">
            <text:p>Donovan</text:p>
          </table:table-cell>
          <table:table-cell office:value-type="float" office:value="2023" table:style-name="ce23">
            <text:p>2023</text:p>
          </table:table-cell>
          <table:table-cell office:value-type="string" table:style-name="ce23">
            <text:p>Development</text:p>
          </table:table-cell>
          <table:table-cell office:value-type="string" table:style-name="ce23">
            <text:p>Agent</text:p>
          </table:table-cell>
          <table:table-cell office:value-type="string" table:style-name="ce23">
            <text:p>Generate</text:p>
          </table:table-cell>
          <table:table-cell office:value-type="string" table:style-name="ce23">
            <text:p>Command</text:p>
          </table:table-cell>
          <table:table-cell office:value-type="string" table:style-name="ce23">
            <text:p>AIAssistants, Chatbots</text:p>
          </table:table-cell>
          <table:table-cell office:value-type="string" table:style-name="ce23">
            <text:p>TextGeneration, TransformerModel, AgentAction, Automation</text:p>
          </table:table-cell>
          <table:table-cell table:number-columns-repeated="2" table:style-name="ce23"/>
          <table:table-cell table:style-name="ce11"/>
          <table:table-cell table:number-columns-repeated="2" table:style-name="ce23"/>
          <table:table-cell office:value-type="string" table:style-name="ce24">
            <text:p>DistortionInHumanBehavior, Overreliance, WellbeingImpact</text:p>
          </table:table-cell>
          <table:table-cell office:value-type="string" office:string-value="name: Donovan; task: Agent; AI type: Generate; P3; Military use: Command; Civic use: AIAssistants, Chatbots; year: 2023" table:formula="of:= COM.MICROSOFT.CONCAT(&quot;name: &quot;; [.B63]; &quot;; task: &quot;; [.E63]; &quot;; AI type: &quot;; [.F63]; &quot;; P3; Military use: &quot;; [.G63]; &quot;; Civic use: &quot;; [.H63]; &quot;; year: &quot;;[.C63])" table:style-name="ce12">
            <text:p>name: Donovan; task: Agent; AI type: Generate; P3; Military use: Command; Civic use: AIAssistants, Chatbots; year: 2023</text:p>
          </table:table-cell>
          <table:table-cell office:value-type="string" table:style-name="ce24">
            <text:p>./assets/noun-chatbot-7107716.png</text:p>
          </table:table-cell>
          <table:table-cell office:value-type="string" table:style-name="ce24">
            <text:p>assistant</text:p>
          </table:table-cell>
          <table:table-cell table:number-columns-repeated="16366" table:style-name="ce24"/>
        </table:table-row>
        <table:table-row table:style-name="ro1">
          <table:table-cell office:value-type="string" table:style-name="ce23">
            <text:p>Hivemind</text:p>
          </table:table-cell>
          <table:table-cell office:value-type="string" table:style-name="ce23">
            <text:p>Hivemind</text:p>
          </table:table-cell>
          <table:table-cell office:value-type="float" office:value="2015" table:style-name="ce23">
            <text:p>2015</text:p>
          </table:table-cell>
          <table:table-cell office:value-type="string" table:style-name="ce23">
            <text:p>Deployment</text:p>
          </table:table-cell>
          <table:table-cell office:value-type="string" table:style-name="ce23">
            <text:p>Agent, Robotics/Navigation</text:p>
          </table:table-cell>
          <table:table-cell office:value-type="string" table:style-name="ce23">
            <text:p>Automate</text:p>
          </table:table-cell>
          <table:table-cell office:value-type="string" table:style-name="ce23">
            <text:p>Operations</text:p>
          </table:table-cell>
          <table:table-cell office:value-type="string" table:style-name="ce23">
            <text:p>Policing, Security, BorderPatrol</text:p>
          </table:table-cell>
          <table:table-cell table:number-columns-repeated="3" table:style-name="ce23"/>
          <table:table-cell table:style-name="ce11"/>
          <table:table-cell table:number-columns-repeated="3" table:style-name="ce23"/>
          <table:table-cell office:value-type="string" office:string-value="name: Hivemind; task: Agent, Robotics/Navigation; AI type: Automate; P3; Military use: Operations; Civic use: Policing, Security, BorderPatrol; year: 2015" table:formula="of:= COM.MICROSOFT.CONCAT(&quot;name: &quot;; [.B64]; &quot;; task: &quot;; [.E64]; &quot;; AI type: &quot;; [.F64]; &quot;; P3; Military use: &quot;; [.G64]; &quot;; Civic use: &quot;; [.H64]; &quot;; year: &quot;;[.C64])" table:style-name="ce12">
            <text:p>name: Hivemind; task: Agent, Robotics/Navigation; AI type: Automate; P3; Military use: Operations; Civic use: Policing, Security, BorderPatrol; year: 2015</text:p>
          </table:table-cell>
          <table:table-cell office:value-type="string" table:style-name="ce23">
            <text:p>./assets/noun-drone-strike-75130.png</text:p>
          </table:table-cell>
          <table:table-cell table:style-name="ce23"/>
          <table:table-cell table:number-columns-repeated="16366" table:style-name="ce24"/>
        </table:table-row>
        <table:table-row table:style-name="ro1">
          <table:table-cell office:value-type="string" table:style-name="ce23">
            <text:p>Centaur</text:p>
          </table:table-cell>
          <table:table-cell office:value-type="string" table:style-name="ce23">
            <text:p>Centaur</text:p>
          </table:table-cell>
          <table:table-cell office:value-type="float" office:value="2024" table:style-name="ce23">
            <text:p>2024</text:p>
          </table:table-cell>
          <table:table-cell office:value-type="string" table:style-name="ce23">
            <text:p>Deployment</text:p>
          </table:table-cell>
          <table:table-cell office:value-type="string" table:style-name="ce23">
            <text:p>Agent, Robotics/Navigation</text:p>
          </table:table-cell>
          <table:table-cell office:value-type="string" table:style-name="ce23">
            <text:p>Automate</text:p>
          </table:table-cell>
          <table:table-cell office:value-type="string" table:style-name="ce23">
            <text:p>Operations</text:p>
          </table:table-cell>
          <table:table-cell office:value-type="string" table:style-name="ce23">
            <text:p>Policing, Security, BorderPatrol</text:p>
          </table:table-cell>
          <table:table-cell table:number-columns-repeated="3" table:style-name="ce6"/>
          <table:table-cell table:style-name="ce15"/>
          <table:table-cell table:number-columns-repeated="3" table:style-name="ce6"/>
          <table:table-cell office:value-type="string" office:string-value="name: Centaur; task: Agent, Robotics/Navigation; AI type: Automate; P3; Military use: Operations; Civic use: Policing, Security, BorderPatrol; year: 2024" table:formula="of:= COM.MICROSOFT.CONCAT(&quot;name: &quot;; [.B65]; &quot;; task: &quot;; [.E65]; &quot;; AI type: &quot;; [.F65]; &quot;; P3; Military use: &quot;; [.G65]; &quot;; Civic use: &quot;; [.H65]; &quot;; year: &quot;;[.C65])" table:style-name="ce12">
            <text:p>name: Centaur; task: Agent, Robotics/Navigation; AI type: Automate; P3; Military use: Operations; Civic use: Policing, Security, BorderPatrol; year: 2024</text:p>
          </table:table-cell>
          <table:table-cell office:value-type="string" table:style-name="ce23">
            <text:p>./assets/noun-drone-strike-75130.png</text:p>
          </table:table-cell>
          <table:table-cell table:number-columns-repeated="16367" table:style-name="ce6"/>
        </table:table-row>
        <table:table-row table:style-name="ro1">
          <table:table-cell office:value-type="string" table:style-name="ce23">
            <text:p>Altra</text:p>
          </table:table-cell>
          <table:table-cell office:value-type="string" table:style-name="ce23">
            <text:p>Altra</text:p>
          </table:table-cell>
          <table:table-cell office:value-type="string" table:style-name="ce23">
            <text:p>n.d.</text:p>
          </table:table-cell>
          <table:table-cell office:value-type="string" table:style-name="ce23">
            <text:p>Operation</text:p>
          </table:table-cell>
          <table:table-cell office:value-type="string" table:style-name="ce23">
            <text:p>Robotics/Navigation</text:p>
          </table:table-cell>
          <table:table-cell office:value-type="string" table:style-name="ce23">
            <text:p>Automate</text:p>
          </table:table-cell>
          <table:table-cell office:value-type="string" table:style-name="ce23">
            <text:p>Command</text:p>
          </table:table-cell>
          <table:table-cell office:value-type="string" table:style-name="ce23">
            <text:p>Policing, Security, BorderPatrol</text:p>
          </table:table-cell>
          <table:table-cell table:number-columns-repeated="3" table:style-name="ce23"/>
          <table:table-cell table:style-name="ce11"/>
          <table:table-cell table:number-columns-repeated="3" table:style-name="ce23"/>
          <table:table-cell office:value-type="string" office:string-value="name: Altra; task: Robotics/Navigation; AI type: Automate; P3; Military use: Command; Civic use: Policing, Security, BorderPatrol; year: n.d." table:formula="of:= COM.MICROSOFT.CONCAT(&quot;name: &quot;; [.B66]; &quot;; task: &quot;; [.E66]; &quot;; AI type: &quot;; [.F66]; &quot;; P3; Military use: &quot;; [.G66]; &quot;; Civic use: &quot;; [.H66]; &quot;; year: &quot;;[.C66])" table:style-name="ce12">
            <text:p>name: Altra; task: Robotics/Navigation; AI type: Automate; P3; Military use: Command; Civic use: Policing, Security, BorderPatrol; year: n.d.</text:p>
          </table:table-cell>
          <table:table-cell office:value-type="string" table:style-name="ce23">
            <text:p>./assets/noun-drone-strike-75130.png</text:p>
          </table:table-cell>
          <table:table-cell table:number-columns-repeated="16367" table:style-name="ce24"/>
        </table:table-row>
        <table:table-row table:number-rows-repeated="14" table:style-name="ro1">
          <table:table-cell table:number-columns-repeated="11" table:style-name="ce5"/>
          <table:table-cell table:style-name="ce11"/>
          <table:table-cell table:number-columns-repeated="3" table:style-name="ce5"/>
          <table:table-cell table:style-name="ce12"/>
          <table:table-cell table:number-columns-repeated="16368" table:style-name="ce5"/>
        </table:table-row>
        <table:table-row table:number-rows-repeated="23" table:style-name="ro1">
          <table:table-cell table:number-columns-repeated="15"/>
          <table:table-cell table:style-name="ce12"/>
          <table:table-cell table:number-columns-repeated="16368"/>
        </table:table-row>
        <table:table-row table:number-rows-repeated="1048473" table:style-name="ro1">
          <table:table-cell table:number-columns-repeated="16384"/>
        </table:table-row>
      </table:table>
      <table:table table:name="N_Civic" table:style-name="ta1">
        <table:table-column table:style-name="co2" table:number-columns-repeated="12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4">
            <text:p>id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year</text:p>
          </table:table-cell>
          <table:table-cell office:value-type="string" table:style-name="ce2">
            <text:p>currentStatus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militaryUse</text:p>
          </table:table-cell>
          <table:table-cell office:value-type="string" table:style-name="ce3">
            <text:p>civicUse</text:p>
          </table:table-cell>
          <table:table-cell office:value-type="string" table:style-name="ce3">
            <text:p>MLTask</text:p>
          </table:table-cell>
          <table:table-cell office:value-type="string" table:style-name="ce2">
            <text:p>purpose</text:p>
          </table:table-cell>
          <table:table-cell office:value-type="string" table:style-name="ce2">
            <text:p>capacity</text:p>
          </table:table-cell>
          <table:table-cell office:value-type="string" table:style-name="ce3">
            <text:p>output</text:p>
          </table:table-cell>
          <table:table-cell office:value-type="string" table:style-name="ce3">
            <text:p>impact</text:p>
          </table:table-cell>
          <table:table-cell office:value-type="string" table:style-name="ce4">
            <text:p>hover</text:p>
          </table:table-cell>
          <table:table-cell office:value-type="string" table:style-name="ce4">
            <text:p>image</text:p>
          </table:table-cell>
          <table:table-cell office:value-type="string" table:style-name="ce4">
            <text:p>nounKey</text:p>
          </table:table-cell>
          <table:table-cell table:number-columns-repeated="16369" table:style-name="ce4"/>
        </table:table-row>
        <table:table-row table:style-name="ro1">
          <table:table-cell office:value-type="string" table:style-name="ce1">
            <text:p>Claude</text:p>
          </table:table-cell>
          <table:table-cell office:value-type="string" table:style-name="ce1">
            <text:p>Claude</text:p>
          </table:table-cell>
          <table:table-cell office:value-type="float" office:value="2023" table:style-name="ce1">
            <text:p>2023</text:p>
          </table:table-cell>
          <table:table-cell table:number-columns-repeated="9" table:style-name="ce1"/>
          <table:table-cell office:value-type="string" office:string-value="name: Claude; year: 2023; type: ; Military use: ; Civic use: ; Purpose: ; Capabilities: ; Outputs: ; Impacts: " table:formula="of:= COM.MICROSOFT.CONCAT(&quot;name: &quot;; [.B2]; &quot;; year: &quot;;[.C2]; &quot;; type: &quot;; [.D2]; &quot;; Military use: &quot;; [.E2]; &quot;; Civic use: &quot;; [.F2]; &quot;; Purpose: &quot;; [.I2]; &quot;; Capabilities: &quot;; [.J2]; &quot;; Outputs: &quot;; [.K2]; &quot;; Impacts: &quot;; [.L2])" table:style-name="ce12">
            <text:p>name: Claude; year: 2023; type: ; Military use: ; Civic use: ; Purpose: ; Capabilities: ; Outputs: ; Impacts:<text:s/></text:p>
          </table:table-cell>
          <table:table-cell office:value-type="string" table:style-name="ce1">
            <text:p>./assets/noun-text-generator-6059191.png</text:p>
          </table:table-cell>
          <table:table-cell office:value-type="string" table:style-name="ce1">
            <text:p>textgenerato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oomba</text:p>
          </table:table-cell>
          <table:table-cell office:value-type="string" table:style-name="ce1">
            <text:p>Roomba</text:p>
          </table:table-cell>
          <table:table-cell office:value-type="float" office:value="2002" table:style-name="ce1">
            <text:p>2002</text:p>
          </table:table-cell>
          <table:table-cell table:number-columns-repeated="9" table:style-name="ce1"/>
          <table:table-cell office:value-type="string" office:string-value="name: Roomba; year: 2002; type: ; Military use: ; Civic use: ; Purpose: ; Capabilities: ; Outputs: ; Impacts: " table:formula="of:= COM.MICROSOFT.CONCAT(&quot;name: &quot;; [.B3]; &quot;; year: &quot;;[.C3]; &quot;; type: &quot;; [.D3]; &quot;; Military use: &quot;; [.E3]; &quot;; Civic use: &quot;; [.F3]; &quot;; Purpose: &quot;; [.I3]; &quot;; Capabilities: &quot;; [.J3]; &quot;; Outputs: &quot;; [.K3]; &quot;; Impacts: &quot;; [.L3])" table:style-name="ce12">
            <text:p>name: Roomba; year: 2002; type: ; Military use: ; Civic use: ; Purpose: ; Capabilities: ; Outputs: ; Impacts:<text:s/></text:p>
          </table:table-cell>
          <table:table-cell office:value-type="string" table:style-name="ce1">
            <text:p>./assets/noun-robot-vacuum-6793770.png</text:p>
          </table:table-cell>
          <table:table-cell office:value-type="string" table:style-name="ce1">
            <text:p>smartHom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lama</text:p>
          </table:table-cell>
          <table:table-cell office:value-type="string" table:style-name="ce1">
            <text:p>Llama</text:p>
          </table:table-cell>
          <table:table-cell office:value-type="float" office:value="2023" table:style-name="ce1">
            <text:p>2023</text:p>
          </table:table-cell>
          <table:table-cell table:number-columns-repeated="9" table:style-name="ce1"/>
          <table:table-cell office:value-type="string" office:string-value="name: Llama; year: 2023; type: ; Military use: ; Civic use: ; Purpose: ; Capabilities: ; Outputs: ; Impacts: " table:formula="of:= COM.MICROSOFT.CONCAT(&quot;name: &quot;; [.B4]; &quot;; year: &quot;;[.C4]; &quot;; type: &quot;; [.D4]; &quot;; Military use: &quot;; [.E4]; &quot;; Civic use: &quot;; [.F4]; &quot;; Purpose: &quot;; [.I4]; &quot;; Capabilities: &quot;; [.J4]; &quot;; Outputs: &quot;; [.K4]; &quot;; Impacts: &quot;; [.L4])" table:style-name="ce12">
            <text:p>name: Llama; year: 2023; type: ; Military use: ; Civic use: ; Purpose: ; Capabilities: ; Outputs: ; Impacts:<text:s/></text:p>
          </table:table-cell>
          <table:table-cell office:value-type="string" table:style-name="ce1">
            <text:p>./assets/noun-text-generator-6059191.png</text:p>
          </table:table-cell>
          <table:table-cell office:value-type="string" table:style-name="ce1">
            <text:p>textgenerato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acebook</text:p>
          </table:table-cell>
          <table:table-cell office:value-type="string" table:style-name="ce1">
            <text:p>Facebook</text:p>
          </table:table-cell>
          <table:table-cell office:value-type="float" office:value="2004" table:style-name="ce1">
            <text:p>2004</text:p>
          </table:table-cell>
          <table:table-cell table:number-columns-repeated="9" table:style-name="ce1"/>
          <table:table-cell office:value-type="string" office:string-value="name: Facebook; year: 2004; type: ; Military use: ; Civic use: ; Purpose: ; Capabilities: ; Outputs: ; Impacts: " table:formula="of:= COM.MICROSOFT.CONCAT(&quot;name: &quot;; [.B5]; &quot;; year: &quot;;[.C5]; &quot;; type: &quot;; [.D5]; &quot;; Military use: &quot;; [.E5]; &quot;; Civic use: &quot;; [.F5]; &quot;; Purpose: &quot;; [.I5]; &quot;; Capabilities: &quot;; [.J5]; &quot;; Outputs: &quot;; [.K5]; &quot;; Impacts: &quot;; [.L5])" table:style-name="ce12">
            <text:p>name: Facebook; year: 2004; type: ; Military use: ; Civic use: ; Purpose: ; Capabilities: ; Outputs: ; Impacts:<text:s/></text:p>
          </table:table-cell>
          <table:table-cell office:value-type="string" table:style-name="ce1">
            <text:p>./assets/noun-social-media-platform-7481620.png</text:p>
          </table:table-cell>
          <table:table-cell office:value-type="string" table:style-name="ce1">
            <text:p>platfor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WhatsApp</text:p>
          </table:table-cell>
          <table:table-cell office:value-type="string" table:style-name="ce1">
            <text:p>WhatsApp</text:p>
          </table:table-cell>
          <table:table-cell office:value-type="float" office:value="2009" table:style-name="ce1">
            <text:p>2009</text:p>
          </table:table-cell>
          <table:table-cell table:number-columns-repeated="9" table:style-name="ce1"/>
          <table:table-cell office:value-type="string" office:string-value="name: WhatsApp; year: 2009; type: ; Military use: ; Civic use: ; Purpose: ; Capabilities: ; Outputs: ; Impacts: " table:formula="of:= COM.MICROSOFT.CONCAT(&quot;name: &quot;; [.B6]; &quot;; year: &quot;;[.C6]; &quot;; type: &quot;; [.D6]; &quot;; Military use: &quot;; [.E6]; &quot;; Civic use: &quot;; [.F6]; &quot;; Purpose: &quot;; [.I6]; &quot;; Capabilities: &quot;; [.J6]; &quot;; Outputs: &quot;; [.K6]; &quot;; Impacts: &quot;; [.L6])" table:style-name="ce12">
            <text:p>name: WhatsApp; year: 2009; type: ; Military use: ; Civic use: ; Purpose: ; Capabilities: ; Outputs: ; Impacts:<text:s/></text:p>
          </table:table-cell>
          <table:table-cell office:value-type="string" table:style-name="ce1">
            <text:p>./assets/noun-social-media-platform-7481620.png</text:p>
          </table:table-cell>
          <table:table-cell office:value-type="string" table:style-name="ce1">
            <text:p>platfor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atGPT</text:p>
          </table:table-cell>
          <table:table-cell office:value-type="string" table:style-name="ce1">
            <text:p>ChatGPT</text:p>
          </table:table-cell>
          <table:table-cell office:value-type="float" office:value="2022" table:style-name="ce1">
            <text:p>2022</text:p>
          </table:table-cell>
          <table:table-cell table:number-columns-repeated="9" table:style-name="ce1"/>
          <table:table-cell office:value-type="string" office:string-value="name: ChatGPT; year: 2022; type: ; Military use: ; Civic use: ; Purpose: ; Capabilities: ; Outputs: ; Impacts: " table:formula="of:= COM.MICROSOFT.CONCAT(&quot;name: &quot;; [.B7]; &quot;; year: &quot;;[.C7]; &quot;; type: &quot;; [.D7]; &quot;; Military use: &quot;; [.E7]; &quot;; Civic use: &quot;; [.F7]; &quot;; Purpose: &quot;; [.I7]; &quot;; Capabilities: &quot;; [.J7]; &quot;; Outputs: &quot;; [.K7]; &quot;; Impacts: &quot;; [.L7])" table:style-name="ce12">
            <text:p>name: ChatGPT; year: 2022; type: ; Military use: ; Civic use: ; Purpose: ; Capabilities: ; Outputs: ; Impacts:<text:s/></text:p>
          </table:table-cell>
          <table:table-cell office:value-type="string" table:style-name="ce1">
            <text:p>./assets/noun-text-generator-6059191.png</text:p>
          </table:table-cell>
          <table:table-cell office:value-type="string" table:style-name="ce1">
            <text:p>textgenerato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emini</text:p>
          </table:table-cell>
          <table:table-cell office:value-type="string" table:style-name="ce1">
            <text:p>Gemini/Bard</text:p>
          </table:table-cell>
          <table:table-cell office:value-type="float" office:value="2024" table:style-name="ce1">
            <text:p>2024</text:p>
          </table:table-cell>
          <table:table-cell table:number-columns-repeated="9" table:style-name="ce1"/>
          <table:table-cell office:value-type="string" office:string-value="name: Gemini/Bard; year: 2024; type: ; Military use: ; Civic use: ; Purpose: ; Capabilities: ; Outputs: ; Impacts: " table:formula="of:= COM.MICROSOFT.CONCAT(&quot;name: &quot;; [.B8]; &quot;; year: &quot;;[.C8]; &quot;; type: &quot;; [.D8]; &quot;; Military use: &quot;; [.E8]; &quot;; Civic use: &quot;; [.F8]; &quot;; Purpose: &quot;; [.I8]; &quot;; Capabilities: &quot;; [.J8]; &quot;; Outputs: &quot;; [.K8]; &quot;; Impacts: &quot;; [.L8])" table:style-name="ce12">
            <text:p>name: Gemini/Bard; year: 2024; type: ; Military use: ; Civic use: ; Purpose: ; Capabilities: ; Outputs: ; Impacts:<text:s/></text:p>
          </table:table-cell>
          <table:table-cell office:value-type="string" table:style-name="ce1">
            <text:p>./assets/noun-text-generator-6059191.png</text:p>
          </table:table-cell>
          <table:table-cell office:value-type="string" table:style-name="ce1">
            <text:p>textgenerato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orDash</text:p>
          </table:table-cell>
          <table:table-cell office:value-type="string" table:style-name="ce1">
            <text:p>DoorDash</text:p>
          </table:table-cell>
          <table:table-cell office:value-type="float" office:value="2012" table:style-name="ce1">
            <text:p>2012</text:p>
          </table:table-cell>
          <table:table-cell table:number-columns-repeated="9" table:style-name="ce1"/>
          <table:table-cell office:value-type="string" office:string-value="name: DoorDash; year: 2012; type: ; Military use: ; Civic use: ; Purpose: ; Capabilities: ; Outputs: ; Impacts: " table:formula="of:= COM.MICROSOFT.CONCAT(&quot;name: &quot;; [.B9]; &quot;; year: &quot;;[.C9]; &quot;; type: &quot;; [.D9]; &quot;; Military use: &quot;; [.E9]; &quot;; Civic use: &quot;; [.F9]; &quot;; Purpose: &quot;; [.I9]; &quot;; Capabilities: &quot;; [.J9]; &quot;; Outputs: &quot;; [.K9]; &quot;; Impacts: &quot;; [.L9])" table:style-name="ce12">
            <text:p>name: DoorDash; year: 2012; type: ; Military use: ; Civic use: ; Purpose: ; Capabilities: ; Outputs: ; Impacts:<text:s/></text:p>
          </table:table-cell>
          <table:table-cell office:value-type="string" table:style-name="ce1">
            <text:p>./assets/noun-social-media-platform-7481620.png</text:p>
          </table:table-cell>
          <table:table-cell office:value-type="string" table:style-name="ce1">
            <text:p>logistic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culus</text:p>
          </table:table-cell>
          <table:table-cell office:value-type="string" table:style-name="ce1">
            <text:p>Oculus Rift</text:p>
          </table:table-cell>
          <table:table-cell office:value-type="float" office:value="2012" table:style-name="ce1">
            <text:p>2012</text:p>
          </table:table-cell>
          <table:table-cell table:number-columns-repeated="9" table:style-name="ce1"/>
          <table:table-cell office:value-type="string" office:string-value="name: Oculus Rift; year: 2012; type: ; Military use: ; Civic use: ; Purpose: ; Capabilities: ; Outputs: ; Impacts: " table:formula="of:= COM.MICROSOFT.CONCAT(&quot;name: &quot;; [.B10]; &quot;; year: &quot;;[.C10]; &quot;; type: &quot;; [.D10]; &quot;; Military use: &quot;; [.E10]; &quot;; Civic use: &quot;; [.F10]; &quot;; Purpose: &quot;; [.I10]; &quot;; Capabilities: &quot;; [.J10]; &quot;; Outputs: &quot;; [.K10]; &quot;; Impacts: &quot;; [.L10])" table:style-name="ce12">
            <text:p>name: Oculus Rift; year: 2012; type: ; Military use: ; Civic use: ; Purpose: ; Capabilities: ; Outputs: ; Impacts:<text:s/></text:p>
          </table:table-cell>
          <table:table-cell office:value-type="string" table:style-name="ce1">
            <text:p>./assets/noun-virtual-headset-7137401.png</text:p>
          </table:table-cell>
          <table:table-cell office:value-type="string" table:style-name="ce1">
            <text:p>V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ololens</text:p>
          </table:table-cell>
          <table:table-cell office:value-type="string" table:style-name="ce1">
            <text:p>Hololens 2</text:p>
          </table:table-cell>
          <table:table-cell office:value-type="float" office:value="2016" table:style-name="ce1">
            <text:p>2016</text:p>
          </table:table-cell>
          <table:table-cell table:number-columns-repeated="9" table:style-name="ce1"/>
          <table:table-cell office:value-type="string" office:string-value="name: Hololens 2; year: 2016; type: ; Military use: ; Civic use: ; Purpose: ; Capabilities: ; Outputs: ; Impacts: " table:formula="of:= COM.MICROSOFT.CONCAT(&quot;name: &quot;; [.B11]; &quot;; year: &quot;;[.C11]; &quot;; type: &quot;; [.D11]; &quot;; Military use: &quot;; [.E11]; &quot;; Civic use: &quot;; [.F11]; &quot;; Purpose: &quot;; [.I11]; &quot;; Capabilities: &quot;; [.J11]; &quot;; Outputs: &quot;; [.K11]; &quot;; Impacts: &quot;; [.L11])" table:style-name="ce12">
            <text:p>name: Hololens 2; year: 2016; type: ; Military use: ; Civic use: ; Purpose: ; Capabilities: ; Outputs: ; Impacts:<text:s/></text:p>
          </table:table-cell>
          <table:table-cell office:value-type="string" table:style-name="ce1">
            <text:p>./assets/noun-virtual-headset-7137401.png</text:p>
          </table:table-cell>
          <table:table-cell office:value-type="string" table:style-name="ce1">
            <text:p>A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Vertex</text:p>
          </table:table-cell>
          <table:table-cell office:value-type="string" table:style-name="ce1">
            <text:p>Vertex</text:p>
          </table:table-cell>
          <table:table-cell office:value-type="float" office:value="2019" table:style-name="ce1">
            <text:p>2019</text:p>
          </table:table-cell>
          <table:table-cell table:number-columns-repeated="9" table:style-name="ce1"/>
          <table:table-cell office:value-type="string" office:string-value="name: Vertex; year: 2019; type: ; Military use: ; Civic use: ; Purpose: ; Capabilities: ; Outputs: ; Impacts: " table:formula="of:= COM.MICROSOFT.CONCAT(&quot;name: &quot;; [.B12]; &quot;; year: &quot;;[.C12]; &quot;; type: &quot;; [.D12]; &quot;; Military use: &quot;; [.E12]; &quot;; Civic use: &quot;; [.F12]; &quot;; Purpose: &quot;; [.I12]; &quot;; Capabilities: &quot;; [.J12]; &quot;; Outputs: &quot;; [.K12]; &quot;; Impacts: &quot;; [.L12])" table:style-name="ce12">
            <text:p>name: Vertex; year: 2019; type: ; Military use: ; Civic use: ; Purpose: ; Capabilities: ; Outputs: ; Impacts:<text:s/></text:p>
          </table:table-cell>
          <table:table-cell office:value-type="string" table:style-name="ce1">
            <text:p>./assets/noun-locked-cloud-5565062.png</text:p>
          </table:table-cell>
          <table:table-cell office:value-type="string" table:style-name="ce1">
            <text:p>clou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okemon</text:p>
          </table:table-cell>
          <table:table-cell office:value-type="string" table:style-name="ce1">
            <text:p>Pokemon Go</text:p>
          </table:table-cell>
          <table:table-cell office:value-type="float" office:value="2016" table:style-name="ce1">
            <text:p>2016</text:p>
          </table:table-cell>
          <table:table-cell table:number-columns-repeated="9" table:style-name="ce1"/>
          <table:table-cell office:value-type="string" office:string-value="name: Pokemon Go; year: 2016; type: ; Military use: ; Civic use: ; Purpose: ; Capabilities: ; Outputs: ; Impacts: " table:formula="of:= COM.MICROSOFT.CONCAT(&quot;name: &quot;; [.B13]; &quot;; year: &quot;;[.C13]; &quot;; type: &quot;; [.D13]; &quot;; Military use: &quot;; [.E13]; &quot;; Civic use: &quot;; [.F13]; &quot;; Purpose: &quot;; [.I13]; &quot;; Capabilities: &quot;; [.J13]; &quot;; Outputs: &quot;; [.K13]; &quot;; Impacts: &quot;; [.L13])" table:style-name="ce12">
            <text:p>name: Pokemon Go; year: 2016; type: ; Military use: ; Civic use: ; Purpose: ; Capabilities: ; Outputs: ; Impacts:<text:s/></text:p>
          </table:table-cell>
          <table:table-cell office:value-type="string" table:style-name="ce1">
            <text:p>./assets/noun-photogrammetry-4284363.png</text:p>
          </table:table-cell>
          <table:table-cell office:value-type="string" table:style-name="ce1">
            <text:p>gam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iri</text:p>
          </table:table-cell>
          <table:table-cell office:value-type="string" table:style-name="ce1">
            <text:p>Siri</text:p>
          </table:table-cell>
          <table:table-cell office:value-type="float" office:value="2011" table:style-name="ce1">
            <text:p>2011</text:p>
          </table:table-cell>
          <table:table-cell table:number-columns-repeated="9" table:style-name="ce1"/>
          <table:table-cell office:value-type="string" office:string-value="name: Siri; year: 2011; type: ; Military use: ; Civic use: ; Purpose: ; Capabilities: ; Outputs: ; Impacts: " table:formula="of:= COM.MICROSOFT.CONCAT(&quot;name: &quot;; [.B14]; &quot;; year: &quot;;[.C14]; &quot;; type: &quot;; [.D14]; &quot;; Military use: &quot;; [.E14]; &quot;; Civic use: &quot;; [.F14]; &quot;; Purpose: &quot;; [.I14]; &quot;; Capabilities: &quot;; [.J14]; &quot;; Outputs: &quot;; [.K14]; &quot;; Impacts: &quot;; [.L14])" table:style-name="ce12">
            <text:p>name: Siri; year: 2011; type: ; Military use: ; Civic use: ; Purpose: ; Capabilities: ; Outputs: ; Impacts:<text:s/></text:p>
          </table:table-cell>
          <table:table-cell office:value-type="string" table:style-name="ce1">
            <text:p>./assets/noun-chatbot-7107716.png</text:p>
          </table:table-cell>
          <table:table-cell office:value-type="string" table:style-name="ce1">
            <text:p>assista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edicare</text:p>
          </table:table-cell>
          <table:table-cell office:value-type="string" table:style-name="ce1">
            <text:p>US Medicare Fraud Detection (CMS)</text:p>
          </table:table-cell>
          <table:table-cell office:value-type="float" office:value="2023" table:style-name="ce1">
            <text:p>2023</text:p>
          </table:table-cell>
          <table:table-cell table:number-columns-repeated="9" table:style-name="ce1"/>
          <table:table-cell office:value-type="string" office:string-value="name: US Medicare Fraud Detection (CMS); year: 2023; type: ; Military use: ; Civic use: ; Purpose: ; Capabilities: ; Outputs: ; Impacts: " table:formula="of:= COM.MICROSOFT.CONCAT(&quot;name: &quot;; [.B15]; &quot;; year: &quot;;[.C15]; &quot;; type: &quot;; [.D15]; &quot;; Military use: &quot;; [.E15]; &quot;; Civic use: &quot;; [.F15]; &quot;; Purpose: &quot;; [.I15]; &quot;; Capabilities: &quot;; [.J15]; &quot;; Outputs: &quot;; [.K15]; &quot;; Impacts: &quot;; [.L15])" table:style-name="ce12">
            <text:p>name: US Medicare Fraud Detection (CMS); year: 2023; type: ; Military use: ; Civic use: ; Purpose: ; Capabilities: ; Outputs: ; Impacts:<text:s/></text:p>
          </table:table-cell>
          <table:table-cell office:value-type="string" table:style-name="ce1">
            <text:p>./assets/noun-health-insurance-7667596.png</text:p>
          </table:table-cell>
          <table:table-cell office:value-type="string" table:style-name="ce1">
            <text:p>syst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aypal</text:p>
          </table:table-cell>
          <table:table-cell office:value-type="string" table:style-name="ce1">
            <text:p>Paypal</text:p>
          </table:table-cell>
          <table:table-cell office:value-type="float" office:value="1998" table:style-name="ce1">
            <text:p>1998</text:p>
          </table:table-cell>
          <table:table-cell table:number-columns-repeated="9" table:style-name="ce1"/>
          <table:table-cell office:value-type="string" office:string-value="name: Paypal; year: 1998; type: ; Military use: ; Civic use: ; Purpose: ; Capabilities: ; Outputs: ; Impacts: " table:formula="of:= COM.MICROSOFT.CONCAT(&quot;name: &quot;; [.B16]; &quot;; year: &quot;;[.C16]; &quot;; type: &quot;; [.D16]; &quot;; Military use: &quot;; [.E16]; &quot;; Civic use: &quot;; [.F16]; &quot;; Purpose: &quot;; [.I16]; &quot;; Capabilities: &quot;; [.J16]; &quot;; Outputs: &quot;; [.K16]; &quot;; Impacts: &quot;; [.L16])" table:style-name="ce12">
            <text:p>name: Paypal; year: 1998; type: ; Military use: ; Civic use: ; Purpose: ; Capabilities: ; Outputs: ; Impacts:<text:s/></text:p>
          </table:table-cell>
          <table:table-cell office:value-type="string" table:style-name="ce16">
            <text:p>./assets/noun-software-industry-198331.png</text:p>
          </table:table-cell>
          <table:table-cell office:value-type="string" table:style-name="ce1">
            <text:p>platfor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otify</text:p>
          </table:table-cell>
          <table:table-cell office:value-type="string" table:style-name="ce1">
            <text:p>Spotify</text:p>
          </table:table-cell>
          <table:table-cell office:value-type="float" office:value="2006" table:style-name="ce1">
            <text:p>2006</text:p>
          </table:table-cell>
          <table:table-cell table:number-columns-repeated="9" table:style-name="ce1"/>
          <table:table-cell office:value-type="string" office:string-value="name: Spotify; year: 2006; type: ; Military use: ; Civic use: ; Purpose: ; Capabilities: ; Outputs: ; Impacts: " table:formula="of:= COM.MICROSOFT.CONCAT(&quot;name: &quot;; [.B17]; &quot;; year: &quot;;[.C17]; &quot;; type: &quot;; [.D17]; &quot;; Military use: &quot;; [.E17]; &quot;; Civic use: &quot;; [.F17]; &quot;; Purpose: &quot;; [.I17]; &quot;; Capabilities: &quot;; [.J17]; &quot;; Outputs: &quot;; [.K17]; &quot;; Impacts: &quot;; [.L17])" table:style-name="ce12">
            <text:p>name: Spotify; year: 2006; type: ; Military use: ; Civic use: ; Purpose: ; Capabilities: ; Outputs: ; Impacts:<text:s/></text:p>
          </table:table-cell>
          <table:table-cell office:value-type="string" table:style-name="ce1">
            <text:p>./assets/noun-social-media-platform-7481620.png</text:p>
          </table:table-cell>
          <table:table-cell office:value-type="string" table:style-name="ce1">
            <text:p>platfor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witter</text:p>
          </table:table-cell>
          <table:table-cell office:value-type="string" table:style-name="ce1">
            <text:p>Twitter/X</text:p>
          </table:table-cell>
          <table:table-cell office:value-type="float" office:value="2006" table:style-name="ce1">
            <text:p>2006</text:p>
          </table:table-cell>
          <table:table-cell table:number-columns-repeated="9" table:style-name="ce1"/>
          <table:table-cell office:value-type="string" office:string-value="name: Twitter/X; year: 2006; type: ; Military use: ; Civic use: ; Purpose: ; Capabilities: ; Outputs: ; Impacts: " table:formula="of:= COM.MICROSOFT.CONCAT(&quot;name: &quot;; [.B18]; &quot;; year: &quot;;[.C18]; &quot;; type: &quot;; [.D18]; &quot;; Military use: &quot;; [.E18]; &quot;; Civic use: &quot;; [.F18]; &quot;; Purpose: &quot;; [.I18]; &quot;; Capabilities: &quot;; [.J18]; &quot;; Outputs: &quot;; [.K18]; &quot;; Impacts: &quot;; [.L18])" table:style-name="ce12">
            <text:p>name: Twitter/X; year: 2006; type: ; Military use: ; Civic use: ; Purpose: ; Capabilities: ; Outputs: ; Impacts:<text:s/></text:p>
          </table:table-cell>
          <table:table-cell office:value-type="string" table:style-name="ce1">
            <text:p>./assets/noun-social-media-platform-7481620.png</text:p>
          </table:table-cell>
          <table:table-cell office:value-type="string" table:style-name="ce1">
            <text:p>platfor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ing</text:p>
          </table:table-cell>
          <table:table-cell office:value-type="string" table:style-name="ce1">
            <text:p>Ring</text:p>
          </table:table-cell>
          <table:table-cell office:value-type="float" office:value="2013" table:style-name="ce1">
            <text:p>2013</text:p>
          </table:table-cell>
          <table:table-cell table:number-columns-repeated="9" table:style-name="ce1"/>
          <table:table-cell office:value-type="string" office:string-value="name: Ring; year: 2013; type: ; Military use: ; Civic use: ; Purpose: ; Capabilities: ; Outputs: ; Impacts: " table:formula="of:= COM.MICROSOFT.CONCAT(&quot;name: &quot;; [.B19]; &quot;; year: &quot;;[.C19]; &quot;; type: &quot;; [.D19]; &quot;; Military use: &quot;; [.E19]; &quot;; Civic use: &quot;; [.F19]; &quot;; Purpose: &quot;; [.I19]; &quot;; Capabilities: &quot;; [.J19]; &quot;; Outputs: &quot;; [.K19]; &quot;; Impacts: &quot;; [.L19])" table:style-name="ce12">
            <text:p>name: Ring; year: 2013; type: ; Military use: ; Civic use: ; Purpose: ; Capabilities: ; Outputs: ; Impacts:<text:s/></text:p>
          </table:table-cell>
          <table:table-cell office:value-type="string" table:style-name="ce1">
            <text:p>./assets/noun-cctv-5477699.png</text:p>
          </table:table-cell>
          <table:table-cell office:value-type="string" table:style-name="ce1">
            <text:p>surveillanceCamer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itizen</text:p>
          </table:table-cell>
          <table:table-cell office:value-type="string" table:style-name="ce1">
            <text:p>Citizen</text:p>
          </table:table-cell>
          <table:table-cell office:value-type="float" office:value="2017" table:style-name="ce1">
            <text:p>2017</text:p>
          </table:table-cell>
          <table:table-cell table:number-columns-repeated="9" table:style-name="ce1"/>
          <table:table-cell office:value-type="string" office:string-value="name: Citizen; year: 2017; type: ; Military use: ; Civic use: ; Purpose: ; Capabilities: ; Outputs: ; Impacts: " table:formula="of:= COM.MICROSOFT.CONCAT(&quot;name: &quot;; [.B20]; &quot;; year: &quot;;[.C20]; &quot;; type: &quot;; [.D20]; &quot;; Military use: &quot;; [.E20]; &quot;; Civic use: &quot;; [.F20]; &quot;; Purpose: &quot;; [.I20]; &quot;; Capabilities: &quot;; [.J20]; &quot;; Outputs: &quot;; [.K20]; &quot;; Impacts: &quot;; [.L20])" table:style-name="ce12">
            <text:p>name: Citizen; year: 2017; type: ; Military use: ; Civic use: ; Purpose: ; Capabilities: ; Outputs: ; Impacts:<text:s/></text:p>
          </table:table-cell>
          <table:table-cell office:value-type="string" table:style-name="ce1">
            <text:p>./assets/noun-social-media-platform-7481620.png</text:p>
          </table:table-cell>
          <table:table-cell office:value-type="string" table:style-name="ce1">
            <text:p>platfor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utlier</text:p>
          </table:table-cell>
          <table:table-cell office:value-type="string" table:style-name="ce1">
            <text:p>Outlier &amp; Remotetasks</text:p>
          </table:table-cell>
          <table:table-cell office:value-type="float" office:value="2017" table:style-name="ce1">
            <text:p>2017</text:p>
          </table:table-cell>
          <table:table-cell table:number-columns-repeated="9" table:style-name="ce1"/>
          <table:table-cell office:value-type="string" office:string-value="name: Outlier &amp; Remotetasks; year: 2017; type: ; Military use: ; Civic use: ; Purpose: ; Capabilities: ; Outputs: ; Impacts: " table:formula="of:= COM.MICROSOFT.CONCAT(&quot;name: &quot;; [.B21]; &quot;; year: &quot;;[.C21]; &quot;; type: &quot;; [.D21]; &quot;; Military use: &quot;; [.E21]; &quot;; Civic use: &quot;; [.F21]; &quot;; Purpose: &quot;; [.I21]; &quot;; Capabilities: &quot;; [.J21]; &quot;; Outputs: &quot;; [.K21]; &quot;; Impacts: &quot;; [.L21])" table:style-name="ce12">
            <text:p>name: Outlier &amp; Remotetasks; year: 2017; type: ; Military use: ; Civic use: ; Purpose: ; Capabilities: ; Outputs: ; Impacts:<text:s/></text:p>
          </table:table-cell>
          <table:table-cell office:value-type="string" table:style-name="ce1">
            <text:p>./assets/noun-ai-training-data-2985134.png</text:p>
          </table:table-cell>
          <table:table-cell office:value-type="string" table:style-name="ce1">
            <text:p>trainingdatase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Neko</text:p>
          </table:table-cell>
          <table:table-cell office:value-type="string" table:style-name="ce1">
            <text:p>Neko Health</text:p>
          </table:table-cell>
          <table:table-cell office:value-type="float" office:value="2018" table:style-name="ce1">
            <text:p>2018</text:p>
          </table:table-cell>
          <table:table-cell table:number-columns-repeated="9" table:style-name="ce1"/>
          <table:table-cell office:value-type="string" office:string-value="name: Neko Health; year: 2018; type: ; Military use: ; Civic use: ; Purpose: ; Capabilities: ; Outputs: ; Impacts: " table:formula="of:= COM.MICROSOFT.CONCAT(&quot;name: &quot;; [.B22]; &quot;; year: &quot;;[.C22]; &quot;; type: &quot;; [.D22]; &quot;; Military use: &quot;; [.E22]; &quot;; Civic use: &quot;; [.F22]; &quot;; Purpose: &quot;; [.I22]; &quot;; Capabilities: &quot;; [.J22]; &quot;; Outputs: &quot;; [.K22]; &quot;; Impacts: &quot;; [.L22])" table:style-name="ce12">
            <text:p>name: Neko Health; year: 2018; type: ; Military use: ; Civic use: ; Purpose: ; Capabilities: ; Outputs: ; Impacts:<text:s/></text:p>
          </table:table-cell>
          <table:table-cell office:value-type="string" table:style-name="ce1">
            <text:p>./assets/noun-health-insurance-7667596.png</text:p>
          </table:table-cell>
          <table:table-cell office:value-type="string" table:style-name="ce1">
            <text:p>healthcar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stagram</text:p>
          </table:table-cell>
          <table:table-cell office:value-type="string" table:style-name="ce1">
            <text:p>Instagram</text:p>
          </table:table-cell>
          <table:table-cell office:value-type="float" office:value="2010" table:style-name="ce1">
            <text:p>2010</text:p>
          </table:table-cell>
          <table:table-cell table:number-columns-repeated="9" table:style-name="ce1"/>
          <table:table-cell office:value-type="string" office:string-value="name: Instagram; year: 2010; type: ; Military use: ; Civic use: ; Purpose: ; Capabilities: ; Outputs: ; Impacts: " table:formula="of:= COM.MICROSOFT.CONCAT(&quot;name: &quot;; [.B23]; &quot;; year: &quot;;[.C23]; &quot;; type: &quot;; [.D23]; &quot;; Military use: &quot;; [.E23]; &quot;; Civic use: &quot;; [.F23]; &quot;; Purpose: &quot;; [.I23]; &quot;; Capabilities: &quot;; [.J23]; &quot;; Outputs: &quot;; [.K23]; &quot;; Impacts: &quot;; [.L23])" table:style-name="ce12">
            <text:p>name: Instagram; year: 2010; type: ; Military use: ; Civic use: ; Purpose: ; Capabilities: ; Outputs: ; Impacts:<text:s/></text:p>
          </table:table-cell>
          <table:table-cell office:value-type="string" table:style-name="ce1">
            <text:p>./assets/noun-social-media-platform-7481620.png</text:p>
          </table:table-cell>
          <table:table-cell office:value-type="string" table:style-name="ce1">
            <text:p>platform</text:p>
          </table:table-cell>
          <table:table-cell table:number-columns-repeated="16369"/>
        </table:table-row>
        <table:table-row table:style-name="ro1">
          <table:table-cell table:number-columns-repeated="12" table:style-name="ce1"/>
          <table:table-cell table:style-name="ce12"/>
          <table:table-cell table:number-columns-repeated="16371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N_Historical" table:style-name="ta1">
        <table:table-column table:style-name="co2" table:number-columns-repeated="13" table:default-cell-style-name="ce1"/>
        <table:table-column table:style-name="co12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4">
            <text:p>id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year</text:p>
          </table:table-cell>
          <table:table-cell office:value-type="string" table:style-name="ce2">
            <text:p>currentStatus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militaryUse</text:p>
          </table:table-cell>
          <table:table-cell office:value-type="string" table:style-name="ce3">
            <text:p>civicUse</text:p>
          </table:table-cell>
          <table:table-cell office:value-type="string" table:style-name="ce3">
            <text:p>MLTask</text:p>
          </table:table-cell>
          <table:table-cell office:value-type="string" table:style-name="ce2">
            <text:p>purpose</text:p>
          </table:table-cell>
          <table:table-cell office:value-type="string" table:style-name="ce2">
            <text:p>capacity</text:p>
          </table:table-cell>
          <table:table-cell office:value-type="string" table:style-name="ce3">
            <text:p>output</text:p>
          </table:table-cell>
          <table:table-cell office:value-type="string" table:style-name="ce3">
            <text:p>impact</text:p>
          </table:table-cell>
          <table:table-cell office:value-type="string" table:style-name="ce4">
            <text:p>hover</text:p>
          </table:table-cell>
          <table:table-cell office:value-type="string" table:style-name="ce4">
            <text:p>image</text:p>
          </table:table-cell>
          <table:table-cell office:value-type="string" table:style-name="ce4">
            <text:p>nounKey</text:p>
          </table:table-cell>
          <table:table-cell table:number-columns-repeated="16369" table:style-name="ce4"/>
        </table:table-row>
        <table:table-row table:style-name="ro1">
          <table:table-cell office:value-type="string" table:style-name="ce1">
            <text:p>Dehomag</text:p>
          </table:table-cell>
          <table:table-cell office:value-type="string" table:style-name="ce1">
            <text:p>IBM Dehomag</text:p>
          </table:table-cell>
          <table:table-cell office:value-type="float" office:value="1933" table:style-name="ce1">
            <text:p>1933</text:p>
          </table:table-cell>
          <table:table-cell table:number-columns-repeated="9" table:style-name="ce1"/>
          <table:table-cell office:value-type="string" office:string-value="name: IBM Dehomag; year: 1933; type: ; Military use: ; Civic use: ; Purpose: ; Capabilities: ; Outputs: ; Impacts: " table:formula="of:= COM.MICROSOFT.CONCAT(&quot;name: &quot;; [.B2]; &quot;; year: &quot;;[.C2]; &quot;; type: &quot;; [.D2]; &quot;; Military use: &quot;; [.E2]; &quot;; Civic use: &quot;; [.F2]; &quot;; Purpose: &quot;; [.I2]; &quot;; Capabilities: &quot;; [.J2]; &quot;; Outputs: &quot;; [.K2]; &quot;; Impacts: &quot;; [.L2])" table:style-name="ce12">
            <text:p>name: IBM Dehomag; year: 1933; type: ; Military use: ; Civic use: ; Purpose: ; Capabilities: ; Outputs: ; Impacts:<text:s/></text:p>
          </table:table-cell>
          <table:table-cell office:value-type="string" table:style-name="ce1">
            <text:p>./assets/noun-punch-card-5134996.png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ranslator</text:p>
          </table:table-cell>
          <table:table-cell office:value-type="string" table:style-name="ce1">
            <text:p>IBM Simultaneous Translator</text:p>
          </table:table-cell>
          <table:table-cell office:value-type="float" office:value="1945" table:style-name="ce1">
            <text:p>1945</text:p>
          </table:table-cell>
          <table:table-cell table:number-columns-repeated="9" table:style-name="ce1"/>
          <table:table-cell office:value-type="string" office:string-value="name: IBM Simultaneous Translator; year: 1945; type: ; Military use: ; Civic use: ; Purpose: ; Capabilities: ; Outputs: ; Impacts: " table:formula="of:= COM.MICROSOFT.CONCAT(&quot;name: &quot;; [.B3]; &quot;; year: &quot;;[.C3]; &quot;; type: &quot;; [.D3]; &quot;; Military use: &quot;; [.E3]; &quot;; Civic use: &quot;; [.F3]; &quot;; Purpose: &quot;; [.I3]; &quot;; Capabilities: &quot;; [.J3]; &quot;; Outputs: &quot;; [.K3]; &quot;; Impacts: &quot;; [.L3])" table:style-name="ce12">
            <text:p>name: IBM Simultaneous Translator; year: 1945; type: ; Military use: ; Civic use: ; Purpose: ; Capabilities: ; Outputs: ; Impacts:<text:s/></text:p>
          </table:table-cell>
          <table:table-cell office:value-type="string" table:style-name="ce1">
            <text:p>./assets/noun-speech-recognition-1870316.png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ELIZA</text:p>
          </table:table-cell>
          <table:table-cell office:value-type="string" table:style-name="ce1">
            <text:p>ELIZA</text:p>
          </table:table-cell>
          <table:table-cell office:value-type="float" office:value="1966" table:style-name="ce1">
            <text:p>1966</text:p>
          </table:table-cell>
          <table:table-cell table:number-columns-repeated="9" table:style-name="ce1"/>
          <table:table-cell office:value-type="string" office:string-value="name: ELIZA; year: 1966; type: ; Military use: ; Civic use: ; Purpose: ; Capabilities: ; Outputs: ; Impacts: " table:formula="of:= COM.MICROSOFT.CONCAT(&quot;name: &quot;; [.B4]; &quot;; year: &quot;;[.C4]; &quot;; type: &quot;; [.D4]; &quot;; Military use: &quot;; [.E4]; &quot;; Civic use: &quot;; [.F4]; &quot;; Purpose: &quot;; [.I4]; &quot;; Capabilities: &quot;; [.J4]; &quot;; Outputs: &quot;; [.K4]; &quot;; Impacts: &quot;; [.L4])" table:style-name="ce12">
            <text:p>name: ELIZA; year: 1966; type: ; Military use: ; Civic use: ; Purpose: ; Capabilities: ; Outputs: ; Impacts:<text:s/></text:p>
          </table:table-cell>
          <table:table-cell office:value-type="string" table:style-name="ce1">
            <text:p>./assets/noun-chatbot-7107716.png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hoebox</text:p>
          </table:table-cell>
          <table:table-cell office:value-type="string" table:style-name="ce1">
            <text:p>Shoebox</text:p>
          </table:table-cell>
          <table:table-cell office:value-type="float" office:value="1964" table:style-name="ce1">
            <text:p>1964</text:p>
          </table:table-cell>
          <table:table-cell table:number-columns-repeated="9" table:style-name="ce1"/>
          <table:table-cell office:value-type="string" office:string-value="name: Shoebox; year: 1964; type: ; Military use: ; Civic use: ; Purpose: ; Capabilities: ; Outputs: ; Impacts: " table:formula="of:= COM.MICROSOFT.CONCAT(&quot;name: &quot;; [.B5]; &quot;; year: &quot;;[.C5]; &quot;; type: &quot;; [.D5]; &quot;; Military use: &quot;; [.E5]; &quot;; Civic use: &quot;; [.F5]; &quot;; Purpose: &quot;; [.I5]; &quot;; Capabilities: &quot;; [.J5]; &quot;; Outputs: &quot;; [.K5]; &quot;; Impacts: &quot;; [.L5])" table:style-name="ce12">
            <text:p>name: Shoebox; year: 1964; type: ; Military use: ; Civic use: ; Purpose: ; Capabilities: ; Outputs: ; Impacts:<text:s/></text:p>
          </table:table-cell>
          <table:table-cell office:value-type="string" table:style-name="ce1">
            <text:p>./assets/noun-speech-recognition-1870316.png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ARPANET</text:p>
          </table:table-cell>
          <table:table-cell office:value-type="string" table:style-name="ce1">
            <text:p>ARPANET</text:p>
          </table:table-cell>
          <table:table-cell office:value-type="float" office:value="1969" table:style-name="ce1">
            <text:p>1969</text:p>
          </table:table-cell>
          <table:table-cell table:number-columns-repeated="9" table:style-name="ce1"/>
          <table:table-cell office:value-type="string" office:string-value="name: ARPANET; year: 1969; type: ; Military use: ; Civic use: ; Purpose: ; Capabilities: ; Outputs: ; Impacts: " table:formula="of:= COM.MICROSOFT.CONCAT(&quot;name: &quot;; [.B6]; &quot;; year: &quot;;[.C6]; &quot;; type: &quot;; [.D6]; &quot;; Military use: &quot;; [.E6]; &quot;; Civic use: &quot;; [.F6]; &quot;; Purpose: &quot;; [.I6]; &quot;; Capabilities: &quot;; [.J6]; &quot;; Outputs: &quot;; [.K6]; &quot;; Impacts: &quot;; [.L6])" table:style-name="ce12">
            <text:p>name: ARPANET; year: 1969; type: ; Military use: ; Civic use: ; Purpose: ; Capabilities: ; Outputs: ; Impacts:<text:s/></text:p>
          </table:table-cell>
          <table:table-cell office:value-type="string" table:style-name="ce1">
            <text:p>./assets/noun-networking-2909312.png</text:p>
          </table:table-cell>
          <table:table-cell table:number-columns-repeated="16370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N_Stakeholders" table:style-name="ta1">
        <table:table-column table:style-name="co13" table:number-columns-repeated="3" table:default-cell-style-name="ce1"/>
        <table:table-column table:style-name="co4" table:number-columns-repeated="2" table:default-cell-style-name="ce1"/>
        <table:table-column table:style-name="co14" table:default-cell-style-name="ce16"/>
        <table:table-column table:style-name="co2" table:number-columns-repeated="16378" table:default-cell-style-name="ce1"/>
        <table:table-row table:style-name="ro1">
          <table:table-cell office:value-type="string" table:style-name="ce4">
            <text:p>id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airo:type</text:p>
          </table:table-cell>
          <table:table-cell office:value-type="string" table:style-name="ce4">
            <text:p>hover</text:p>
          </table:table-cell>
          <table:table-cell office:value-type="string" table:style-name="ce17">
            <text:p>image</text:p>
          </table:table-cell>
          <table:table-cell office:value-type="string" table:style-name="ce4">
            <text:p>people</text:p>
          </table:table-cell>
          <table:table-cell office:value-type="string" table:style-name="ce4">
            <text:p>details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1">
            <text:p>Palestine</text:p>
          </table:table-cell>
          <table:table-cell office:value-type="string" table:style-name="ce1">
            <text:p>Palestine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Subject</text:p>
          </table:table-cell>
          <table:table-cell office:value-type="string" office:string-value="name: Palestine; stakeholder: Nation; role: AISubject" table:formula="of:= COM.MICROSOFT.CONCAT(&quot;name: &quot;;[.B2]; &quot;; stakeholder: &quot;; [.C2]; &quot;; role: &quot;; [.D2])" table:style-name="ce12">
            <text:p>name: Palestine; stakeholder: Nation; role: AISubject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Deployer</text:p>
          </table:table-cell>
          <table:table-cell office:value-type="string" office:string-value="name: Israel; stakeholder: Nation; role: AIDeployer" table:formula="of:= COM.MICROSOFT.CONCAT(&quot;name: &quot;;[.B3]; &quot;; stakeholder: &quot;; [.C3]; &quot;; role: &quot;; [.D3])" table:style-name="ce12">
            <text:p>name: Israel; stakeholder: Nation; role: AIDeployer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Deployer</text:p>
          </table:table-cell>
          <table:table-cell office:value-type="string" office:string-value="name: United States; stakeholder: Nation; role: AIDeployer" table:formula="of:= COM.MICROSOFT.CONCAT(&quot;name: &quot;;[.B4]; &quot;; stakeholder: &quot;; [.C4]; &quot;; role: &quot;; [.D4])" table:style-name="ce12">
            <text:p>name: United States; stakeholder: Nation; role: AIDeployer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Deployer, AISubject</text:p>
          </table:table-cell>
          <table:table-cell office:value-type="string" office:string-value="name: Ukraine; stakeholder: Nation; role: AIDeployer, AISubject" table:formula="of:= COM.MICROSOFT.CONCAT(&quot;name: &quot;;[.B5]; &quot;; stakeholder: &quot;; [.C5]; &quot;; role: &quot;; [.D5])" table:style-name="ce12">
            <text:p>name: Ukraine; stakeholder: Nation; role: AIDeployer, AISubject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alantir</text:p>
          </table:table-cell>
          <table:table-cell office:value-type="string" table:style-name="ce1">
            <text:p>Palantir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Palantir; stakeholder: TechCompany; role: AIDeveloper" table:formula="of:= COM.MICROSOFT.CONCAT(&quot;name: &quot;;[.B6]; &quot;; stakeholder: &quot;; [.C6]; &quot;; role: &quot;; [.D6])" table:style-name="ce12">
            <text:p>name: Palantir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WS</text:p>
          </table:table-cell>
          <table:table-cell office:value-type="string" table:style-name="ce1">
            <text:p>Amazon Web Services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, AISupplier</text:p>
          </table:table-cell>
          <table:table-cell office:value-type="string" office:string-value="name: Amazon Web Services; stakeholder: TechCompany; role: AIDeveloper, AISupplier" table:formula="of:= COM.MICROSOFT.CONCAT(&quot;name: &quot;;[.B7]; &quot;; stakeholder: &quot;; [.C7]; &quot;; role: &quot;; [.D7])" table:style-name="ce12">
            <text:p>name: Amazon Web Services; stakeholder: TechCompany; role: AIDeveloper, AISuppli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ssia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Deployer, AISubject</text:p>
          </table:table-cell>
          <table:table-cell office:value-type="string" office:string-value="name: Russia; stakeholder: Nation; role: AIDeployer, AISubject" table:formula="of:= COM.MICROSOFT.CONCAT(&quot;name: &quot;;[.B8]; &quot;; stakeholder: &quot;; [.C8]; &quot;; role: &quot;; [.D8])" table:style-name="ce12">
            <text:p>name: Russia; stakeholder: Nation; role: AIDeployer, AISubject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yria</text:p>
          </table:table-cell>
          <table:table-cell office:value-type="string" table:style-name="ce1">
            <text:p>Syria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Subject</text:p>
          </table:table-cell>
          <table:table-cell office:value-type="string" office:string-value="name: Syria; stakeholder: Nation; role: AISubject" table:formula="of:= COM.MICROSOFT.CONCAT(&quot;name: &quot;;[.B9]; &quot;; stakeholder: &quot;; [.C9]; &quot;; role: &quot;; [.D9])" table:style-name="ce12">
            <text:p>name: Syria; stakeholder: Nation; role: AISubject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Deployer</text:p>
          </table:table-cell>
          <table:table-cell office:value-type="string" office:string-value="name: Germany; stakeholder: Nation; role: AIDeployer" table:formula="of:= COM.MICROSOFT.CONCAT(&quot;name: &quot;;[.B10]; &quot;; stakeholder: &quot;; [.C10]; &quot;; role: &quot;; [.D10])" table:style-name="ce12">
            <text:p>name: Germany; stakeholder: Nation; role: AIDeployer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heinmetall</text:p>
          </table:table-cell>
          <table:table-cell office:value-type="string" table:style-name="ce1">
            <text:p>Rheinmetall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Rheinmetall; stakeholder: DefenseCompany; role: AIDeveloper" table:formula="of:= COM.MICROSOFT.CONCAT(&quot;name: &quot;;[.B11]; &quot;; stakeholder: &quot;; [.C11]; &quot;; role: &quot;; [.D11])" table:style-name="ce12">
            <text:p>name: Rheinmetall; stakeholder: DefenseCompany; role: AIDevelop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ikvision</text:p>
          </table:table-cell>
          <table:table-cell office:value-type="string" table:style-name="ce1">
            <text:p>Hikvision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Hikvision; stakeholder: DefenseCompany; role: AIDeveloper" table:formula="of:= COM.MICROSOFT.CONCAT(&quot;name: &quot;;[.B12]; &quot;; stakeholder: &quot;; [.C12]; &quot;; role: &quot;; [.D12])" table:style-name="ce12">
            <text:p>name: Hikvision; stakeholder: DefenseCompany; role: AIDevelop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KH</text:p>
          </table:table-cell>
          <table:table-cell office:value-type="string" table:style-name="ce1">
            <text:p>TKH Security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TKH Security; stakeholder: DefenseCompany; role: AIDeveloper" table:formula="of:= COM.MICROSOFT.CONCAT(&quot;name: &quot;;[.B13]; &quot;; stakeholder: &quot;; [.C13]; &quot;; role: &quot;; [.D13])" table:style-name="ce12">
            <text:p>name: TKH Security; stakeholder: Defense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paceX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SpaceX; stakeholder: DefenseCompany; role: AIDeveloper" table:formula="of:= COM.MICROSOFT.CONCAT(&quot;name: &quot;;[.B14]; &quot;; stakeholder: &quot;; [.C14]; &quot;; role: &quot;; [.D14])" table:style-name="ce12">
            <text:p>name: SpaceX; stakeholder: DefenseCompany; role: AIDevelop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Deployer</text:p>
          </table:table-cell>
          <table:table-cell office:value-type="string" office:string-value="name: India; stakeholder: Nation; role: AIDeployer" table:formula="of:= COM.MICROSOFT.CONCAT(&quot;name: &quot;;[.B15]; &quot;; stakeholder: &quot;; [.C15]; &quot;; role: &quot;; [.D15])" table:style-name="ce12">
            <text:p>name: India; stakeholder: Nation; role: AIDeployer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afael</text:p>
          </table:table-cell>
          <table:table-cell office:value-type="string" table:style-name="ce1">
            <text:p>Rafael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Rafael; stakeholder: DefenseCompany; role: AIDeveloper" table:formula="of:= COM.MICROSOFT.CONCAT(&quot;name: &quot;;[.B16]; &quot;; stakeholder: &quot;; [.C16]; &quot;; role: &quot;; [.D16])" table:style-name="ce12">
            <text:p>name: Rafael; stakeholder: DefenseCompany; role: AIDevelop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lbit</text:p>
          </table:table-cell>
          <table:table-cell office:value-type="string" table:style-name="ce1">
            <text:p>Elbit Systems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Elbit Systems; stakeholder: DefenseCompany; role: AIDeveloper" table:formula="of:= COM.MICROSOFT.CONCAT(&quot;name: &quot;;[.B17]; &quot;; stakeholder: &quot;; [.C17]; &quot;; role: &quot;; [.D17])" table:style-name="ce12">
            <text:p>name: Elbit Systems; stakeholder: DefenseCompany; role: AIDevelop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azon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, AIProvider</text:p>
          </table:table-cell>
          <table:table-cell office:value-type="string" office:string-value="name: Amazon; stakeholder: TechCompany; role: AIDeveloper, AIProvider" table:formula="of:= COM.MICROSOFT.CONCAT(&quot;name: &quot;;[.B18]; &quot;; stakeholder: &quot;; [.C18]; &quot;; role: &quot;; [.D18])" table:style-name="ce12">
            <text:p>name: Amazon; stakeholder: TechCompany; role: AIDeveloper, AIProvid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ogle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, AIProvider</text:p>
          </table:table-cell>
          <table:table-cell office:value-type="string" office:string-value="name: Google; stakeholder: TechCompany; role: AIDeveloper, AIProvider" table:formula="of:= COM.MICROSOFT.CONCAT(&quot;name: &quot;;[.B19]; &quot;; stakeholder: &quot;; [.C19]; &quot;; role: &quot;; [.D19])" table:style-name="ce12">
            <text:p>name: Google; stakeholder: TechCompany; role: AIDeveloper, AIProvid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phabet</text:p>
          </table:table-cell>
          <table:table-cell office:value-type="string" table:style-name="ce1">
            <text:p>Alphabet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, AIProvider</text:p>
          </table:table-cell>
          <table:table-cell office:value-type="string" office:string-value="name: Alphabet; stakeholder: TechCompany; role: AIDeveloper, AIProvider" table:formula="of:= COM.MICROSOFT.CONCAT(&quot;name: &quot;;[.B20]; &quot;; stakeholder: &quot;; [.C20]; &quot;; role: &quot;; [.D20])" table:style-name="ce12">
            <text:p>name: Alphabet; stakeholder: TechCompany; role: AIDeveloper, AIProvid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acle</text:p>
          </table:table-cell>
          <table:table-cell office:value-type="string" table:style-name="ce1">
            <text:p>Oracle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, AIProvider</text:p>
          </table:table-cell>
          <table:table-cell office:value-type="string" office:string-value="name: Oracle; stakeholder: TechCompany; role: AIDeveloper, AIProvider" table:formula="of:= COM.MICROSOFT.CONCAT(&quot;name: &quot;;[.B21]; &quot;; stakeholder: &quot;; [.C21]; &quot;; role: &quot;; [.D21])" table:style-name="ce12">
            <text:p>name: Oracle; stakeholder: TechCompany; role: AIDeveloper, AIProvid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M</text:p>
          </table:table-cell>
          <table:table-cell office:value-type="string" table:style-name="ce1">
            <text:p>IBM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, AIProvider</text:p>
          </table:table-cell>
          <table:table-cell office:value-type="string" office:string-value="name: IBM; stakeholder: TechCompany; role: AIDeveloper, AIProvider" table:formula="of:= COM.MICROSOFT.CONCAT(&quot;name: &quot;;[.B22]; &quot;; stakeholder: &quot;; [.C22]; &quot;; role: &quot;; [.D22])" table:style-name="ce12">
            <text:p>name: IBM; stakeholder: TechCompany; role: AIDeveloper, AIProvid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by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Deployer</text:p>
          </table:table-cell>
          <table:table-cell office:value-type="string" office:string-value="name: Libya; stakeholder: Nation; role: AIDeployer" table:formula="of:= COM.MICROSOFT.CONCAT(&quot;name: &quot;;[.B23]; &quot;; stakeholder: &quot;; [.C23]; &quot;; role: &quot;; [.D23])" table:style-name="ce12">
            <text:p>name: Libya; stakeholder: Nation; role: AIDeployer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zerbaijan</text:p>
          </table:table-cell>
          <table:table-cell office:value-type="string" table:style-name="ce1">
            <text:p>Azerbaijan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Deployer</text:p>
          </table:table-cell>
          <table:table-cell office:value-type="string" office:string-value="name: Azerbaijan; stakeholder: Nation; role: AIDeployer" table:formula="of:= COM.MICROSOFT.CONCAT(&quot;name: &quot;;[.B24]; &quot;; stakeholder: &quot;; [.C24]; &quot;; role: &quot;; [.D24])" table:style-name="ce12">
            <text:p>name: Azerbaijan; stakeholder: Nation; role: AIDeployer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urkey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Deployer</text:p>
          </table:table-cell>
          <table:table-cell office:value-type="string" office:string-value="name: Turkey; stakeholder: Nation; role: AIDeployer" table:formula="of:= COM.MICROSOFT.CONCAT(&quot;name: &quot;;[.B25]; &quot;; stakeholder: &quot;; [.C25]; &quot;; role: &quot;; [.D25])" table:style-name="ce12">
            <text:p>name: Turkey; stakeholder: Nation; role: AIDeployer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K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Deployer</text:p>
          </table:table-cell>
          <table:table-cell office:value-type="string" office:string-value="name: United Kingdom; stakeholder: Nation; role: AIDeployer" table:formula="of:= COM.MICROSOFT.CONCAT(&quot;name: &quot;;[.B26]; &quot;; stakeholder: &quot;; [.C26]; &quot;; role: &quot;; [.D26])" table:style-name="ce12">
            <text:p>name: United Kingdom; stakeholder: Nation; role: AIDeployer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yriy</text:p>
          </table:table-cell>
          <table:table-cell office:value-type="string" table:style-name="ce1">
            <text:p>Vyriy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Vyriy; stakeholder: DefenseCompany; role: AIDeveloper" table:formula="of:= COM.MICROSOFT.CONCAT(&quot;name: &quot;;[.B27]; &quot;; stakeholder: &quot;; [.C27]; &quot;; role: &quot;; [.D27])" table:style-name="ce12">
            <text:p>name: Vyriy; stakeholder: DefenseCompany; role: AIDeveloper</text:p>
          </table:table-cell>
          <table:table-cell office:value-type="string" table:style-name="ce16">
            <text:p>./assets/noun-research-center-198322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boneers</text:p>
          </table:table-cell>
          <table:table-cell office:value-type="string" table:style-name="ce1">
            <text:p>Roboneers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Roboneers; stakeholder: DefenseCompany; role: AIDeveloper" table:formula="of:= COM.MICROSOFT.CONCAT(&quot;name: &quot;;[.B28]; &quot;; stakeholder: &quot;; [.C28]; &quot;; role: &quot;; [.D28])" table:style-name="ce12">
            <text:p>name: Roboneers; stakeholder: DefenseCompany; role: AIDeveloper</text:p>
          </table:table-cell>
          <table:table-cell office:value-type="string" table:style-name="ce16">
            <text:p>./assets/noun-research-center-198322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3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D3; stakeholder: DefenseCompany; role: AIDeveloper" table:formula="of:= COM.MICROSOFT.CONCAT(&quot;name: &quot;;[.B29]; &quot;; stakeholder: &quot;; [.C29]; &quot;; role: &quot;; [.D29])" table:style-name="ce12">
            <text:p>name: D3; stakeholder: DefenseCompany; role: AIDeveloper</text:p>
          </table:table-cell>
          <table:table-cell office:value-type="string" table:style-name="ce16">
            <text:p>./assets/noun-research-center-198322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lsing</text:p>
          </table:table-cell>
          <table:table-cell office:value-type="string" table:style-name="ce1">
            <text:p>Helsing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Helsing; stakeholder: DefenseCompany; role: AIDeveloper" table:formula="of:= COM.MICROSOFT.CONCAT(&quot;name: &quot;;[.B30]; &quot;; stakeholder: &quot;; [.C30]; &quot;; role: &quot;; [.D30])" table:style-name="ce12">
            <text:p>name: Helsing; stakeholder: DefenseCompany; role: AIDeveloper</text:p>
          </table:table-cell>
          <table:table-cell office:value-type="string" table:style-name="ce16">
            <text:p>./assets/noun-museum-198296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G</text:p>
          </table:table-cell>
          <table:table-cell office:value-type="string" table:style-name="ce1">
            <text:p>PG Robotics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PG Robotics; stakeholder: DefenseCompany; role: AIDeveloper" table:formula="of:= COM.MICROSOFT.CONCAT(&quot;name: &quot;;[.B31]; &quot;; stakeholder: &quot;; [.C31]; &quot;; role: &quot;; [.D31])" table:style-name="ce12">
            <text:p>name: PG Robotics; stakeholder: DefenseCompany; role: AIDevelop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kyeton</text:p>
          </table:table-cell>
          <table:table-cell office:value-type="string" table:style-name="ce1">
            <text:p>Skyeton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Skyeton; stakeholder: DefenseCompany; role: AIDeveloper" table:formula="of:= COM.MICROSOFT.CONCAT(&quot;name: &quot;;[.B32]; &quot;; stakeholder: &quot;; [.C32]; &quot;; role: &quot;; [.D32])" table:style-name="ce12">
            <text:p>name: Skyeton; stakeholder: DefenseCompany; role: AIDevelop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armer</text:p>
          </table:table-cell>
          <table:table-cell office:value-type="string" table:style-name="ce1">
            <text:p>Swarmer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Swarmer; stakeholder: DefenseCompany; role: AIDeveloper" table:formula="of:= COM.MICROSOFT.CONCAT(&quot;name: &quot;;[.B33]; &quot;; stakeholder: &quot;; [.C33]; &quot;; role: &quot;; [.D33])" table:style-name="ce12">
            <text:p>name: Swarmer; stakeholder: DefenseCompany; role: AIDevelop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earviewAI</text:p>
          </table:table-cell>
          <table:table-cell office:value-type="string" table:style-name="ce1">
            <text:p>Clearview AI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Clearview AI; stakeholder: TechCompany; role: AIDeveloper" table:formula="of:= COM.MICROSOFT.CONCAT(&quot;name: &quot;;[.B34]; &quot;; stakeholder: &quot;; [.C34]; &quot;; role: &quot;; [.D34])" table:style-name="ce12">
            <text:p>name: Clearview AI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esage</text:p>
          </table:table-cell>
          <table:table-cell office:value-type="string" table:style-name="ce1">
            <text:p>Presage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AIDeveloper</text:p>
          </table:table-cell>
          <table:table-cell office:value-type="string" office:string-value="name: Presage; stakeholder: Company; role: AIDeveloper" table:formula="of:= COM.MICROSOFT.CONCAT(&quot;name: &quot;;[.B35]; &quot;; stakeholder: &quot;; [.C35]; &quot;; role: &quot;; [.D35])" table:style-name="ce12">
            <text:p>name: Presage; stakeholder: Company; role: AIDeveloper</text:p>
          </table:table-cell>
          <table:table-cell office:value-type="string" table:style-name="ce16">
            <text:p>./assets/noun-research-center-198322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tec</text:p>
          </table:table-cell>
          <table:table-cell office:value-type="string" table:style-name="ce1">
            <text:p>Altec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AIDeveloper</text:p>
          </table:table-cell>
          <table:table-cell office:value-type="string" office:string-value="name: Altec; stakeholder: Company; role: AIDeveloper" table:formula="of:= COM.MICROSOFT.CONCAT(&quot;name: &quot;;[.B36]; &quot;; stakeholder: &quot;; [.C36]; &quot;; role: &quot;; [.D36])" table:style-name="ce12">
            <text:p>name: Altec; stakeholder: Company; role: AIDeveloper</text:p>
          </table:table-cell>
          <table:table-cell office:value-type="string" table:style-name="ce16">
            <text:p>./assets/noun-research-center-198322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antic</text:p>
          </table:table-cell>
          <table:table-cell office:value-type="string" table:style-name="ce1">
            <text:p>Niantic Spatial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Niantic Spatial; stakeholder: TechCompany; role: AIDeveloper" table:formula="of:= COM.MICROSOFT.CONCAT(&quot;name: &quot;;[.B37]; &quot;; stakeholder: &quot;; [.C37]; &quot;; role: &quot;; [.D37])" table:style-name="ce12">
            <text:p>name: Niantic Spatial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lington</text:p>
          </table:table-cell>
          <table:table-cell office:value-type="string" table:style-name="ce1">
            <text:p>Arlington Capital</text:p>
          </table:table-cell>
          <table:table-cell office:value-type="string" table:style-name="ce1">
            <text:p>Investor</text:p>
          </table:table-cell>
          <table:table-cell office:value-type="string" table:style-name="ce1">
            <text:p>AIDeveloper</text:p>
          </table:table-cell>
          <table:table-cell office:value-type="string" office:string-value="name: Arlington Capital; stakeholder: Investor; role: AIDeveloper" table:formula="of:= COM.MICROSOFT.CONCAT(&quot;name: &quot;;[.B38]; &quot;; stakeholder: &quot;; [.C38]; &quot;; role: &quot;; [.D38])" table:style-name="ce12">
            <text:p>name: Arlington Capital; stakeholder: Investor; role: AIDeveloper</text:p>
          </table:table-cell>
          <table:table-cell office:value-type="string" table:style-name="ce16">
            <text:p>./assets/noun-museum-198296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rdan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Deployer</text:p>
          </table:table-cell>
          <table:table-cell office:value-type="string" office:string-value="name: Jordan; stakeholder: Nation; role: AIDeployer" table:formula="of:= COM.MICROSOFT.CONCAT(&quot;name: &quot;;[.B39]; &quot;; stakeholder: &quot;; [.C39]; &quot;; role: &quot;; [.D39])" table:style-name="ce12">
            <text:p>name: Jordan; stakeholder: Nation; role: AIDeployer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uthKorea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Deployer</text:p>
          </table:table-cell>
          <table:table-cell office:value-type="string" office:string-value="name: South Korea; stakeholder: Nation; role: AIDeployer" table:formula="of:= COM.MICROSOFT.CONCAT(&quot;name: &quot;;[.B40]; &quot;; stakeholder: &quot;; [.C40]; &quot;; role: &quot;; [.D40])" table:style-name="ce12">
            <text:p>name: South Korea; stakeholder: Nation; role: AIDeployer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Deployer</text:p>
          </table:table-cell>
          <table:table-cell office:value-type="string" office:string-value="name: China; stakeholder: Nation; role: AIDeployer" table:formula="of:= COM.MICROSOFT.CONCAT(&quot;name: &quot;;[.B41]; &quot;; stakeholder: &quot;; [.C41]; &quot;; role: &quot;; [.D41])" table:style-name="ce12">
            <text:p>name: China; stakeholder: Nation; role: AIDeployer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SO</text:p>
          </table:table-cell>
          <table:table-cell office:value-type="string" table:style-name="ce1">
            <text:p>NSO Group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NSO Group; stakeholder: DefenseCompany; role: AIDeveloper" table:formula="of:= COM.MICROSOFT.CONCAT(&quot;name: &quot;;[.B42]; &quot;; stakeholder: &quot;; [.C42]; &quot;; role: &quot;; [.D42])" table:style-name="ce12">
            <text:p>name: NSO Group; stakeholder: Defense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t8200</text:p>
          </table:table-cell>
          <table:table-cell office:value-type="string" table:style-name="ce1">
            <text:p>Unit 8200</text:p>
          </table:table-cell>
          <table:table-cell office:value-type="string" table:style-name="ce1">
            <text:p>Military</text:p>
          </table:table-cell>
          <table:table-cell office:value-type="string" table:style-name="ce1">
            <text:p>AIDeveloper</text:p>
          </table:table-cell>
          <table:table-cell office:value-type="string" office:string-value="name: Unit 8200; stakeholder: Military; role: AIDeveloper" table:formula="of:= COM.MICROSOFT.CONCAT(&quot;name: &quot;;[.B43]; &quot;; stakeholder: &quot;; [.C43]; &quot;; role: &quot;; [.D43])" table:style-name="ce12">
            <text:p>name: Unit 8200; stakeholder: Military; role: AIDeveloper</text:p>
          </table:table-cell>
          <table:table-cell office:value-type="string" table:style-name="ce1">
            <text:p>./assets/noun-locked-location-198286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RPA</text:p>
          </table:table-cell>
          <table:table-cell office:value-type="string" table:style-name="ce1">
            <text:p>DARPA</text:p>
          </table:table-cell>
          <table:table-cell office:value-type="string" table:style-name="ce1">
            <text:p>Military</text:p>
          </table:table-cell>
          <table:table-cell office:value-type="string" table:style-name="ce1">
            <text:p>AIDeveloper</text:p>
          </table:table-cell>
          <table:table-cell office:value-type="string" office:string-value="name: DARPA; stakeholder: Military; role: AIDeveloper" table:formula="of:= COM.MICROSOFT.CONCAT(&quot;name: &quot;;[.B44]; &quot;; stakeholder: &quot;; [.C44]; &quot;; role: &quot;; [.D44])" table:style-name="ce12">
            <text:p>name: DARPA; stakeholder: Military; role: AIDeveloper</text:p>
          </table:table-cell>
          <table:table-cell office:value-type="string" table:style-name="ce1">
            <text:p>./assets/noun-locked-location-198286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crosoft</text:p>
          </table:table-cell>
          <table:table-cell office:value-type="string" table:style-name="ce1">
            <text:p>Microsoft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Microsoft; stakeholder: TechCompany; role: AIDeveloper" table:formula="of:= COM.MICROSOFT.CONCAT(&quot;name: &quot;;[.B45]; &quot;; stakeholder: &quot;; [.C45]; &quot;; role: &quot;; [.D45])" table:style-name="ce12">
            <text:p>name: Microsoft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RI</text:p>
          </table:table-cell>
          <table:table-cell office:value-type="string" table:style-name="ce1">
            <text:p>SRI: Stanford Research Institute</text:p>
          </table:table-cell>
          <table:table-cell office:value-type="string" table:style-name="ce1">
            <text:p>Institution</text:p>
          </table:table-cell>
          <table:table-cell office:value-type="string" table:style-name="ce1">
            <text:p>AIDeveloper</text:p>
          </table:table-cell>
          <table:table-cell office:value-type="string" office:string-value="name: SRI: Stanford Research Institute; stakeholder: Institution; role: AIDeveloper" table:formula="of:= COM.MICROSOFT.CONCAT(&quot;name: &quot;;[.B46]; &quot;; stakeholder: &quot;; [.C46]; &quot;; role: &quot;; [.D46])" table:style-name="ce12">
            <text:p>name: SRI: Stanford Research Institute; stakeholder: Institution; role: AIDeveloper</text:p>
          </table:table-cell>
          <table:table-cell office:value-type="string" table:style-name="ce16">
            <text:p>./assets/noun-research-center-198322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yonggiUniversity</text:p>
          </table:table-cell>
          <table:table-cell office:value-type="string" table:style-name="ce1">
            <text:p>Kyonggi University</text:p>
          </table:table-cell>
          <table:table-cell office:value-type="string" table:style-name="ce1">
            <text:p>Institution</text:p>
          </table:table-cell>
          <table:table-cell office:value-type="string" table:style-name="ce1">
            <text:p>AIDeveloper</text:p>
          </table:table-cell>
          <table:table-cell office:value-type="string" office:string-value="name: Kyonggi University; stakeholder: Institution; role: AIDeveloper" table:formula="of:= COM.MICROSOFT.CONCAT(&quot;name: &quot;;[.B47]; &quot;; stakeholder: &quot;; [.C47]; &quot;; role: &quot;; [.D47])" table:style-name="ce12">
            <text:p>name: Kyonggi University; stakeholder: Institution; role: AIDeveloper</text:p>
          </table:table-cell>
          <table:table-cell office:value-type="string" table:style-name="ce16">
            <text:p>./assets/noun-research-center-198322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nwhaTechwin-Samsung</text:p>
          </table:table-cell>
          <table:table-cell office:value-type="string" table:style-name="ce1">
            <text:p>Hanwha Techwin (formerly Samsung)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Hanwha Techwin (formerly Samsung); stakeholder: DefenseCompany; role: AIDeveloper" table:formula="of:= COM.MICROSOFT.CONCAT(&quot;name: &quot;;[.B48]; &quot;; stakeholder: &quot;; [.C48]; &quot;; role: &quot;; [.D48])" table:style-name="ce12">
            <text:p>name: Hanwha Techwin (formerly Samsung); stakeholder: DefenseCompany; role: AIDevelop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DAAM</text:p>
          </table:table-cell>
          <table:table-cell office:value-type="string" table:style-name="ce1">
            <text:p>DoDAAM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DoDAAM; stakeholder: DefenseCompany; role: AIDeveloper" table:formula="of:= COM.MICROSOFT.CONCAT(&quot;name: &quot;;[.B49]; &quot;; stakeholder: &quot;; [.C49]; &quot;; role: &quot;; [.D49])" table:style-name="ce12">
            <text:p>name: DoDAAM; stakeholder: DefenseCompany; role: AIDevelop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wissInstitute</text:p>
          </table:table-cell>
          <table:table-cell office:value-type="string" table:style-name="ce1">
            <text:p>Swiss Institute</text:p>
          </table:table-cell>
          <table:table-cell office:value-type="string" table:style-name="ce1">
            <text:p>Institution</text:p>
          </table:table-cell>
          <table:table-cell office:value-type="string" table:style-name="ce1">
            <text:p>AIDeveloper</text:p>
          </table:table-cell>
          <table:table-cell office:value-type="string" office:string-value="name: Swiss Institute; stakeholder: Institution; role: AIDeveloper" table:formula="of:= COM.MICROSOFT.CONCAT(&quot;name: &quot;;[.B50]; &quot;; stakeholder: &quot;; [.C50]; &quot;; role: &quot;; [.D50])" table:style-name="ce12">
            <text:p>name: Swiss Institute; stakeholder: Institution; role: AIDeveloper</text:p>
          </table:table-cell>
          <table:table-cell office:value-type="string" table:style-name="ce16">
            <text:p>./assets/noun-research-center-198322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NHCR</text:p>
          </table:table-cell>
          <table:table-cell office:value-type="string" table:style-name="ce1">
            <text:p>UNHCR</text:p>
          </table:table-cell>
          <table:table-cell office:value-type="string" table:style-name="ce1">
            <text:p>Military</text:p>
          </table:table-cell>
          <table:table-cell office:value-type="string" table:style-name="ce1">
            <text:p>AIDeveloper</text:p>
          </table:table-cell>
          <table:table-cell office:value-type="string" office:string-value="name: UNHCR; stakeholder: Military; role: AIDeveloper; notes:The Office of the United Nations High Commissioner for Refugees is a United Nations agency mandated to aid and protect refugees, forcibly displaced communities, and stateless people, and to assist in their voluntary repatriation, local integration or resettlement to a third country. (Wikipedia)" table:formula="of:= COM.MICROSOFT.CONCAT(&quot;name: &quot;;[.B51]; &quot;; stakeholder: &quot;; [.C51]; &quot;; role: &quot;; [.D51]; &quot;; notes:&quot;; [.G51])" table:style-name="ce12">
            <text:p>name: UNHCR; stakeholder: Military; role: AIDeveloper; notes:The Office of the United Nations High Commissioner for Refugees is a United Nations agency mandated to aid and protect refugees, forcibly displaced communities, and stateless people, and to assist in their voluntary repatriation, local integration or resettlement to a third country. (Wikipedia)</text:p>
          </table:table-cell>
          <table:table-cell office:value-type="string" table:style-name="ce16">
            <text:p>./assets/noun-museum-198296.png</text:p>
          </table:table-cell>
          <table:table-cell office:value-type="string" table:style-name="ce1">
            <text:p>The Office of the United Nations High Commissioner for Refugees is a United Nations agency mandated to aid and protect refugees, forcibly displaced communities, and stateless people, and to assist in their voluntary repatriation, local integration or resettlement to a third country. (Wikipedia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KDSTL</text:p>
          </table:table-cell>
          <table:table-cell office:value-type="string" table:style-name="ce1">
            <text:p>UKDSTL</text:p>
          </table:table-cell>
          <table:table-cell office:value-type="string" table:style-name="ce1">
            <text:p>Military</text:p>
          </table:table-cell>
          <table:table-cell office:value-type="string" table:style-name="ce1">
            <text:p>AIDeveloper</text:p>
          </table:table-cell>
          <table:table-cell office:value-type="string" office:string-value="name: UK Defence Science and Technology Laboratory; stakeholder: Military; role: AIDeveloper" table:formula="of:= COM.MICROSOFT.CONCAT(&quot;name: &quot;; &quot;UK Defence Science and Technology Laboratory&quot;; &quot;; stakeholder: &quot;; [.C52]; &quot;; role: &quot;; [.D52])" table:style-name="ce12">
            <text:p>name: UK Defence Science and Technology Laboratory; stakeholder: Military; role: AIDeveloper</text:p>
          </table:table-cell>
          <table:table-cell office:value-type="string" table:style-name="ce1">
            <text:p>./assets/noun-locked-location-198286.png</text:p>
          </table:table-cell>
          <table:table-cell office:value-type="string" table:style-name="ce1">
            <text:p>UK Defence Science and Technology Laborator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inetiQ</text:p>
          </table:table-cell>
          <table:table-cell office:value-type="string" table:style-name="ce1">
            <text:p>QinetiQ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QinetiQ; stakeholder: DefenseCompany; role: AIDeveloper" table:formula="of:= COM.MICROSOFT.CONCAT(&quot;name: &quot;;[.B53]; &quot;; stakeholder: &quot;; [.C53]; &quot;; role: &quot;; [.D53])" table:style-name="ce12">
            <text:p>name: QinetiQ; stakeholder: DefenseCompany; role: AIDevelop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KDES</text:p>
          </table:table-cell>
          <table:table-cell office:value-type="string" table:style-name="ce1">
            <text:p>UKDE&amp;S</text:p>
          </table:table-cell>
          <table:table-cell office:value-type="string" table:style-name="ce1">
            <text:p>Military</text:p>
          </table:table-cell>
          <table:table-cell office:value-type="string" table:style-name="ce1">
            <text:p>AIDeveloper</text:p>
          </table:table-cell>
          <table:table-cell office:value-type="string" office:string-value="name: UK Defense Equipment and Support; stakeholder: Military; role: AIDeveloper" table:formula="of:= COM.MICROSOFT.CONCAT(&quot;name: &quot;; &quot;UK Defense Equipment and Support&quot;; &quot;; stakeholder: &quot;; [.C54]; &quot;; role: &quot;; [.D54])" table:style-name="ce12">
            <text:p>name: UK Defense Equipment and Support; stakeholder: Military; role: AIDeveloper</text:p>
          </table:table-cell>
          <table:table-cell office:value-type="string" table:style-name="ce1">
            <text:p>./assets/noun-locked-location-198286.png</text:p>
          </table:table-cell>
          <table:table-cell office:value-type="string" table:style-name="ce1">
            <text:p>UK Defense Equipment and Sup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deavor</text:p>
          </table:table-cell>
          <table:table-cell office:value-type="string" table:style-name="ce1">
            <text:p>Endeavor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Endeavor; stakeholder: TechCompany; role: AIDevelopernotes: formerly iRobot, sold to FLIR Systems (Teledyne) 2019" table:formula="of:= COM.MICROSOFT.CONCAT(&quot;name: &quot;;[.B55]; &quot;; stakeholder: &quot;; [.C55]; &quot;; role: &quot;; [.D55]; &quot;notes: &quot;; [.G55])" table:style-name="ce12">
            <text:p>name: Endeavor; stakeholder: TechCompany; role: AIDevelopernotes: formerly iRobot, sold to FLIR Systems (Teledyne) 2019</text:p>
          </table:table-cell>
          <table:table-cell office:value-type="string" table:style-name="ce16">
            <text:p>./assets/noun-software-industry-198331.png</text:p>
          </table:table-cell>
          <table:table-cell office:value-type="string" table:style-name="ce1">
            <text:p>formerly iRobot, sold to FLIR Systems (Teledyne) 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ackRock</text:p>
          </table:table-cell>
          <table:table-cell office:value-type="string" table:style-name="ce1">
            <text:p>BlackRock</text:p>
          </table:table-cell>
          <table:table-cell office:value-type="string" table:style-name="ce1">
            <text:p>Investor</text:p>
          </table:table-cell>
          <table:table-cell office:value-type="string" table:style-name="ce1">
            <text:p>AIDeveloper</text:p>
          </table:table-cell>
          <table:table-cell office:value-type="string" office:string-value="name: BlackRock; stakeholder: Investor; role: AIDeveloper" table:formula="of:= COM.MICROSOFT.CONCAT(&quot;name: &quot;;[.B56]; &quot;; stakeholder: &quot;; [.C56]; &quot;; role: &quot;; [.D56])" table:style-name="ce12">
            <text:p>name: BlackRock; stakeholder: Investor; role: AIDeveloper</text:p>
          </table:table-cell>
          <table:table-cell office:value-type="string" table:style-name="ce16">
            <text:p>./assets/noun-museum-198296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tanford</text:p>
          </table:table-cell>
          <table:table-cell office:value-type="string" table:style-name="ce1">
            <text:p>Stanford University</text:p>
          </table:table-cell>
          <table:table-cell office:value-type="string" table:style-name="ce1">
            <text:p>Institution</text:p>
          </table:table-cell>
          <table:table-cell office:value-type="string" table:style-name="ce1">
            <text:p>AIDeveloper</text:p>
          </table:table-cell>
          <table:table-cell office:value-type="string" office:string-value="name: Stanford University; stakeholder: Institution; role: AIDeveloper" table:formula="of:= COM.MICROSOFT.CONCAT(&quot;name: &quot;;[.B57]; &quot;; stakeholder: &quot;; [.C57]; &quot;; role: &quot;; [.D57])" table:style-name="ce12">
            <text:p>name: Stanford University; stakeholder: Institution; role: AIDeveloper</text:p>
          </table:table-cell>
          <table:table-cell office:value-type="string" table:style-name="ce16">
            <text:p>./assets/noun-museum-198296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thropic</text:p>
          </table:table-cell>
          <table:table-cell office:value-type="string" table:style-name="ce1">
            <text:p>Anthropic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Anthropic; stakeholder: TechCompany; role: AIDeveloper" table:formula="of:= COM.MICROSOFT.CONCAT(&quot;name: &quot;;[.B58]; &quot;; stakeholder: &quot;; [.C58]; &quot;; role: &quot;; [.D58])" table:style-name="ce12">
            <text:p>name: Anthropic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iRobot</text:p>
          </table:table-cell>
          <table:table-cell office:value-type="string" table:style-name="ce1">
            <text:p>iRobot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iRobot; stakeholder: TechCompany; role: AIDeveloper" table:formula="of:= COM.MICROSOFT.CONCAT(&quot;name: &quot;;[.B59]; &quot;; stakeholder: &quot;; [.C59]; &quot;; role: &quot;; [.D59])" table:style-name="ce12">
            <text:p>name: iRobot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eta</text:p>
          </table:table-cell>
          <table:table-cell office:value-type="string" table:style-name="ce1">
            <text:p>Meta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Meta; stakeholder: TechCompany; role: AIDeveloper" table:formula="of:= COM.MICROSOFT.CONCAT(&quot;name: &quot;;[.B60]; &quot;; stakeholder: &quot;; [.C60]; &quot;; role: &quot;; [.D60])" table:style-name="ce12">
            <text:p>name: Meta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penAI</text:p>
          </table:table-cell>
          <table:table-cell office:value-type="string" table:style-name="ce1">
            <text:p>OpenAI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OpenAI; stakeholder: TechCompany; role: AIDeveloper" table:formula="of:= COM.MICROSOFT.CONCAT(&quot;name: &quot;;[.B61]; &quot;; stakeholder: &quot;; [.C61]; &quot;; role: &quot;; [.D61])" table:style-name="ce12">
            <text:p>name: OpenAI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ebanon</text:p>
          </table:table-cell>
          <table:table-cell office:value-type="string" table:style-name="ce1">
            <text:p>Lebanon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Subject</text:p>
          </table:table-cell>
          <table:table-cell office:value-type="string" office:string-value="name: Lebanon; stakeholder: Nation; role: AISubject" table:formula="of:= COM.MICROSOFT.CONCAT(&quot;name: &quot;;[.B62]; &quot;; stakeholder: &quot;; [.C62]; &quot;; role: &quot;; [.D62])" table:style-name="ce12">
            <text:p>name: Lebanon; stakeholder: Nation; role: AISubject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oogleCloud</text:p>
          </table:table-cell>
          <table:table-cell office:value-type="string" table:style-name="ce1">
            <text:p>Google Cloud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Google Cloud; stakeholder: TechCompany; role: AIDeveloper" table:formula="of:= COM.MICROSOFT.CONCAT(&quot;name: &quot;;[.B63]; &quot;; stakeholder: &quot;; [.C63]; &quot;; role: &quot;; [.D63])" table:style-name="ce12">
            <text:p>name: Google Cloud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zure</text:p>
          </table:table-cell>
          <table:table-cell office:value-type="string" table:style-name="ce1">
            <text:p>Azure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Azure; stakeholder: TechCompany; role: AIDeveloper" table:formula="of:= COM.MICROSOFT.CONCAT(&quot;name: &quot;;[.B64]; &quot;; stakeholder: &quot;; [.C64]; &quot;; role: &quot;; [.D64])" table:style-name="ce12">
            <text:p>name: Azure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mram</text:p>
          </table:table-cell>
          <table:table-cell office:value-type="string" table:style-name="ce1">
            <text:p>Mamram</text:p>
          </table:table-cell>
          <table:table-cell office:value-type="string" table:style-name="ce1">
            <text:p>Military</text:p>
          </table:table-cell>
          <table:table-cell office:value-type="string" table:style-name="ce1">
            <text:p>AIDeployer</text:p>
          </table:table-cell>
          <table:table-cell office:value-type="string" office:string-value="name: Mamram; stakeholder: Military; role: AIDeployer" table:formula="of:= COM.MICROSOFT.CONCAT(&quot;name: &quot;;[.B65]; &quot;; stakeholder: &quot;; [.C65]; &quot;; role: &quot;; [.D65])" table:style-name="ce12">
            <text:p>name: Mamram; stakeholder: Military; role: AIDeployer</text:p>
          </table:table-cell>
          <table:table-cell office:value-type="string" table:style-name="ce1">
            <text:p>./assets/noun-locked-location-198286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duril</text:p>
          </table:table-cell>
          <table:table-cell office:value-type="string" table:style-name="ce1">
            <text:p>Anduril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Anduril; stakeholder: DefenseCompany; role: AIDeveloper" table:formula="of:= COM.MICROSOFT.CONCAT(&quot;name: &quot;;[.B66]; &quot;; stakeholder: &quot;; [.C66]; &quot;; role: &quot;; [.D66])" table:style-name="ce12">
            <text:p>name: Anduril; stakeholder: DefenseCompany; role: AIDevelop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ockheed</text:p>
          </table:table-cell>
          <table:table-cell office:value-type="string" table:style-name="ce1">
            <text:p>Lockheed Martin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Lockheed Martin; stakeholder: DefenseCompany; role: AIDeveloper" table:formula="of:= COM.MICROSOFT.CONCAT(&quot;name: &quot;;[.B67]; &quot;; stakeholder: &quot;; [.C67]; &quot;; role: &quot;; [.D67])" table:style-name="ce12">
            <text:p>name: Lockheed Martin; stakeholder: DefenseCompany; role: AIDevelop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ooz</text:p>
          </table:table-cell>
          <table:table-cell office:value-type="string" table:style-name="ce1">
            <text:p>Booz Allen Hamilton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Booz Allen Hamilton; stakeholder: DefenseCompany; role: AIDeveloper" table:formula="of:= COM.MICROSOFT.CONCAT(&quot;name: &quot;;[.B68]; &quot;; stakeholder: &quot;; [.C68]; &quot;; role: &quot;; [.D68])" table:style-name="ce12">
            <text:p>name: Booz Allen Hamilton; stakeholder: DefenseCompany; role: AIDevelop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LA-PRC</text:p>
          </table:table-cell>
          <table:table-cell office:value-type="string" table:style-name="ce1">
            <text:p>People's Liberation Army</text:p>
          </table:table-cell>
          <table:table-cell office:value-type="string" table:style-name="ce1">
            <text:p>Military</text:p>
          </table:table-cell>
          <table:table-cell office:value-type="string" table:style-name="ce1">
            <text:p>AIDeployer, AIDeveloper</text:p>
          </table:table-cell>
          <table:table-cell office:value-type="string" office:string-value="name: People's Liberation Army, China; stakeholder: Military; role: AIDeployer, AIDeveloper" table:formula="of:= COM.MICROSOFT.CONCAT(&quot;name: &quot;; &quot;People's Liberation Army, China&quot;; &quot;; stakeholder: &quot;; [.C69]; &quot;; role: &quot;; [.D69])" table:style-name="ce12">
            <text:p>name: People's Liberation Army, China; stakeholder: Military; role: AIDeployer, AIDeveloper</text:p>
          </table:table-cell>
          <table:table-cell office:value-type="string" table:style-name="ce1">
            <text:p>./assets/noun-locked-location-198286.png</text:p>
          </table:table-cell>
          <table:table-cell office:value-type="string" table:style-name="ce1">
            <text:p>People's Liberation Army 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loitte</text:p>
          </table:table-cell>
          <table:table-cell office:value-type="string" table:style-name="ce1">
            <text:p>Deloitte</text:p>
          </table:table-cell>
          <table:table-cell office:value-type="string" table:style-name="ce1">
            <text:p>Investor</text:p>
          </table:table-cell>
          <table:table-cell office:value-type="string" table:style-name="ce1">
            <text:p>AIDeveloper</text:p>
          </table:table-cell>
          <table:table-cell office:value-type="string" office:string-value="name: Deloitte; stakeholder: Investor; role: AIDeveloper" table:formula="of:= COM.MICROSOFT.CONCAT(&quot;name: &quot;;[.B70]; &quot;; stakeholder: &quot;; [.C70]; &quot;; role: &quot;; [.D70])" table:style-name="ce12">
            <text:p>name: Deloitte; stakeholder: Investor; role: AIDeveloper</text:p>
          </table:table-cell>
          <table:table-cell office:value-type="string" table:style-name="ce16">
            <text:p>./assets/noun-museum-198296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ccenture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Accenture; stakeholder: TechCompany; role: AIDeveloper" table:formula="of:= COM.MICROSOFT.CONCAT(&quot;name: &quot;;[.B71]; &quot;; stakeholder: &quot;; [.C71]; &quot;; role: &quot;; [.D71])" table:style-name="ce12">
            <text:p>name: Accenture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atabricks</text:p>
          </table:table-cell>
          <table:table-cell office:value-type="string" table:style-name="ce1">
            <text:p>Databricks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Databricks; stakeholder: TechCompany; role: AIDeveloper" table:formula="of:= COM.MICROSOFT.CONCAT(&quot;name: &quot;;[.B72]; &quot;; stakeholder: &quot;; [.C72]; &quot;; role: &quot;; [.D72])" table:style-name="ce12">
            <text:p>name: Databricks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eidos</text:p>
          </table:table-cell>
          <table:table-cell office:value-type="string" table:style-name="ce1">
            <text:p>Leidos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Leidos; stakeholder: TechCompany; role: AIDeveloper" table:formula="of:= COM.MICROSOFT.CONCAT(&quot;name: &quot;;[.B73]; &quot;; stakeholder: &quot;; [.C73]; &quot;; role: &quot;; [.D73])" table:style-name="ce12">
            <text:p>name: Leidos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caleAI</text:p>
          </table:table-cell>
          <table:table-cell office:value-type="string" table:style-name="ce1">
            <text:p>ScaleAI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ScaleAI; stakeholder: TechCompany; role: AIDeveloper" table:formula="of:= COM.MICROSOFT.CONCAT(&quot;name: &quot;;[.B74]; &quot;; stakeholder: &quot;; [.C74]; &quot;; role: &quot;; [.D74])" table:style-name="ce12">
            <text:p>name: ScaleAI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nowflake</text:p>
          </table:table-cell>
          <table:table-cell office:value-type="string" table:style-name="ce1">
            <text:p>Snowflake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Snowflake; stakeholder: TechCompany; role: AIDeveloper" table:formula="of:= COM.MICROSOFT.CONCAT(&quot;name: &quot;;[.B75]; &quot;; stakeholder: &quot;; [.C75]; &quot;; role: &quot;; [.D75])" table:style-name="ce12">
            <text:p>name: Snowflake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KKR</text:p>
          </table:table-cell>
          <table:table-cell office:value-type="string" table:style-name="ce1">
            <text:p>KKR Investments</text:p>
          </table:table-cell>
          <table:table-cell office:value-type="string" table:style-name="ce1">
            <text:p>Investor</text:p>
          </table:table-cell>
          <table:table-cell office:value-type="string" table:style-name="ce1">
            <text:p>AIDeveloper</text:p>
          </table:table-cell>
          <table:table-cell office:value-type="string" office:string-value="name: KKR Investments; stakeholder: Investor; role: AIDeveloper" table:formula="of:= COM.MICROSOFT.CONCAT(&quot;name: &quot;;[.B76]; &quot;; stakeholder: &quot;; [.C76]; &quot;; role: &quot;; [.D76])" table:style-name="ce12">
            <text:p>name: KKR Investments; stakeholder: Investor; role: AIDeveloper</text:p>
          </table:table-cell>
          <table:table-cell office:value-type="string" table:style-name="ce16">
            <text:p>./assets/noun-museum-198296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TR</text:p>
          </table:table-cell>
          <table:table-cell office:value-type="string" table:style-name="ce1">
            <text:p>Global Technical Reality Data Centers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Operator</text:p>
          </table:table-cell>
          <table:table-cell office:value-type="string" office:string-value="name: Global Technical Reality; stakeholder: TechCompany; role: AIOperator" table:formula="of:= COM.MICROSOFT.CONCAT(&quot;name: &quot;;&quot;Global Technical Reality&quot;; &quot;; stakeholder: &quot;; [.C77]; &quot;; role: &quot;; [.D77])" table:style-name="ce12">
            <text:p>name: Global Technical Reality; stakeholder: TechCompany; role: AIOperator</text:p>
          </table:table-cell>
          <table:table-cell office:value-type="string" table:style-name="ce16">
            <text:p>./assets/noun-software-industry-198331.png</text:p>
          </table:table-cell>
          <table:table-cell office:value-type="string" table:style-name="ce1">
            <text:p>Global Technical Realit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yperoptic</text:p>
          </table:table-cell>
          <table:table-cell office:value-type="string" table:style-name="ce1">
            <text:p>Hyperoptic</text:p>
          </table:table-cell>
          <table:table-cell office:value-type="string" table:style-name="ce1">
            <text:p>Utility</text:p>
          </table:table-cell>
          <table:table-cell office:value-type="string" table:style-name="ce1">
            <text:p>Stakeholder</text:p>
          </table:table-cell>
          <table:table-cell office:value-type="string" office:string-value="name: Hyperoptic; stakeholder: Utility; role: Stakeholder" table:formula="of:= COM.MICROSOFT.CONCAT(&quot;name: &quot;;[.B78]; &quot;; stakeholder: &quot;; [.C78]; &quot;; role: &quot;; [.D78])" table:style-name="ce12">
            <text:p>name: Hyperoptic; stakeholder: Utility; role: Stakeholder</text:p>
          </table:table-cell>
          <table:table-cell office:value-type="string" table:style-name="ce16">
            <text:p>./assets/noun-infrastructure-6195519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antage</text:p>
          </table:table-cell>
          <table:table-cell office:value-type="string" table:style-name="ce1">
            <text:p>Vantage Towers</text:p>
          </table:table-cell>
          <table:table-cell office:value-type="string" table:style-name="ce1">
            <text:p>Utility</text:p>
          </table:table-cell>
          <table:table-cell office:value-type="string" table:style-name="ce1">
            <text:p>Stakeholder</text:p>
          </table:table-cell>
          <table:table-cell office:value-type="string" office:string-value="name: Vantage Towers; stakeholder: Utility; role: Stakeholder" table:formula="of:= COM.MICROSOFT.CONCAT(&quot;name: &quot;;[.B79]; &quot;; stakeholder: &quot;; [.C79]; &quot;; role: &quot;; [.D79])" table:style-name="ce12">
            <text:p>name: Vantage Towers; stakeholder: Utility; role: Stakeholder</text:p>
          </table:table-cell>
          <table:table-cell office:value-type="string" table:style-name="ce16">
            <text:p>./assets/noun-infrastructure-6195519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andeskriminalamt</text:p>
          </table:table-cell>
          <table:table-cell office:value-type="string" table:style-name="ce1">
            <text:p>German State Police-NRW, Hesse, Bavaria</text:p>
          </table:table-cell>
          <table:table-cell office:value-type="string" table:style-name="ce1">
            <text:p>Police</text:p>
          </table:table-cell>
          <table:table-cell office:value-type="string" table:style-name="ce1">
            <text:p>AIDeployer</text:p>
          </table:table-cell>
          <table:table-cell office:value-type="string" office:string-value="name: German State Police North Rhine Westphalia; stakeholder: Police; role: AIDeployer" table:formula="of:= COM.MICROSOFT.CONCAT(&quot;name: &quot;;&quot;German State Police North Rhine Westphalia&quot;; &quot;; stakeholder: &quot;; [.C80]; &quot;; role: &quot;; [.D80])" table:style-name="ce12">
            <text:p>name: German State Police North Rhine Westphalia; stakeholder: Police; role: AIDeployer</text:p>
          </table:table-cell>
          <table:table-cell office:value-type="string" table:style-name="ce16">
            <text:p>./assets/noun-riot-control-national-guards-1584300.png</text:p>
          </table:table-cell>
          <table:table-cell office:value-type="string" table:style-name="ce1">
            <text:p>German State Police NRW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shNP</text:p>
          </table:table-cell>
          <table:table-cell office:value-type="string" table:style-name="ce1">
            <text:p>Danish Police</text:p>
          </table:table-cell>
          <table:table-cell office:value-type="string" table:style-name="ce1">
            <text:p>Police</text:p>
          </table:table-cell>
          <table:table-cell office:value-type="string" table:style-name="ce1">
            <text:p>AIDeployer</text:p>
          </table:table-cell>
          <table:table-cell office:value-type="string" office:string-value="name: Danish National Police; stakeholder: Police; role: AIDeployer" table:formula="of:= COM.MICROSOFT.CONCAT(&quot;name: &quot;;&quot;Danish National Police&quot;; &quot;; stakeholder: &quot;; [.C81]; &quot;; role: &quot;; [.D81])" table:style-name="ce12">
            <text:p>name: Danish National Police; stakeholder: Police; role: AIDeployer</text:p>
          </table:table-cell>
          <table:table-cell office:value-type="string" table:style-name="ce16">
            <text:p>./assets/noun-riot-control-national-guards-1584300.png</text:p>
          </table:table-cell>
          <table:table-cell office:value-type="string" table:style-name="ce1">
            <text:p>Danish National Poli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mark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Deployer</text:p>
          </table:table-cell>
          <table:table-cell office:value-type="string" office:string-value="name: Denmark; stakeholder: Nation; role: AIDeployer" table:formula="of:= COM.MICROSOFT.CONCAT(&quot;name: &quot;;[.B82]; &quot;; stakeholder: &quot;; [.C82]; &quot;; role: &quot;; [.D82])" table:style-name="ce12">
            <text:p>name: Denmark; stakeholder: Nation; role: AIDeployer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copley</text:p>
          </table:table-cell>
          <table:table-cell office:value-type="string" table:style-name="ce1">
            <text:p>Scopley Games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ployer</text:p>
          </table:table-cell>
          <table:table-cell office:value-type="string" office:string-value="name: Scopley (Savvy Games); stakeholder: TechCompany; role: AIDeployer" table:formula="of:= COM.MICROSOFT.CONCAT(&quot;name: &quot;;&quot;Scopley (Savvy Games)&quot;; &quot;; stakeholder: &quot;; [.C83]; &quot;; role: &quot;; [.D83])" table:style-name="ce12">
            <text:p>name: Scopley (Savvy Games); stakeholder: TechCompany; role: AIDeployer</text:p>
          </table:table-cell>
          <table:table-cell office:value-type="string" table:style-name="ce16">
            <text:p>./assets/noun-software-industry-198331.png</text:p>
          </table:table-cell>
          <table:table-cell office:value-type="string" table:style-name="ce1">
            <text:p>Scopley (Savvy Games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udi</text:p>
          </table:table-cell>
          <table:table-cell office:value-type="string" table:style-name="ce1">
            <text:p>Saudi Arabia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Deployer, AIDeveloper</text:p>
          </table:table-cell>
          <table:table-cell office:value-type="string" office:string-value="name: Saudi Arabia; stakeholder: Nation; role: AIDeployer, AIDeveloper" table:formula="of:= COM.MICROSOFT.CONCAT(&quot;name: &quot;;[.B84]; &quot;; stakeholder: &quot;; [.C84]; &quot;; role: &quot;; [.D84])" table:style-name="ce12">
            <text:p>name: Saudi Arabia; stakeholder: Nation; role: AIDeployer, AIDeveloper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IT</text:p>
          </table:table-cell>
          <table:table-cell office:value-type="string" table:style-name="ce1">
            <text:p>MIT</text:p>
          </table:table-cell>
          <table:table-cell office:value-type="string" table:style-name="ce1">
            <text:p>Institution</text:p>
          </table:table-cell>
          <table:table-cell office:value-type="string" table:style-name="ce1">
            <text:p>AIDeveloper</text:p>
          </table:table-cell>
          <table:table-cell office:value-type="string" office:string-value="name: MIT; stakeholder: Institution; role: AIDeveloper" table:formula="of:= COM.MICROSOFT.CONCAT(&quot;name: &quot;;[.B85]; &quot;; stakeholder: &quot;; [.C85]; &quot;; role: &quot;; [.D85])" table:style-name="ce12">
            <text:p>name: MIT; stakeholder: Institution; role: AIDeveloper</text:p>
          </table:table-cell>
          <table:table-cell office:value-type="string" table:style-name="ce16">
            <text:p>./assets/noun-research-center-198322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pain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Deployer</text:p>
          </table:table-cell>
          <table:table-cell office:value-type="string" office:string-value="name: Spain; stakeholder: Nation; role: AIDeployer" table:formula="of:= COM.MICROSOFT.CONCAT(&quot;name: &quot;;[.B86]; &quot;; stakeholder: &quot;; [.C86]; &quot;; role: &quot;; [.D86])" table:style-name="ce12">
            <text:p>name: Spain; stakeholder: Nation; role: AIDeployer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NHS</text:p>
          </table:table-cell>
          <table:table-cell office:value-type="string" table:style-name="ce1">
            <text:p>UK NHS</text:p>
          </table:table-cell>
          <table:table-cell office:value-type="string" table:style-name="ce1">
            <text:p>Institution</text:p>
          </table:table-cell>
          <table:table-cell office:value-type="string" table:style-name="ce1">
            <text:p>AIDeployer</text:p>
          </table:table-cell>
          <table:table-cell office:value-type="string" office:string-value="name: UK NHS; stakeholder: Institution; role: AIDeployer" table:formula="of:= COM.MICROSOFT.CONCAT(&quot;name: &quot;;[.B87]; &quot;; stakeholder: &quot;; [.C87]; &quot;; role: &quot;; [.D87])" table:style-name="ce12">
            <text:p>name: UK NHS; stakeholder: Institution; role: AIDeployer</text:p>
          </table:table-cell>
          <table:table-cell office:value-type="string" table:style-name="ce16">
            <text:p>./assets/noun-research-center-198322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US Immigration (ICE)</text:p>
          </table:table-cell>
          <table:table-cell office:value-type="string" table:style-name="ce1">
            <text:p>Police</text:p>
          </table:table-cell>
          <table:table-cell office:value-type="string" table:style-name="ce1">
            <text:p>AIDeployer</text:p>
          </table:table-cell>
          <table:table-cell office:value-type="string" office:string-value="name: US Immigration (ICE); stakeholder: Police; role: AIDeployer" table:formula="of:= COM.MICROSOFT.CONCAT(&quot;name: &quot;;[.B88]; &quot;; stakeholder: &quot;; [.C88]; &quot;; role: &quot;; [.D88])" table:style-name="ce12">
            <text:p>name: US Immigration (ICE); stakeholder: Police; role: AIDeployer</text:p>
          </table:table-cell>
          <table:table-cell office:value-type="string" table:style-name="ce16">
            <text:p>./assets/noun-riot-control-national-guards-158430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IANA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Military</text:p>
          </table:table-cell>
          <table:table-cell office:value-type="string" table:style-name="ce1">
            <text:p>AIDeployer, AIDeveloper</text:p>
          </table:table-cell>
          <table:table-cell office:value-type="string" office:string-value="name: Defence Innovation Accelerator for the North Atlantic (DIANA); stakeholder: Military; role: AIDeployer, AIDeveloper" table:formula="of:= COM.MICROSOFT.CONCAT(&quot;name: &quot;; &quot;Defence Innovation Accelerator for the North Atlantic (DIANA)&quot;; &quot;; stakeholder: &quot;; [.C89]; &quot;; role: &quot;; [.D89])" table:style-name="ce12">
            <text:p>name: Defence Innovation Accelerator for the North Atlantic (DIANA); stakeholder: Military; role: AIDeployer, AIDeveloper</text:p>
          </table:table-cell>
          <table:table-cell office:value-type="string" table:style-name="ce1">
            <text:p>./assets/noun-locked-location-198286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NATO</text:p>
          </table:table-cell>
          <table:table-cell office:value-type="string" table:style-name="ce1">
            <text:p>NATO</text:p>
          </table:table-cell>
          <table:table-cell office:value-type="string" table:style-name="ce1">
            <text:p>Military</text:p>
          </table:table-cell>
          <table:table-cell office:value-type="string" table:style-name="ce1">
            <text:p>AIDeployer</text:p>
          </table:table-cell>
          <table:table-cell office:value-type="string" office:string-value="name: NATO; stakeholder: Military; role: AIDeployer" table:formula="of:= COM.MICROSOFT.CONCAT(&quot;name: &quot;;[.B90]; &quot;; stakeholder: &quot;; [.C90]; &quot;; role: &quot;; [.D90])" table:style-name="ce12">
            <text:p>name: NATO; stakeholder: Military; role: AIDeployer</text:p>
          </table:table-cell>
          <table:table-cell office:value-type="string" table:style-name="ce1">
            <text:p>./assets/noun-locked-location-198286.png</text:p>
          </table:table-cell>
          <table:table-cell office:value-type="string" table:style-name="ce1">
            <text:p>North Atlantic Treaty Organiza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Apple; stakeholder: TechCompany; role: AIDeveloper" table:formula="of:= COM.MICROSOFT.CONCAT(&quot;name: &quot;;[.B91]; &quot;; stakeholder: &quot;; [.C91]; &quot;; role: &quot;; [.D91])" table:style-name="ce12">
            <text:p>name: Apple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DIT</text:p>
          </table:table-cell>
          <table:table-cell office:value-type="string" table:style-name="ce1">
            <text:p>General Dynamics Information Technologies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ployer, AIDeveloper</text:p>
          </table:table-cell>
          <table:table-cell office:value-type="string" office:string-value="name: General Dynamics Information Technologies; stakeholder: TechCompany; role: AIDeployer, AIDeveloper" table:formula="of:= COM.MICROSOFT.CONCAT(&quot;name: &quot;;[.B92]; &quot;; stakeholder: &quot;; [.C92]; &quot;; role: &quot;; [.D92])" table:style-name="ce12">
            <text:p>name: General Dynamics Information Technologies; stakeholder: TechCompany; role: AIDeployer,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rsight</text:p>
          </table:table-cell>
          <table:table-cell office:value-type="string" table:style-name="ce1">
            <text:p>Corsight.AI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Corsight.AI; stakeholder: TechCompany; role: AIDeveloper" table:formula="of:= COM.MICROSOFT.CONCAT(&quot;name: &quot;;[.B93]; &quot;; stakeholder: &quot;; [.C93]; &quot;; role: &quot;; [.D93])" table:style-name="ce12">
            <text:p>name: Corsight.AI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anguard</text:p>
          </table:table-cell>
          <table:table-cell office:value-type="string" table:style-name="ce1">
            <text:p>Vanguard</text:p>
          </table:table-cell>
          <table:table-cell office:value-type="string" table:style-name="ce1">
            <text:p>Investor</text:p>
          </table:table-cell>
          <table:table-cell office:value-type="string" table:style-name="ce1">
            <text:p>AIDeveloper</text:p>
          </table:table-cell>
          <table:table-cell office:value-type="string" office:string-value="name: Vanguard; stakeholder: Investor; role: AIDeveloper" table:formula="of:= COM.MICROSOFT.CONCAT(&quot;name: &quot;;[.B94]; &quot;; stakeholder: &quot;; [.C94]; &quot;; role: &quot;; [.D94])" table:style-name="ce12">
            <text:p>name: Vanguard; stakeholder: Investor; role: AIDeveloper</text:p>
          </table:table-cell>
          <table:table-cell office:value-type="string" table:style-name="ce16">
            <text:p>./assets/noun-museum-198296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BP</text:p>
          </table:table-cell>
          <table:table-cell office:value-type="string" table:style-name="ce1">
            <text:p>US Customs and Border Patrol</text:p>
          </table:table-cell>
          <table:table-cell office:value-type="string" table:style-name="ce1">
            <text:p>Police</text:p>
          </table:table-cell>
          <table:table-cell office:value-type="string" table:style-name="ce1">
            <text:p>AIDeployer</text:p>
          </table:table-cell>
          <table:table-cell office:value-type="string" office:string-value="name: US Customs and Border Patrol; stakeholder: Police; role: AIDeployer" table:formula="of:= COM.MICROSOFT.CONCAT(&quot;name: &quot;;[.B95]; &quot;; stakeholder: &quot;; [.C95]; &quot;; role: &quot;; [.D95])" table:style-name="ce12">
            <text:p>name: US Customs and Border Patrol; stakeholder: Police; role: AIDeployer</text:p>
          </table:table-cell>
          <table:table-cell office:value-type="string" table:style-name="ce16">
            <text:p>./assets/noun-riot-control-national-guards-158430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orizon</text:p>
          </table:table-cell>
          <table:table-cell office:value-type="string" table:style-name="ce1">
            <text:p>Horizon Europe</text:p>
          </table:table-cell>
          <table:table-cell office:value-type="string" table:style-name="ce1">
            <text:p>Institution</text:p>
          </table:table-cell>
          <table:table-cell office:value-type="string" table:style-name="ce1">
            <text:p>Stakeholder</text:p>
          </table:table-cell>
          <table:table-cell office:value-type="string" office:string-value="name: Horizon Europe; stakeholder: Institution; role: Stakeholder" table:formula="of:= COM.MICROSOFT.CONCAT(&quot;name: &quot;;[.B96]; &quot;; stakeholder: &quot;; [.C96]; &quot;; role: &quot;; [.D96])" table:style-name="ce12">
            <text:p>name: Horizon Europe; stakeholder: Institution; role: Stakeholder</text:p>
          </table:table-cell>
          <table:table-cell office:value-type="string" table:style-name="ce16">
            <text:p>./assets/noun-research-center-198322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QS</text:p>
          </table:table-cell>
          <table:table-cell office:value-type="string" table:style-name="ce1">
            <text:p>Quantum Systems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Quantum Systems; stakeholder: DefenseCompany; role: AIDeveloper" table:formula="of:= COM.MICROSOFT.CONCAT(&quot;name: &quot;;[.B97]; &quot;; stakeholder: &quot;; [.C97]; &quot;; role: &quot;; [.D97])" table:style-name="ce12">
            <text:p>name: Quantum Systems; stakeholder: DefenseCompany; role: AIDevelop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U</text:p>
          </table:table-cell>
          <table:table-cell office:value-type="string" table:style-name="ce1">
            <text:p>US Defense Innovation Unit</text:p>
          </table:table-cell>
          <table:table-cell office:value-type="string" table:style-name="ce1">
            <text:p>Military</text:p>
          </table:table-cell>
          <table:table-cell office:value-type="string" table:style-name="ce1">
            <text:p>AIDeployer, AIOperator</text:p>
          </table:table-cell>
          <table:table-cell office:value-type="string" office:string-value="name: US Defense Innovation Unit; stakeholder: Military; role: AIDeployer, AIOperator" table:formula="of:= COM.MICROSOFT.CONCAT(&quot;name: &quot;;[.B98]; &quot;; stakeholder: &quot;; [.C98]; &quot;; role: &quot;; [.D98])" table:style-name="ce12">
            <text:p>name: US Defense Innovation Unit; stakeholder: Military; role: AIDeployer, AIOperator</text:p>
          </table:table-cell>
          <table:table-cell office:value-type="string" table:style-name="ce1">
            <text:p>./assets/noun-locked-location-198286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xon</text:p>
          </table:table-cell>
          <table:table-cell office:value-type="string" table:style-name="ce1">
            <text:p>Axon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ployer, AIDeveloper</text:p>
          </table:table-cell>
          <table:table-cell office:value-type="string" office:string-value="name: Axon; stakeholder: DefenseCompany; role: AIDeployer, AIDeveloper" table:formula="of:= COM.MICROSOFT.CONCAT(&quot;name: &quot;;[.B99]; &quot;; stakeholder: &quot;; [.C99]; &quot;; role: &quot;; [.D99])" table:style-name="ce12">
            <text:p>name: Axon; stakeholder: DefenseCompany; role: AIDeployer, AIDeveloper</text:p>
          </table:table-cell>
          <table:table-cell office:value-type="string" table:style-name="ce1">
            <text:p>./assets/noun-locked-location-198286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PD</text:p>
          </table:table-cell>
          <table:table-cell office:value-type="string" table:style-name="ce1">
            <text:p>US Local Police</text:p>
          </table:table-cell>
          <table:table-cell office:value-type="string" table:style-name="ce1">
            <text:p>Police</text:p>
          </table:table-cell>
          <table:table-cell office:value-type="string" table:style-name="ce1">
            <text:p>AIDeployer</text:p>
          </table:table-cell>
          <table:table-cell office:value-type="string" office:string-value="name: US Local Police; stakeholder: Police; role: AIDeployer" table:formula="of:= COM.MICROSOFT.CONCAT(&quot;name: &quot;;[.B100]; &quot;; stakeholder: &quot;; [.C100]; &quot;; role: &quot;; [.D100])" table:style-name="ce12">
            <text:p>name: US Local Police; stakeholder: Police; role: AIDeployer</text:p>
          </table:table-cell>
          <table:table-cell office:value-type="string" table:style-name="ce16">
            <text:p>./assets/noun-riot-control-national-guards-1584300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01V</text:p>
          </table:table-cell>
          <table:table-cell office:value-type="string" table:style-name="ce1">
            <text:p>201 Ventures</text:p>
          </table:table-cell>
          <table:table-cell office:value-type="string" table:style-name="ce1">
            <text:p>Investor</text:p>
          </table:table-cell>
          <table:table-cell office:value-type="string" table:style-name="ce1">
            <text:p>AIDeveloper</text:p>
          </table:table-cell>
          <table:table-cell office:value-type="string" office:string-value="name: 201 Ventures; stakeholder: Investor; role: AIDeveloper" table:formula="of:= COM.MICROSOFT.CONCAT(&quot;name: &quot;;[.B101]; &quot;; stakeholder: &quot;; [.C101]; &quot;; role: &quot;; [.D101])" table:style-name="ce12">
            <text:p>name: 201 Ventures; stakeholder: Investor; role: AIDeveloper</text:p>
          </table:table-cell>
          <table:table-cell office:value-type="string" table:style-name="ce16">
            <text:p>./assets/noun-museum-198296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ian</text:p>
          </table:table-cell>
          <table:table-cell office:value-type="string" table:style-name="ce1">
            <text:p>Delian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Delian; stakeholder: TechCompany; role: AIDeveloper" table:formula="of:= COM.MICROSOFT.CONCAT(&quot;name: &quot;;[.B102]; &quot;; stakeholder: &quot;; [.C102]; &quot;; role: &quot;; [.D102])" table:style-name="ce12">
            <text:p>name: Delian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F</text:p>
          </table:table-cell>
          <table:table-cell office:value-type="string" table:style-name="ce1">
            <text:p>Nato Innovation Fund</text:p>
          </table:table-cell>
          <table:table-cell office:value-type="string" table:style-name="ce1">
            <text:p>Investor</text:p>
          </table:table-cell>
          <table:table-cell office:value-type="string" table:style-name="ce1">
            <text:p>AIDeveloper</text:p>
          </table:table-cell>
          <table:table-cell office:value-type="string" office:string-value="name: Nato Innovation Fund; stakeholder: Investor; role: AIDeveloper" table:formula="of:= COM.MICROSOFT.CONCAT(&quot;name: &quot;;[.B103]; &quot;; stakeholder: &quot;; [.C103]; &quot;; role: &quot;; [.D103])" table:style-name="ce12">
            <text:p>name: Nato Innovation Fund; stakeholder: Investor; role: AIDeveloper</text:p>
          </table:table-cell>
          <table:table-cell office:value-type="string" table:style-name="ce16">
            <text:p>./assets/noun-museum-198296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kever</text:p>
          </table:table-cell>
          <table:table-cell office:value-type="string" table:style-name="ce1">
            <text:p>Tekever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AIDeveloper</text:p>
          </table:table-cell>
          <table:table-cell office:value-type="string" office:string-value="name: Tekever; stakeholder: AID; role: AIDeveloper" table:formula="of:= COM.MICROSOFT.CONCAT(&quot;name: &quot;;[.B104]; &quot;; stakeholder: &quot;; [.C104]; &quot;; role: &quot;; [.D104])" table:style-name="ce12">
            <text:p>name: Tekever; stakeholder: AID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rtugal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Deployer</text:p>
          </table:table-cell>
          <table:table-cell office:value-type="string" office:string-value="name: Portugal; stakeholder: Nation; role: AIDeployer" table:formula="of:= COM.MICROSOFT.CONCAT(&quot;name: &quot;;[.B105]; &quot;; stakeholder: &quot;; [.C105]; &quot;; role: &quot;; [.D105])" table:style-name="ce12">
            <text:p>name: Portugal; stakeholder: Nation; role: AIDeployer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eece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AIDeployer</text:p>
          </table:table-cell>
          <table:table-cell office:value-type="string" office:string-value="name: Greece; stakeholder: Nation; role: AIDeployer" table:formula="of:= COM.MICROSOFT.CONCAT(&quot;name: &quot;;[.B106]; &quot;; stakeholder: &quot;; [.C106]; &quot;; role: &quot;; [.D106])" table:style-name="ce12">
            <text:p>name: Greece; stakeholder: Nation; role: AIDeployer</text:p>
          </table:table-cell>
          <table:table-cell office:value-type="string" table:style-name="ce16">
            <text:p>./assets/noun-flagged-location-198290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irbus</text:p>
          </table:table-cell>
          <table:table-cell office:value-type="string" table:style-name="ce1">
            <text:p>Airbus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ployer</text:p>
          </table:table-cell>
          <table:table-cell office:value-type="string" office:string-value="name: Airbus; stakeholder: DefenseCompany; role: AIDeployer" table:formula="of:= COM.MICROSOFT.CONCAT(&quot;name: &quot;;[.B107]; &quot;; stakeholder: &quot;; [.C107]; &quot;; role: &quot;; [.D107])" table:style-name="ce12">
            <text:p>name: Airbus; stakeholder: DefenseCompany; role: AIDeploy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raunhofer</text:p>
          </table:table-cell>
          <table:table-cell office:value-type="string" table:style-name="ce1">
            <text:p>Fraunhofer Institutes</text:p>
          </table:table-cell>
          <table:table-cell office:value-type="string" table:style-name="ce1">
            <text:p>Institution</text:p>
          </table:table-cell>
          <table:table-cell office:value-type="string" table:style-name="ce1">
            <text:p>AIDeveloper</text:p>
          </table:table-cell>
          <table:table-cell office:value-type="string" office:string-value="name: Fraunhofer Institutes; stakeholder: Institution; role: AIDeveloper" table:formula="of:= COM.MICROSOFT.CONCAT(&quot;name: &quot;;[.B108]; &quot;; stakeholder: &quot;; [.C108]; &quot;; role: &quot;; [.D108])" table:style-name="ce12">
            <text:p>name: Fraunhofer Institutes; stakeholder: Institution; role: AIDeveloper</text:p>
          </table:table-cell>
          <table:table-cell office:value-type="string" table:style-name="ce16">
            <text:p>./assets/noun-research-center-198322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X</text:p>
          </table:table-cell>
          <table:table-cell office:value-type="string" table:style-name="ce1">
            <text:p>ARX Robotics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ARX Robotics; stakeholder: TechCompany; role: AIDeveloper" table:formula="of:= COM.MICROSOFT.CONCAT(&quot;name: &quot;;[.B109]; &quot;; stakeholder: &quot;; [.C109]; &quot;; role: &quot;; [.D109])" table:style-name="ce12">
            <text:p>name: ARX Robotics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illeGifford</text:p>
          </table:table-cell>
          <table:table-cell office:value-type="string" table:style-name="ce1">
            <text:p>Baillie Gifford</text:p>
          </table:table-cell>
          <table:table-cell office:value-type="string" table:style-name="ce1">
            <text:p>Investor</text:p>
          </table:table-cell>
          <table:table-cell office:value-type="string" table:style-name="ce1">
            <text:p>AIDeveloper</text:p>
          </table:table-cell>
          <table:table-cell office:value-type="string" office:string-value="name: Baillie Gifford; stakeholder: Investor; role: AIDeveloper" table:formula="of:= COM.MICROSOFT.CONCAT(&quot;name: &quot;;[.B110]; &quot;; stakeholder: &quot;; [.C110]; &quot;; role: &quot;; [.D110])" table:style-name="ce12">
            <text:p>name: Baillie Gifford; stakeholder: Investor; role: AIDeveloper</text:p>
          </table:table-cell>
          <table:table-cell office:value-type="string" table:style-name="ce16">
            <text:p>./assets/noun-museum-198296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ieldAI</text:p>
          </table:table-cell>
          <table:table-cell office:value-type="string" table:style-name="ce1">
            <text:p>Shield AI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Shield AI; stakeholder: TechCompany; role: AIDeveloper" table:formula="of:= COM.MICROSOFT.CONCAT(&quot;name: &quot;;[.B111]; &quot;; stakeholder: &quot;; [.C111]; &quot;; role: &quot;; [.D111])" table:style-name="ce12">
            <text:p>name: Shield AI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cKinsey</text:p>
          </table:table-cell>
          <table:table-cell office:value-type="string" table:style-name="ce1">
            <text:p>McKinsey</text:p>
          </table:table-cell>
          <table:table-cell office:value-type="string" table:style-name="ce1">
            <text:p>Investor</text:p>
          </table:table-cell>
          <table:table-cell office:value-type="string" table:style-name="ce1">
            <text:p>AIDeveloper</text:p>
          </table:table-cell>
          <table:table-cell office:value-type="string" office:string-value="name: McKinsey; stakeholder: Investor; role: AIDeveloper" table:formula="of:= COM.MICROSOFT.CONCAT(&quot;name: &quot;;[.B112]; &quot;; stakeholder: &quot;; [.C112]; &quot;; role: &quot;; [.D112])" table:style-name="ce12">
            <text:p>name: McKinsey; stakeholder: Investor; role: AIDeveloper</text:p>
          </table:table-cell>
          <table:table-cell office:value-type="string" table:style-name="ce16">
            <text:p>./assets/noun-museum-198296.png</text:p>
          </table:table-cell>
          <table:table-cell table:number-columns-repeated="16378"/>
        </table:table-row>
        <table:table-row table:number-rows-repeated="1048464" table:style-name="ro1">
          <table:table-cell table:number-columns-repeated="16384"/>
        </table:table-row>
      </table:table>
      <table:table table:name="N_People" table:style-name="ta1">
        <table:table-column table:style-name="co2" table:number-columns-repeated="16384" table:default-cell-style-name="ce1"/>
        <table:table-row table:style-name="ro1">
          <table:table-cell office:value-type="string" table:style-name="ce4">
            <text:p>id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airo:type</text:p>
          </table:table-cell>
          <table:table-cell office:value-type="string" table:style-name="ce4">
            <text:p>hover</text:p>
          </table:table-cell>
          <table:table-cell office:value-type="string" table:style-name="ce17">
            <text:p>image</text:p>
          </table:table-cell>
          <table:table-cell office:value-type="string" table:style-name="ce4">
            <text:p>source</text:p>
          </table:table-cell>
          <table:table-cell office:value-type="string" table:style-name="ce4">
            <text:p>details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1">
            <text:p>Luckey</text:p>
          </table:table-cell>
          <table:table-cell office:value-type="string" table:style-name="ce1">
            <text:p>Palmer Luckey</text:p>
          </table:table-cell>
          <table:table-cell office:value-type="string" table:style-name="ce1">
            <text:p>Owner, Investor</text:p>
          </table:table-cell>
          <table:table-cell table:style-name="ce1"/>
          <table:table-cell office:value-type="string" office:string-value="name: Palmer Luckey; role: Owner, Investor" table:formula="of:= COM.MICROSOFT.CONCAT(&quot;name: &quot;;[.B2]; &quot;; role: &quot;; [.C2])" table:style-name="ce12">
            <text:p>name: Palmer Luckey; role: Owner, Investor</text:p>
          </table:table-cell>
          <table:table-cell office:value-type="string" table:style-name="ce1">
            <text:p>./assets/noun-person-2649456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usk</text:p>
          </table:table-cell>
          <table:table-cell office:value-type="string" table:style-name="ce1">
            <text:p>Elon Musk</text:p>
          </table:table-cell>
          <table:table-cell office:value-type="string" table:style-name="ce1">
            <text:p>Owner, Investor</text:p>
          </table:table-cell>
          <table:table-cell table:style-name="ce1"/>
          <table:table-cell office:value-type="string" office:string-value="name: Elon Musk; role: Owner, Investor" table:formula="of:= COM.MICROSOFT.CONCAT(&quot;name: &quot;;[.B3]; &quot;; role: &quot;; [.C3])" table:style-name="ce12">
            <text:p>name: Elon Musk; role: Owner, Investor</text:p>
          </table:table-cell>
          <table:table-cell office:value-type="string" table:style-name="ce1">
            <text:p>./assets/noun-person-2649456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hiel</text:p>
          </table:table-cell>
          <table:table-cell office:value-type="string" table:style-name="ce1">
            <text:p>Peter Thiel</text:p>
          </table:table-cell>
          <table:table-cell office:value-type="string" table:style-name="ce1">
            <text:p>Owner, Investor</text:p>
          </table:table-cell>
          <table:table-cell table:style-name="ce1"/>
          <table:table-cell office:value-type="string" office:string-value="name: Peter Thiel; role: Owner, Investor" table:formula="of:= COM.MICROSOFT.CONCAT(&quot;name: &quot;;[.B4]; &quot;; role: &quot;; [.C4])" table:style-name="ce12">
            <text:p>name: Peter Thiel; role: Owner, Investor</text:p>
          </table:table-cell>
          <table:table-cell office:value-type="string" table:style-name="ce1">
            <text:p>./assets/noun-person-2649456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llison</text:p>
          </table:table-cell>
          <table:table-cell office:value-type="string" table:style-name="ce1">
            <text:p>Larry Ellison</text:p>
          </table:table-cell>
          <table:table-cell office:value-type="string" table:style-name="ce1">
            <text:p>Owner, Investor</text:p>
          </table:table-cell>
          <table:table-cell table:style-name="ce1"/>
          <table:table-cell office:value-type="string" office:string-value="name: Larry Ellison; role: Owner, Investor" table:formula="of:= COM.MICROSOFT.CONCAT(&quot;name: &quot;;[.B5]; &quot;; role: &quot;; [.C5])" table:style-name="ce12">
            <text:p>name: Larry Ellison; role: Owner, Investor</text:p>
          </table:table-cell>
          <table:table-cell office:value-type="string" table:style-name="ce1">
            <text:p>./assets/noun-person-2649456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ink</text:p>
          </table:table-cell>
          <table:table-cell office:value-type="string" table:style-name="ce1">
            <text:p>Larry Fink</text:p>
          </table:table-cell>
          <table:table-cell office:value-type="string" table:style-name="ce1">
            <text:p>CEO, Investor</text:p>
          </table:table-cell>
          <table:table-cell table:style-name="ce1"/>
          <table:table-cell office:value-type="string" office:string-value="name: Larry Fink; role: CEO, Investor" table:formula="of:= COM.MICROSOFT.CONCAT(&quot;name: &quot;;[.B6]; &quot;; role: &quot;; [.C6])" table:style-name="ce12">
            <text:p>name: Larry Fink; role: CEO, Investor</text:p>
          </table:table-cell>
          <table:table-cell office:value-type="string" table:style-name="ce1">
            <text:p>./assets/noun-person-2649456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ance</text:p>
          </table:table-cell>
          <table:table-cell office:value-type="string" table:style-name="ce1">
            <text:p>JD Vance</text:p>
          </table:table-cell>
          <table:table-cell office:value-type="string" table:style-name="ce1">
            <text:p>Investor, Politician</text:p>
          </table:table-cell>
          <table:table-cell table:style-name="ce1"/>
          <table:table-cell office:value-type="string" office:string-value="name: JD Vance; role: Investor, Politician" table:formula="of:= COM.MICROSOFT.CONCAT(&quot;name: &quot;;[.B7]; &quot;; role: &quot;; [.C7])" table:style-name="ce12">
            <text:p>name: JD Vance; role: Investor, Politician</text:p>
          </table:table-cell>
          <table:table-cell office:value-type="string" table:style-name="ce1">
            <text:p>./assets/noun-person-2649456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k</text:p>
          </table:table-cell>
          <table:table-cell office:value-type="string" table:style-name="ce1">
            <text:p>Daniel Ek</text:p>
          </table:table-cell>
          <table:table-cell office:value-type="string" table:style-name="ce1">
            <text:p>Owner, Investor</text:p>
          </table:table-cell>
          <table:table-cell table:style-name="ce1"/>
          <table:table-cell office:value-type="string" office:string-value="name: Daniel Ek; role: Owner, Investor" table:formula="of:= COM.MICROSOFT.CONCAT(&quot;name: &quot;;[.B8]; &quot;; role: &quot;; [.C8])" table:style-name="ce12">
            <text:p>name: Daniel Ek; role: Owner, Investor</text:p>
          </table:table-cell>
          <table:table-cell office:value-type="string" table:style-name="ce1">
            <text:p>./assets/noun-person-2649456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cherf</text:p>
          </table:table-cell>
          <table:table-cell office:value-type="string" table:style-name="ce1">
            <text:p>Gundbert Scherf</text:p>
          </table:table-cell>
          <table:table-cell office:value-type="string" table:style-name="ce1">
            <text:p>Owner</text:p>
          </table:table-cell>
          <table:table-cell table:style-name="ce1"/>
          <table:table-cell office:value-type="string" office:string-value="name: Gundbert Scherf; role: Owner" table:formula="of:= COM.MICROSOFT.CONCAT(&quot;name: &quot;;[.B9]; &quot;; role: &quot;; [.C9])" table:style-name="ce12">
            <text:p>name: Gundbert Scherf; role: Owner</text:p>
          </table:table-cell>
          <table:table-cell office:value-type="string" table:style-name="ce1">
            <text:p>./assets/noun-person-2649456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il</text:p>
          </table:table-cell>
          <table:table-cell office:value-type="string" table:style-name="ce1">
            <text:p>Torsten Reil</text:p>
          </table:table-cell>
          <table:table-cell office:value-type="string" table:style-name="ce1">
            <text:p>Owner</text:p>
          </table:table-cell>
          <table:table-cell table:style-name="ce1"/>
          <table:table-cell office:value-type="string" office:string-value="name: Torsten Reil; role: Owner" table:formula="of:= COM.MICROSOFT.CONCAT(&quot;name: &quot;;[.B10]; &quot;; role: &quot;; [.C10])" table:style-name="ce12">
            <text:p>name: Torsten Reil; role: Owner</text:p>
          </table:table-cell>
          <table:table-cell office:value-type="string" table:style-name="ce1">
            <text:p>./assets/noun-person-2649456.png</text:p>
          </table:table-cell>
          <table:table-cell table:number-columns-repeated="16378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E_connection" table:style-name="ta2">
        <table:table-column table:style-name="co2" table:number-columns-repeated="16384" table:default-cell-style-name="ce1"/>
        <table:table-row table:style-name="ro1">
          <table:table-cell office:value-type="string" table:style-name="ce4">
            <text:p>source</text:p>
          </table:table-cell>
          <table:table-cell office:value-type="string" table:style-name="ce4">
            <text:p>target</text:p>
          </table:table-cell>
          <table:table-cell office:value-type="string" table:style-name="ce4">
            <text:p>label</text:p>
          </table:table-cell>
          <table:table-cell office:value-type="string" table:style-name="ce4">
            <text:p>width</text:p>
          </table:table-cell>
          <table:table-cell office:value-type="string" table:style-name="ce4">
            <text:p>hover</text:p>
          </table:table-cell>
          <table:table-cell office:value-type="string" table:style-name="ce4">
            <text:p>source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DARPA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Unit8200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K</text:p>
          </table:table-cell>
          <table:table-cell office:value-type="string" table:style-name="ce1">
            <text:p>UKDSTL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K</text:p>
          </table:table-cell>
          <table:table-cell office:value-type="string" table:style-name="ce1">
            <text:p>UKDES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lackRock</text:p>
          </table:table-cell>
          <table:table-cell office:value-type="string" table:style-name="ce1">
            <text:p>Stanford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RI</text:p>
          </table:table-cell>
          <table:table-cell office:value-type="string" table:style-name="ce1">
            <text:p>Stanford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elsing</text:p>
          </table:table-cell>
          <table:table-cell office:value-type="string" table:style-name="ce1">
            <text:p>Palantir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lackRock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FRS</text:p>
          </table:table-cell>
          <table:table-cell office:value-type="string" table:style-name="ce1">
            <text:p>Clearview</text:p>
          </table:table-cell>
          <table:table-cell office:value-type="string" table:style-name="ce1">
            <text:p>simila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thropic</text:p>
          </table:table-cell>
          <table:table-cell office:value-type="string" table:style-name="ce1">
            <text:p>Palantir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thropic</text:p>
          </table:table-cell>
          <table:table-cell office:value-type="string" table:style-name="ce1">
            <text:p>AWS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Jordan</text:p>
          </table:table-cell>
          <table:table-cell office:value-type="string" table:style-name="ce1">
            <text:p>Syria</text:p>
          </table:table-cell>
          <table:table-cell office:value-type="string" table:style-name="ce1">
            <text:p>refugees fro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icrosoft</text:p>
          </table:table-cell>
          <table:table-cell office:value-type="string" table:style-name="ce1">
            <text:p>OpenAI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racle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oogle</text:p>
          </table:table-cell>
          <table:table-cell office:value-type="string" table:style-name="ce1">
            <text:p>GoogleCloud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mazon</text:p>
          </table:table-cell>
          <table:table-cell office:value-type="string" table:style-name="ce1">
            <text:p>AWS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phabet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crosoft</text:p>
          </table:table-cell>
          <table:table-cell office:value-type="string" table:style-name="ce1">
            <text:p>Azure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Mamram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lama</text:p>
          </table:table-cell>
          <table:table-cell office:value-type="string" table:style-name="ce1">
            <text:p>Lockheed</text:p>
          </table:table-cell>
          <table:table-cell office:value-type="string" table:style-name="ce1">
            <text:p>incorporate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lama</text:p>
          </table:table-cell>
          <table:table-cell office:value-type="string" table:style-name="ce1">
            <text:p>Booz</text:p>
          </table:table-cell>
          <table:table-cell office:value-type="string" table:style-name="ce1">
            <text:p>incorporate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lama</text:p>
          </table:table-cell>
          <table:table-cell office:value-type="string" table:style-name="ce1">
            <text:p>PLA-PRC</text:p>
          </table:table-cell>
          <table:table-cell office:value-type="string" table:style-name="ce1">
            <text:p>incorporate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lama</text:p>
          </table:table-cell>
          <table:table-cell office:value-type="string" table:style-name="ce1">
            <text:p>Anduril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lama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lama</text:p>
          </table:table-cell>
          <table:table-cell office:value-type="string" table:style-name="ce1">
            <text:p>Booz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lama</text:p>
          </table:table-cell>
          <table:table-cell office:value-type="string" table:style-name="ce1">
            <text:p>Deloitte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lama</text:p>
          </table:table-cell>
          <table:table-cell office:value-type="string" table:style-name="ce1">
            <text:p>IBM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lama</text:p>
          </table:table-cell>
          <table:table-cell office:value-type="string" table:style-name="ce1">
            <text:p>Oracle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lama</text:p>
          </table:table-cell>
          <table:table-cell office:value-type="string" table:style-name="ce1">
            <text:p>Databricks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lama</text:p>
          </table:table-cell>
          <table:table-cell office:value-type="string" table:style-name="ce1">
            <text:p>Leidos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lama</text:p>
          </table:table-cell>
          <table:table-cell office:value-type="string" table:style-name="ce1">
            <text:p>ScaleAI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lama</text:p>
          </table:table-cell>
          <table:table-cell office:value-type="string" table:style-name="ce1">
            <text:p>Snowflake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rtex</text:p>
          </table:table-cell>
          <table:table-cell office:value-type="string" table:style-name="ce1">
            <text:p>Gemini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KR</text:p>
          </table:table-cell>
          <table:table-cell office:value-type="string" table:style-name="ce1">
            <text:p>GTR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KR</text:p>
          </table:table-cell>
          <table:table-cell office:value-type="string" table:style-name="ce1">
            <text:p>Vantage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KR</text:p>
          </table:table-cell>
          <table:table-cell office:value-type="string" table:style-name="ce1">
            <text:p>Hyperoptic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duril</text:p>
          </table:table-cell>
          <table:table-cell office:value-type="string" table:style-name="ce1">
            <text:p>Oculus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duril</text:p>
          </table:table-cell>
          <table:table-cell office:value-type="string" table:style-name="ce1">
            <text:p>Azure</text:p>
          </table:table-cell>
          <table:table-cell office:value-type="string" table:style-name="ce1">
            <text:p>relies o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ndeskriminalamt</text:p>
          </table:table-cell>
          <table:table-cell office:value-type="string" table:style-name="ce1">
            <text:p>Palantir</text:p>
          </table:table-cell>
          <table:table-cell office:value-type="string" table:style-name="ce1">
            <text:p>contract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ZA</text:p>
          </table:table-cell>
          <table:table-cell office:value-type="string" table:style-name="ce1">
            <text:p>MIT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NHCR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NHCR</text:p>
          </table:table-cell>
          <table:table-cell office:value-type="string" table:style-name="ce1">
            <text:p>Syria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NHCR</text:p>
          </table:table-cell>
          <table:table-cell office:value-type="string" table:style-name="ce1">
            <text:p>Palestine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LA-PR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ANA</text:p>
          </table:table-cell>
          <table:table-cell office:value-type="string" table:style-name="ce1">
            <text:p>NATO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HS</text:p>
          </table:table-cell>
          <table:table-cell office:value-type="string" table:style-name="ce1">
            <text:p>UK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O</text:p>
          </table:table-cell>
          <table:table-cell office:value-type="string" table:style-name="ce1">
            <text:p>UK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ATO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part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ATO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member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ATO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member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ATO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member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nford</text:p>
          </table:table-cell>
          <table:table-cell office:value-type="string" table:style-name="ce1">
            <text:p>ARPANET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hatsApp</text:p>
          </table:table-cell>
          <table:table-cell office:value-type="string" table:style-name="ce1">
            <text:p>Lavender</text:p>
          </table:table-cell>
          <table:table-cell office:value-type="string" table:style-name="ce1">
            <text:p>provides data t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ndeavor</text:p>
          </table:table-cell>
          <table:table-cell office:value-type="string" table:style-name="ce1">
            <text:p>iRobot</text:p>
          </table:table-cell>
          <table:table-cell office:value-type="string" table:style-name="ce1">
            <text:p>renam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copley</text:p>
          </table:table-cell>
          <table:table-cell office:value-type="string" table:style-name="ce1">
            <text:p>Niantic</text:p>
          </table:table-cell>
          <table:table-cell office:value-type="string" table:style-name="ce1">
            <text:p>sold t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ri</text:p>
          </table:table-cell>
          <table:table-cell office:value-type="string" table:style-name="ce1">
            <text:p>CALO</text:p>
          </table:table-cell>
          <table:table-cell office:value-type="string" table:style-name="ce1">
            <text:p>based o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Palantir</text:p>
          </table:table-cell>
          <table:table-cell office:value-type="string" table:style-name="ce1">
            <text:p>contract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anishNP</text:p>
          </table:table-cell>
          <table:table-cell office:value-type="string" table:style-name="ce1">
            <text:p>Palantir</text:p>
          </table:table-cell>
          <table:table-cell office:value-type="string" table:style-name="ce1">
            <text:p>contract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HS</text:p>
          </table:table-cell>
          <table:table-cell office:value-type="string" table:style-name="ce1">
            <text:p>Palantir</text:p>
          </table:table-cell>
          <table:table-cell office:value-type="string" table:style-name="ce1">
            <text:p>contract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ooz</text:p>
          </table:table-cell>
          <table:table-cell office:value-type="string" table:style-name="ce1">
            <text:p>Palantir</text:p>
          </table:table-cell>
          <table:table-cell office:value-type="string" table:style-name="ce1">
            <text:p>subcontract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m.go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lantir</text:p>
          </table:table-cell>
          <table:table-cell office:value-type="string" table:style-name="ce1">
            <text:p>GDIT</text:p>
          </table:table-cell>
          <table:table-cell office:value-type="string" table:style-name="ce1">
            <text:p>subcontract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m.go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ta</text:p>
          </table:table-cell>
          <table:table-cell office:value-type="string" table:style-name="ce1">
            <text:p>ScaleAI</text:p>
          </table:table-cell>
          <table:table-cell office:value-type="string" table:style-name="ce1">
            <text:p>invests 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ackRock</text:p>
          </table:table-cell>
          <table:table-cell office:value-type="string" table:style-name="ce1">
            <text:p>Palantir</text:p>
          </table:table-cell>
          <table:table-cell office:value-type="string" table:style-name="ce1">
            <text:p>invests 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ackRock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invests 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ackRock</text:p>
          </table:table-cell>
          <table:table-cell office:value-type="string" table:style-name="ce1">
            <text:p>Microsoft</text:p>
          </table:table-cell>
          <table:table-cell office:value-type="string" table:style-name="ce1">
            <text:p>invests 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ackRock</text:p>
          </table:table-cell>
          <table:table-cell office:value-type="string" table:style-name="ce1">
            <text:p>Alphabet</text:p>
          </table:table-cell>
          <table:table-cell office:value-type="string" table:style-name="ce1">
            <text:p>invests 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ackRock</text:p>
          </table:table-cell>
          <table:table-cell office:value-type="string" table:style-name="ce1">
            <text:p>IBM</text:p>
          </table:table-cell>
          <table:table-cell office:value-type="string" table:style-name="ce1">
            <text:p>invests 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guard</text:p>
          </table:table-cell>
          <table:table-cell office:value-type="string" table:style-name="ce1">
            <text:p>Palantir</text:p>
          </table:table-cell>
          <table:table-cell office:value-type="string" table:style-name="ce1">
            <text:p>invests 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rizon</text:p>
          </table:table-cell>
          <table:table-cell office:value-type="string" table:style-name="ce1">
            <text:p>IBM</text:p>
          </table:table-cell>
          <table:table-cell office:value-type="string" table:style-name="ce1">
            <text:p>invests 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, E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ANA</text:p>
          </table:table-cell>
          <table:table-cell office:value-type="string" table:style-name="ce1">
            <text:p>Mantacus</text:p>
          </table:table-cell>
          <table:table-cell office:value-type="string" table:style-name="ce1">
            <text:p>invests 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ANA</text:p>
          </table:table-cell>
          <table:table-cell office:value-type="string" table:style-name="ce1">
            <text:p>AIVerse</text:p>
          </table:table-cell>
          <table:table-cell office:value-type="string" table:style-name="ce1">
            <text:p>invests 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ANA</text:p>
          </table:table-cell>
          <table:table-cell office:value-type="string" table:style-name="ce1">
            <text:p>Vector</text:p>
          </table:table-cell>
          <table:table-cell office:value-type="string" table:style-name="ce1">
            <text:p>invests 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xon</text:p>
          </table:table-cell>
          <table:table-cell office:value-type="string" table:style-name="ce1">
            <text:p>USPD</text:p>
          </table:table-cell>
          <table:table-cell office:value-type="string" table:style-name="ce1">
            <text:p>contract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e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xon</text:p>
          </table:table-cell>
          <table:table-cell office:value-type="string" table:style-name="ce1">
            <text:p>Citizen</text:p>
          </table:table-cell>
          <table:table-cell office:value-type="string" table:style-name="ce1">
            <text:p>provides data t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x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xon</text:p>
          </table:table-cell>
          <table:table-cell office:value-type="string" table:style-name="ce1">
            <text:p>Ring</text:p>
          </table:table-cell>
          <table:table-cell office:value-type="string" table:style-name="ce1">
            <text:p>provides data t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x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azon</text:p>
          </table:table-cell>
          <table:table-cell office:value-type="string" table:style-name="ce1">
            <text:p>Ring</text:p>
          </table:table-cell>
          <table:table-cell office:value-type="string" table:style-name="ce1">
            <text:p>own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01V</text:p>
          </table:table-cell>
          <table:table-cell office:value-type="string" table:style-name="ce1">
            <text:p>Delian</text:p>
          </table:table-cell>
          <table:table-cell office:value-type="string" table:style-name="ce1">
            <text:p>invests 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ortugal</text:p>
          </table:table-cell>
          <table:table-cell office:value-type="string" table:style-name="ce1">
            <text:p>Tekever</text:p>
          </table:table-cell>
          <table:table-cell office:value-type="string" table:style-name="ce1">
            <text:p>contract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k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F</text:p>
          </table:table-cell>
          <table:table-cell office:value-type="string" table:style-name="ce1">
            <text:p>ARX</text:p>
          </table:table-cell>
          <table:table-cell office:value-type="string" table:style-name="ce1">
            <text:p>invests 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O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ember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O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ember of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F</text:p>
          </table:table-cell>
          <table:table-cell office:value-type="string" table:style-name="ce1">
            <text:p>Tekever</text:p>
          </table:table-cell>
          <table:table-cell office:value-type="string" table:style-name="ce1">
            <text:p>invests 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</text:p>
          </table:table-cell>
          <table:table-cell office:value-type="string" table:style-name="ce1">
            <text:p>Airbus</text:p>
          </table:table-cell>
          <table:table-cell office:value-type="string" table:style-name="ce1">
            <text:p>partners with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</text:p>
          </table:table-cell>
          <table:table-cell office:value-type="string" table:style-name="ce1">
            <text:p>Fraunhofer</text:p>
          </table:table-cell>
          <table:table-cell office:value-type="string" table:style-name="ce1">
            <text:p>partners with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illeGifford</text:p>
          </table:table-cell>
          <table:table-cell office:value-type="string" table:style-name="ce1">
            <text:p>Tekever</text:p>
          </table:table-cell>
          <table:table-cell office:value-type="string" table:style-name="ce1">
            <text:p>invests 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illeGifford</text:p>
          </table:table-cell>
          <table:table-cell office:value-type="string" table:style-name="ce1">
            <text:p>Spotify</text:p>
          </table:table-cell>
          <table:table-cell office:value-type="string" table:style-name="ce1">
            <text:p>invests 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488" table:style-name="ro1">
          <table:table-cell table:number-columns-repeated="16384"/>
        </table:table-row>
      </table:table>
      <table:table table:name="E_isDevelopedBy" table:style-name="ta1">
        <table:table-column table:style-name="co4" table:default-cell-style-name="ce1"/>
        <table:table-column table:style-name="co15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4">
            <text:p>target</text:p>
          </table:table-cell>
          <table:table-cell office:value-type="string" table:style-name="ce4">
            <text:p>source</text:p>
          </table:table-cell>
          <table:table-cell office:value-type="string" table:style-name="ce4">
            <text:p>label</text:p>
          </table:table-cell>
          <table:table-cell office:value-type="string" table:style-name="ce4">
            <text:p>weight</text:p>
          </table:table-cell>
          <table:table-cell office:value-type="string" table:style-name="ce4">
            <text:p>hover</text:p>
          </table:table-cell>
          <table:table-cell table:number-columns-repeated="16379" table:style-name="ce4"/>
        </table:table-row>
        <table:table-row table:style-name="ro1">
          <table:table-cell office:value-type="string" table:style-name="ce1">
            <text:p>Niantic</text:p>
          </table:table-cell>
          <table:table-cell office:value-type="string" table:style-name="ce1">
            <text:p>LargeGeospatialModel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PolygraphPlu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nit8200</text:p>
          </table:table-cell>
          <table:table-cell office:value-type="string" table:style-name="ce1">
            <text:p>Lavender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nit8200</text:p>
          </table:table-cell>
          <table:table-cell office:value-type="string" table:style-name="ce1">
            <text:p>WheresDaddy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lbit</text:p>
          </table:table-cell>
          <table:table-cell office:value-type="string" table:style-name="ce1">
            <text:p>LegionX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nit8200</text:p>
          </table:table-cell>
          <table:table-cell office:value-type="string" table:style-name="ce1">
            <text:p>WolfPack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alantir</text:p>
          </table:table-cell>
          <table:table-cell office:value-type="string" table:style-name="ce1">
            <text:p>AIP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alantir</text:p>
          </table:table-cell>
          <table:table-cell office:value-type="string" table:style-name="ce1">
            <text:p>MetaConstellation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learviewAI</text:p>
          </table:table-cell>
          <table:table-cell office:value-type="string" table:style-name="ce1">
            <text:p>Clearview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oboneers</text:p>
          </table:table-cell>
          <table:table-cell office:value-type="string" table:style-name="ce1">
            <text:p>Wolly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yriy</text:p>
          </table:table-cell>
          <table:table-cell office:value-type="string" table:style-name="ce1">
            <text:p>FirstPOVDrone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G</text:p>
          </table:table-cell>
          <table:table-cell office:value-type="string" table:style-name="ce1">
            <text:p>FirstPOVDrone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KDSTL</text:p>
          </table:table-cell>
          <table:table-cell office:value-type="string" table:style-name="ce1">
            <text:p>MAPLE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nit8200</text:p>
          </table:table-cell>
          <table:table-cell office:value-type="string" table:style-name="ce1">
            <text:p>Gospel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nit8200</text:p>
          </table:table-cell>
          <table:table-cell office:value-type="string" table:style-name="ce1">
            <text:p>Alchemist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oogle</text:p>
          </table:table-cell>
          <table:table-cell office:value-type="string" table:style-name="ce1">
            <text:p>Nimbu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WS</text:p>
          </table:table-cell>
          <table:table-cell office:value-type="string" table:style-name="ce1">
            <text:p>Nimbu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bit</text:p>
          </table:table-cell>
          <table:table-cell office:value-type="string" table:style-name="ce1">
            <text:p>ARCA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LAW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lantir</text:p>
          </table:table-cell>
          <table:table-cell office:value-type="string" table:style-name="ce1">
            <text:p>Gotham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RPA</text:p>
          </table:table-cell>
          <table:table-cell office:value-type="string" table:style-name="ce1">
            <text:p>JEDI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fael</text:p>
          </table:table-cell>
          <table:table-cell office:value-type="string" table:style-name="ce1">
            <text:p>FireWeaver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fael</text:p>
          </table:table-cell>
          <table:table-cell office:value-type="string" table:style-name="ce1">
            <text:p>FireFactory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DIA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AFR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aceX</text:p>
          </table:table-cell>
          <table:table-cell office:value-type="string" table:style-name="ce1">
            <text:p>Starshield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aceX</text:p>
          </table:table-cell>
          <table:table-cell office:value-type="string" table:style-name="ce1">
            <text:p>Starlink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ussia</text:p>
          </table:table-cell>
          <table:table-cell office:value-type="string" table:style-name="ce1">
            <text:p>Pantir-SM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RedWolf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BlueWolf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KH</text:p>
          </table:table-cell>
          <table:table-cell office:value-type="string" table:style-name="ce1">
            <text:p>Mabat2000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RPA</text:p>
          </table:table-cell>
          <table:table-cell office:value-type="string" table:style-name="ce1">
            <text:p>URSA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einmetall</text:p>
          </table:table-cell>
          <table:table-cell office:value-type="string" table:style-name="ce1">
            <text:p>TacNet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yria</text:p>
          </table:table-cell>
          <table:table-cell office:value-type="string" table:style-name="ce1">
            <text:p>Bylina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ogle</text:p>
          </table:table-cell>
          <table:table-cell office:value-type="string" table:style-name="ce1">
            <text:p>Maven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lington</text:p>
          </table:table-cell>
          <table:table-cell office:value-type="string" table:style-name="ce1">
            <text:p>PackBot</text:p>
          </table:table-cell>
          <table:table-cell office:value-type="string" table:style-name="ce1">
            <text:p>develop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kraine</text:p>
          </table:table-cell>
          <table:table-cell office:value-type="string" table:style-name="ce1">
            <text:p>GISArta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Skynet-U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RobotRiotControl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yonggiUniversity</text:p>
          </table:table-cell>
          <table:table-cell office:value-type="string" table:style-name="ce1">
            <text:p>PrisonGuard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O</text:p>
          </table:table-cell>
          <table:table-cell office:value-type="string" table:style-name="ce1">
            <text:p>Pegasu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fael</text:p>
          </table:table-cell>
          <table:table-cell office:value-type="string" table:style-name="ce1">
            <text:p>SentryTech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DAAM</text:p>
          </table:table-cell>
          <table:table-cell office:value-type="string" table:style-name="ce1">
            <text:p>SuperAegi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nwhaTechwin-Samsung</text:p>
          </table:table-cell>
          <table:table-cell office:value-type="string" table:style-name="ce1">
            <text:p>SentryRobot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PRISM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RI</text:p>
          </table:table-cell>
          <table:table-cell office:value-type="string" table:style-name="ce1">
            <text:p>DynaSpeak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RPA</text:p>
          </table:table-cell>
          <table:table-cell office:value-type="string" table:style-name="ce1">
            <text:p>CALO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GoldenShield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SharpEye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Skynet-PRC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RI</text:p>
          </table:table-cell>
          <table:table-cell office:value-type="string" table:style-name="ce1">
            <text:p>CALO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wissInstitute</text:p>
          </table:table-cell>
          <table:table-cell office:value-type="string" table:style-name="ce1">
            <text:p>CALO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uthKorea</text:p>
          </table:table-cell>
          <table:table-cell office:value-type="string" table:style-name="ce1">
            <text:p>RobotRiotControl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ussia</text:p>
          </table:table-cell>
          <table:table-cell office:value-type="string" table:style-name="ce1">
            <text:p>Bylina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kvision</text:p>
          </table:table-cell>
          <table:table-cell office:value-type="string" table:style-name="ce1">
            <text:p>Mabat2000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rkey</text:p>
          </table:table-cell>
          <table:table-cell office:value-type="string" table:style-name="ce1">
            <text:p>LAW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LAW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kyeton</text:p>
          </table:table-cell>
          <table:table-cell office:value-type="string" table:style-name="ce1">
            <text:p>FirstPOVDrone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warmer</text:p>
          </table:table-cell>
          <table:table-cell office:value-type="string" table:style-name="ce1">
            <text:p>FirstPOVDrone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3</text:p>
          </table:table-cell>
          <table:table-cell office:value-type="string" table:style-name="ce1">
            <text:p>Wolly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esage</text:p>
          </table:table-cell>
          <table:table-cell office:value-type="string" table:style-name="ce1">
            <text:p>PolygraphPlu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tec</text:p>
          </table:table-cell>
          <table:table-cell office:value-type="string" table:style-name="ce1">
            <text:p>PolygraphPlu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racle</text:p>
          </table:table-cell>
          <table:table-cell office:value-type="string" table:style-name="ce1">
            <text:p>JEDI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BM</text:p>
          </table:table-cell>
          <table:table-cell office:value-type="string" table:style-name="ce1">
            <text:p>JEDI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ogleCloud</text:p>
          </table:table-cell>
          <table:table-cell office:value-type="string" table:style-name="ce1">
            <text:p>JEDI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crosoft</text:p>
          </table:table-cell>
          <table:table-cell office:value-type="string" table:style-name="ce1">
            <text:p>JEDI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WS</text:p>
          </table:table-cell>
          <table:table-cell office:value-type="string" table:style-name="ce1">
            <text:p>JEDI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lsing</text:p>
          </table:table-cell>
          <table:table-cell office:value-type="string" table:style-name="ce1">
            <text:p>Wolly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inetiQ</text:p>
          </table:table-cell>
          <table:table-cell office:value-type="string" table:style-name="ce1">
            <text:p>MAPLE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eavor</text:p>
          </table:table-cell>
          <table:table-cell office:value-type="string" table:style-name="ce1">
            <text:p>PackBot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ckRock</text:p>
          </table:table-cell>
          <table:table-cell office:value-type="string" table:style-name="ce1">
            <text:p>Mabat2000</text:p>
          </table:table-cell>
          <table:table-cell office:value-type="string" table:style-name="ce1">
            <text:p>develop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Robot</text:p>
          </table:table-cell>
          <table:table-cell office:value-type="string" table:style-name="ce1">
            <text:p>Roomba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thropic</text:p>
          </table:table-cell>
          <table:table-cell office:value-type="string" table:style-name="ce1">
            <text:p>Claude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ta</text:p>
          </table:table-cell>
          <table:table-cell office:value-type="string" table:style-name="ce1">
            <text:p>Llama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ta</text:p>
          </table:table-cell>
          <table:table-cell office:value-type="string" table:style-name="ce1">
            <text:p>Facebook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ta</text:p>
          </table:table-cell>
          <table:table-cell office:value-type="string" table:style-name="ce1">
            <text:p>WhatsApp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Robot</text:p>
          </table:table-cell>
          <table:table-cell office:value-type="string" table:style-name="ce1">
            <text:p>PackBot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uril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nAI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nAI</text:p>
          </table:table-cell>
          <table:table-cell office:value-type="string" table:style-name="ce1">
            <text:p>ChatGPT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ogle</text:p>
          </table:table-cell>
          <table:table-cell office:value-type="string" table:style-name="ce1">
            <text:p>Gemini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KR</text:p>
          </table:table-cell>
          <table:table-cell office:value-type="string" table:style-name="ce1">
            <text:p>DoorDash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crosoft</text:p>
          </table:table-cell>
          <table:table-cell office:value-type="string" table:style-name="ce1">
            <text:p>Hololen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opley</text:p>
          </table:table-cell>
          <table:table-cell office:value-type="string" table:style-name="ce1">
            <text:p>LargeGeospatialModel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udi</text:p>
          </table:table-cell>
          <table:table-cell office:value-type="string" table:style-name="ce1">
            <text:p>LargeGeospatialModel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iantic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BM</text:p>
          </table:table-cell>
          <table:table-cell office:value-type="string" table:style-name="ce1">
            <text:p>Dehomag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BM</text:p>
          </table:table-cell>
          <table:table-cell office:value-type="string" table:style-name="ce1">
            <text:p>Translator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BM</text:p>
          </table:table-cell>
          <table:table-cell office:value-type="string" table:style-name="ce1">
            <text:p>Shoebox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lantir</text:p>
          </table:table-cell>
          <table:table-cell office:value-type="string" table:style-name="ce1">
            <text:p>Foundry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RPA</text:p>
          </table:table-cell>
          <table:table-cell office:value-type="string" table:style-name="ce1">
            <text:p>ARPANET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Siri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lantir</text:p>
          </table:table-cell>
          <table:table-cell office:value-type="string" table:style-name="ce1">
            <text:p>Maven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DIT</text:p>
          </table:table-cell>
          <table:table-cell office:value-type="string" table:style-name="ce1">
            <text:p>Medicare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rsight</text:p>
          </table:table-cell>
          <table:table-cell office:value-type="string" table:style-name="ce1">
            <text:p>Fortify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uril</text:p>
          </table:table-cell>
          <table:table-cell office:value-type="string" table:style-name="ce1">
            <text:p>Sentry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ntacus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S</text:p>
          </table:table-cell>
          <table:table-cell office:value-type="string" table:style-name="ce1">
            <text:p>Vector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uril</text:p>
          </table:table-cell>
          <table:table-cell office:value-type="string" table:style-name="ce1">
            <text:p>EagleEye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EagleEye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lian</text:p>
          </table:table-cell>
          <table:table-cell office:value-type="string" table:style-name="ce1">
            <text:p>Jericho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kever</text:p>
          </table:table-cell>
          <table:table-cell office:value-type="string" table:style-name="ce1">
            <text:p>Atla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X</text:p>
          </table:table-cell>
          <table:table-cell office:value-type="string" table:style-name="ce1">
            <text:p>Mithra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aleAI</text:p>
          </table:table-cell>
          <table:table-cell office:value-type="string" table:style-name="ce1">
            <text:p>Donovan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U</text:p>
          </table:table-cell>
          <table:table-cell office:value-type="string" table:style-name="ce1">
            <text:p>Donovan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aleAI</text:p>
          </table:table-cell>
          <table:table-cell office:value-type="string" table:style-name="ce1">
            <text:p>Outlier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ieldAI</text:p>
          </table:table-cell>
          <table:table-cell office:value-type="string" table:style-name="ce1">
            <text:p>Hivemind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U</text:p>
          </table:table-cell>
          <table:table-cell office:value-type="string" table:style-name="ce1">
            <text:p>Hivemind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aleAI</text:p>
          </table:table-cell>
          <table:table-cell office:value-type="string" table:style-name="ce1">
            <text:p>Thunderforge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crosoft</text:p>
          </table:table-cell>
          <table:table-cell office:value-type="string" table:style-name="ce1">
            <text:p>Thunderforge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uril</text:p>
          </table:table-cell>
          <table:table-cell office:value-type="string" table:style-name="ce1">
            <text:p>Thunderforge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lsing</text:p>
          </table:table-cell>
          <table:table-cell office:value-type="string" table:style-name="ce1">
            <text:p>Centaur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lsing</text:p>
          </table:table-cell>
          <table:table-cell office:value-type="string" table:style-name="ce1">
            <text:p>Altra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ta</text:p>
          </table:table-cell>
          <table:table-cell office:value-type="string" table:style-name="ce1">
            <text:p>Instagram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number-rows-repeated="1048461" table:style-name="ro1">
          <table:table-cell table:number-columns-repeated="16384"/>
        </table:table-row>
      </table:table>
      <table:table table:name="E_isDeployedBy" table:style-name="ta1">
        <table:table-column table:style-name="co13" table:default-cell-style-name="ce1"/>
        <table:table-column table:style-name="co1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4">
            <text:p>target</text:p>
          </table:table-cell>
          <table:table-cell office:value-type="string" table:style-name="ce4">
            <text:p>source</text:p>
          </table:table-cell>
          <table:table-cell office:value-type="string" table:style-name="ce4">
            <text:p>label</text:p>
          </table:table-cell>
          <table:table-cell office:value-type="string" table:style-name="ce4">
            <text:p>weight</text:p>
          </table:table-cell>
          <table:table-cell office:value-type="string" table:style-name="ce4">
            <text:p>hov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LargeGeospatialModels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PolygraphPlus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Lavender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WheresDaddy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LegionX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WolfPack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AIP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MetaConstellation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Clearview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kraine</text:p>
          </table:table-cell>
          <table:table-cell office:value-type="string" table:style-name="ce1">
            <text:p>Wolly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kraine</text:p>
          </table:table-cell>
          <table:table-cell office:value-type="string" table:style-name="ce1">
            <text:p>FirstPOVDrones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K</text:p>
          </table:table-cell>
          <table:table-cell office:value-type="string" table:style-name="ce1">
            <text:p>MAPLE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Gospel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Alchemist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Nimbus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ARCA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ibya</text:p>
          </table:table-cell>
          <table:table-cell office:value-type="string" table:style-name="ce1">
            <text:p>LAW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lantir</text:p>
          </table:table-cell>
          <table:table-cell office:value-type="string" table:style-name="ce1">
            <text:p>Gotham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JEDI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FireWeaver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FireFactory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DIAS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AFRS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Starshield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Starlink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ussia</text:p>
          </table:table-cell>
          <table:table-cell office:value-type="string" table:style-name="ce1">
            <text:p>Pantir-SM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RedWolf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BlueWolf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Mabat2000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URSA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TacNet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yria</text:p>
          </table:table-cell>
          <table:table-cell office:value-type="string" table:style-name="ce1">
            <text:p>Bylina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Maven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PackBot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kraine</text:p>
          </table:table-cell>
          <table:table-cell office:value-type="string" table:style-name="ce1">
            <text:p>GISArta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rdan</text:p>
          </table:table-cell>
          <table:table-cell office:value-type="string" table:style-name="ce1">
            <text:p>IrisGuard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Skynet-US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RobotRiotControl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uthKorea</text:p>
          </table:table-cell>
          <table:table-cell office:value-type="string" table:style-name="ce1">
            <text:p>PrisonGuard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Pegasus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SentryTech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uthKorea</text:p>
          </table:table-cell>
          <table:table-cell office:value-type="string" table:style-name="ce1">
            <text:p>SuperAegis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uthKorea</text:p>
          </table:table-cell>
          <table:table-cell office:value-type="string" table:style-name="ce1">
            <text:p>SentryRobot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PRISM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DynaSpeak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CALO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GoldenShield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SharpEyes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Skynet-PRC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kraine</text:p>
          </table:table-cell>
          <table:table-cell office:value-type="string" table:style-name="ce1">
            <text:p>MetaConstellation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kraine</text:p>
          </table:table-cell>
          <table:table-cell office:value-type="string" table:style-name="ce1">
            <text:p>Clearview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HCR</text:p>
          </table:table-cell>
          <table:table-cell office:value-type="string" table:style-name="ce1">
            <text:p>IrisGuard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ussia</text:p>
          </table:table-cell>
          <table:table-cell office:value-type="string" table:style-name="ce1">
            <text:p>Bylina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ussia</text:p>
          </table:table-cell>
          <table:table-cell office:value-type="string" table:style-name="ce1">
            <text:p>LAW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zerbaijan</text:p>
          </table:table-cell>
          <table:table-cell office:value-type="string" table:style-name="ce1">
            <text:p>LAW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kraine</text:p>
          </table:table-cell>
          <table:table-cell office:value-type="string" table:style-name="ce1">
            <text:p>Starlink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Pegasus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T</text:p>
          </table:table-cell>
          <table:table-cell office:value-type="string" table:style-name="ce1">
            <text:p>ARPANET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ckheed</text:p>
          </table:table-cell>
          <table:table-cell office:value-type="string" table:style-name="ce1">
            <text:p>Llama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lantir</text:p>
          </table:table-cell>
          <table:table-cell office:value-type="string" table:style-name="ce1">
            <text:p>Llama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z</text:p>
          </table:table-cell>
          <table:table-cell office:value-type="string" table:style-name="ce1">
            <text:p>Llama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Foundry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HS</text:p>
          </table:table-cell>
          <table:table-cell office:value-type="string" table:style-name="ce1">
            <text:p>Foundry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ishNP</text:p>
          </table:table-cell>
          <table:table-cell office:value-type="string" table:style-name="ce1">
            <text:p>Gotham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Medicare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Fortify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Fortify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it8200</text:p>
          </table:table-cell>
          <table:table-cell office:value-type="string" table:style-name="ce1">
            <text:p>Fortify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P</text:p>
          </table:table-cell>
          <table:table-cell office:value-type="string" table:style-name="ce1">
            <text:p>Fortify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ericho</text:p>
          </table:table-cell>
          <table:table-cell office:value-type="string" table:style-name="ce1">
            <text:p>UK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K</text:p>
          </table:table-cell>
          <table:table-cell office:value-type="string" table:style-name="ce1">
            <text:p>Atlas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irbus</text:p>
          </table:table-cell>
          <table:table-cell office:value-type="string" table:style-name="ce1">
            <text:p>Hivemind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Hivemind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ndeskriminalamt</text:p>
          </table:table-cell>
          <table:table-cell office:value-type="string" table:style-name="ce1">
            <text:p>Gotham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Axon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P</text:p>
          </table:table-cell>
          <table:table-cell office:value-type="string" table:style-name="ce1">
            <text:p>Sentry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P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Donovan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1048496" table:style-name="ro1">
          <table:table-cell table:number-columns-repeated="16384"/>
        </table:table-row>
      </table:table>
      <table:table table:name="E_place" table:style-name="ta1">
        <table:table-column table:style-name="co2" table:number-columns-repeated="16384" table:default-cell-style-name="ce1"/>
        <table:table-row table:style-name="ro1">
          <table:table-cell office:value-type="string" table:style-name="ce4">
            <text:p>source</text:p>
          </table:table-cell>
          <table:table-cell office:value-type="string" table:style-name="ce4">
            <text:p>target</text:p>
          </table:table-cell>
          <table:table-cell office:value-type="string" table:style-name="ce4">
            <text:p>label</text:p>
          </table:table-cell>
          <table:table-cell office:value-type="string" table:style-name="ce4">
            <text:p>weight</text:p>
          </table:table-cell>
          <table:table-cell office:value-type="string" table:style-name="ce4">
            <text:p>hover</text:p>
          </table:table-cell>
          <table:table-cell table:number-columns-repeated="16379" table:style-name="ce4"/>
        </table:table-row>
        <table:table-row table:style-name="ro1">
          <table:table-cell office:value-type="string" table:style-name="ce1">
            <text:p>Lavender</text:p>
          </table:table-cell>
          <table:table-cell office:value-type="string" table:style-name="ce1">
            <text:p>Palestine</text:p>
          </table:table-cell>
          <table:table-cell office:value-type="string" table:style-name="ce1">
            <text:p>used in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learview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sed in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risGuard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used in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yonggiUniversity</text:p>
          </table:table-cell>
          <table:table-cell office:value-type="string" table:style-name="ce1">
            <text:p>SouthKorea</text:p>
          </table:table-cell>
          <table:table-cell office:value-type="string" table:style-name="ce1">
            <text:p>based in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SO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based in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rlington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based in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ireWeaver</text:p>
          </table:table-cell>
          <table:table-cell office:value-type="string" table:style-name="ce1">
            <text:p>Lebanon</text:p>
          </table:table-cell>
          <table:table-cell office:value-type="string" table:style-name="ce1">
            <text:p>used in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TR</text:p>
          </table:table-cell>
          <table:table-cell office:value-type="string" table:style-name="ce1">
            <text:p>UK</text:p>
          </table:table-cell>
          <table:table-cell office:value-type="string" table:style-name="ce1">
            <text:p>based in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TR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based in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TR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based in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antag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ased in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yperoptic</text:p>
          </table:table-cell>
          <table:table-cell office:value-type="string" table:style-name="ce1">
            <text:p>UK</text:p>
          </table:table-cell>
          <table:table-cell office:value-type="string" table:style-name="ce1">
            <text:p>based in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antag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based in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Translator</text:p>
          </table:table-cell>
          <table:table-cell office:value-type="string" table:style-name="ce1">
            <text:p>used in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Landeskriminalamt</text:p>
          </table:table-cell>
          <table:table-cell office:value-type="string" table:style-name="ce1">
            <text:p>based in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nmark</text:p>
          </table:table-cell>
          <table:table-cell office:value-type="string" table:style-name="ce1">
            <text:p>DanishNP</text:p>
          </table:table-cell>
          <table:table-cell office:value-type="string" table:style-name="ce1">
            <text:p>based in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Corsight</text:p>
          </table:table-cell>
          <table:table-cell office:value-type="string" table:style-name="ce1">
            <text:p>based in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eece</text:p>
          </table:table-cell>
          <table:table-cell office:value-type="string" table:style-name="ce1">
            <text:p>Delian</text:p>
          </table:table-cell>
          <table:table-cell office:value-type="string" table:style-name="ce1">
            <text:p>based in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based in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Helsing</text:p>
          </table:table-cell>
          <table:table-cell office:value-type="string" table:style-name="ce1">
            <text:p>based in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  <table:table table:name="E_people" table:style-name="ta1">
        <table:table-column table:style-name="co2" table:number-columns-repeated="16384" table:default-cell-style-name="ce1"/>
        <table:table-row table:style-name="ro1">
          <table:table-cell office:value-type="string" table:style-name="ce4">
            <text:p>source</text:p>
          </table:table-cell>
          <table:table-cell office:value-type="string" table:style-name="ce4">
            <text:p>target</text:p>
          </table:table-cell>
          <table:table-cell office:value-type="string" table:style-name="ce4">
            <text:p>label</text:p>
          </table:table-cell>
          <table:table-cell office:value-type="string" table:style-name="ce4">
            <text:p>weight</text:p>
          </table:table-cell>
          <table:table-cell office:value-type="string" table:style-name="ce4">
            <text:p>hover</text:p>
          </table:table-cell>
          <table:table-cell office:value-type="string" table:style-name="ce4">
            <text:p>source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">
            <text:p>Oculus</text:p>
          </table:table-cell>
          <table:table-cell office:value-type="string" table:style-name="ce1">
            <text:p>Luckey</text:p>
          </table:table-cell>
          <table:table-cell office:value-type="string" table:style-name="ce1">
            <text:p>found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nduril</text:p>
          </table:table-cell>
          <table:table-cell office:value-type="string" table:style-name="ce1">
            <text:p>Luckey</text:p>
          </table:table-cell>
          <table:table-cell office:value-type="string" table:style-name="ce1">
            <text:p>found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aceX</text:p>
          </table:table-cell>
          <table:table-cell office:value-type="string" table:style-name="ce1">
            <text:p>Musk</text:p>
          </table:table-cell>
          <table:table-cell office:value-type="string" table:style-name="ce1">
            <text:p>ow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ypal</text:p>
          </table:table-cell>
          <table:table-cell office:value-type="string" table:style-name="ce1">
            <text:p>Thiel</text:p>
          </table:table-cell>
          <table:table-cell office:value-type="string" table:style-name="ce1">
            <text:p>found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lantir</text:p>
          </table:table-cell>
          <table:table-cell office:value-type="string" table:style-name="ce1">
            <text:p>Thiel</text:p>
          </table:table-cell>
          <table:table-cell office:value-type="string" table:style-name="ce1">
            <text:p>ow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racle</text:p>
          </table:table-cell>
          <table:table-cell office:value-type="string" table:style-name="ce1">
            <text:p>Ellison</text:p>
          </table:table-cell>
          <table:table-cell office:value-type="string" table:style-name="ce1">
            <text:p>found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ackRock</text:p>
          </table:table-cell>
          <table:table-cell office:value-type="string" table:style-name="ce1">
            <text:p>Fink</text:p>
          </table:table-cell>
          <table:table-cell office:value-type="string" table:style-name="ce1">
            <text:p>found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nduril</text:p>
          </table:table-cell>
          <table:table-cell office:value-type="string" table:style-name="ce1">
            <text:p>Vance</text:p>
          </table:table-cell>
          <table:table-cell office:value-type="string" table:style-name="ce1">
            <text:p>investo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elsing</text:p>
          </table:table-cell>
          <table:table-cell office:value-type="string" table:style-name="ce1">
            <text:p>Ek</text:p>
          </table:table-cell>
          <table:table-cell office:value-type="string" table:style-name="ce1">
            <text:p>investo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otify</text:p>
          </table:table-cell>
          <table:table-cell office:value-type="string" table:style-name="ce1">
            <text:p>Ek</text:p>
          </table:table-cell>
          <table:table-cell office:value-type="string" table:style-name="ce1">
            <text:p>found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witter</text:p>
          </table:table-cell>
          <table:table-cell office:value-type="string" table:style-name="ce1">
            <text:p>Musk</text:p>
          </table:table-cell>
          <table:table-cell office:value-type="string" table:style-name="ce1">
            <text:p>ow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elsing</text:p>
          </table:table-cell>
          <table:table-cell office:value-type="string" table:style-name="ce1">
            <text:p>Scherf</text:p>
          </table:table-cell>
          <table:table-cell office:value-type="string" table:style-name="ce1">
            <text:p>ow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cKinsey</text:p>
          </table:table-cell>
          <table:table-cell office:value-type="string" table:style-name="ce1">
            <text:p>Scherf</text:p>
          </table:table-cell>
          <table:table-cell office:value-type="string" table:style-name="ce1">
            <text:p>former part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elsing</text:p>
          </table:table-cell>
          <table:table-cell office:value-type="string" table:style-name="ce1">
            <text:p>Reil</text:p>
          </table:table-cell>
          <table:table-cell office:value-type="string" table:style-name="ce1">
            <text:p>ow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ko</text:p>
          </table:table-cell>
          <table:table-cell office:value-type="string" table:style-name="ce1">
            <text:p>Ek</text:p>
          </table:table-cell>
          <table:table-cell office:value-type="string" table:style-name="ce1">
            <text:p>owner</text:p>
          </table:table-cell>
          <table:table-cell table:number-columns-repeated="16381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E_hierarchical" table:style-name="ta1">
        <table:table-column table:style-name="co4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4">
            <text:p>source</text:p>
          </table:table-cell>
          <table:table-cell office:value-type="string" table:style-name="ce4">
            <text:p>targ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_isDeployedBy</text:p>
          </table:table-cell>
          <table:table-cell office:value-type="string" table:style-name="ce1">
            <text:p>N_System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_isDevelopedBy</text:p>
          </table:table-cell>
          <table:table-cell office:value-type="string" table:style-name="ce1">
            <text:p>N_Stakehol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_Stakeholders</text:p>
          </table:table-cell>
          <table:table-cell office:value-type="string" table:style-name="ce1">
            <text:p>ty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_Systems</text:p>
          </table:table-cell>
          <table:table-cell office:value-type="string" table:style-name="ce1">
            <text:p>tas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N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TechCompa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fenseCompa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Milita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Invest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Institu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Util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k</text:p>
          </table:table-cell>
          <table:table-cell office:value-type="string" table:style-name="ce1">
            <text:p>ObjectRecogni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k</text:p>
          </table:table-cell>
          <table:table-cell office:value-type="string" table:style-name="ce1">
            <text:p>imageGene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k</text:p>
          </table:table-cell>
          <table:table-cell office:value-type="string" table:style-name="ce1">
            <text:p>SignalAnalys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k</text:p>
          </table:table-cell>
          <table:table-cell office:value-type="string" table:style-name="ce1">
            <text:p>PatternRecogni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k</text:p>
          </table:table-cell>
          <table:table-cell office:value-type="string" table:style-name="ce1">
            <text:p>Rank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k</text:p>
          </table:table-cell>
          <table:table-cell office:value-type="string" table:style-name="ce1">
            <text:p>Classif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k</text:p>
          </table:table-cell>
          <table:table-cell office:value-type="string" table:style-name="ce1">
            <text:p>FaceRecogni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k</text:p>
          </table:table-cell>
          <table:table-cell office:value-type="string" table:style-name="ce1">
            <text:p>ObjectDetec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k</text:p>
          </table:table-cell>
          <table:table-cell office:value-type="string" table:style-name="ce1">
            <text:p>Photogrammet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k</text:p>
          </table:table-cell>
          <table:table-cell office:value-type="string" table:style-name="ce1">
            <text:p>TransformerMod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k</text:p>
          </table:table-cell>
          <table:table-cell office:value-type="string" table:style-name="ce1">
            <text:p>Recommend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k</text:p>
          </table:table-cell>
          <table:table-cell office:value-type="string" table:style-name="ce1">
            <text:p>SignalAnalys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k</text:p>
          </table:table-cell>
          <table:table-cell office:value-type="string" table:style-name="ce1">
            <text:p>TextAnalys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k</text:p>
          </table:table-cell>
          <table:table-cell office:value-type="string" table:style-name="ce1">
            <text:p>PoseEstimation</text:p>
          </table:table-cell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  <table:table table:name="To_Add" table:style-name="ta2">
        <table:table-column table:style-name="co2" table:number-columns-repeated="16384" table:default-cell-style-name="ce1"/>
        <table:table-row table:style-name="ro1">
          <table:table-cell office:value-type="string" table:style-name="ce4">
            <text:p>TO BE ADD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SixthSense</text:p>
          </table:table-cell>
          <table:table-cell office:value-type="string" table:style-name="ce7">
            <text:p>SixthSense</text:p>
          </table:table-cell>
          <table:table-cell office:value-type="float" office:value="2019" table:style-name="ce7">
            <text:p>2019</text:p>
          </table:table-cell>
          <table:table-cell office:value-type="string" table:style-name="ce7">
            <text:p>Operation</text:p>
          </table:table-cell>
          <table:table-cell table:number-columns-repeated="6" table:style-name="ce7"/>
          <table:table-cell table:style-name="ce18"/>
          <table:table-cell office:value-type="string" table:style-name="ce7">
            <text:p>Prediction, Content</text:p>
          </table:table-cell>
          <table:table-cell table:number-columns-repeated="2" table:style-name="ce7"/>
          <table:table-cell office:value-type="string" office:string-value="year: 2019; type: ; Military use: ; Civic use: ; Purpose: ; Capabilities: Techniques: ; Outputs: Prediction, Content; Risks: ; Impacts: " table:formula="of:= COM.MICROSOFT.CONCAT(&quot;year: &quot;;[.C2]; &quot;; type: &quot;; [.E2]; &quot;; Military use: &quot;; [.F2]; &quot;; Civic use: &quot;; [.G2]; &quot;; Purpose: &quot;; [.I2]; &quot;; Capabilities: &quot;; [.J2]; &quot;Techniques: &quot;; [.K2]; &quot;; Outputs: &quot;; [.L2]; &quot;; Risks: &quot;; [.M2]; &quot;; Impacts: &quot;; [.N2])" table:style-name="ce19">
            <text:p>year: 2019; type: ; Military use: ; Civic use: ; Purpose: ; Capabilities: Techniques: ; Outputs: Prediction, Content; Risks: ; Impacts:<text:s/></text:p>
          </table:table-cell>
          <table:table-cell office:value-type="string" table:style-name="ce7">
            <text:p>./assets/noun-data-science-6432260.png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rismSupervisor</text:p>
          </table:table-cell>
          <table:table-cell office:value-type="string" table:style-name="ce7">
            <text:p>Prism Supervisor</text:p>
          </table:table-cell>
          <table:table-cell office:value-type="float" office:value="2025" table:style-name="ce7">
            <text:p>2025</text:p>
          </table:table-cell>
          <table:table-cell office:value-type="string" table:style-name="ce7">
            <text:p>Deployment</text:p>
          </table:table-cell>
          <table:table-cell table:number-columns-repeated="6" table:style-name="ce7"/>
          <table:table-cell table:style-name="ce18"/>
          <table:table-cell table:number-columns-repeated="3" table:style-name="ce7"/>
          <table:table-cell office:value-type="string" office:string-value="year: 2025; type: ; Military use: ; Civic use: ; Purpose: ; Capabilities: Techniques: ; Outputs: ; Risks: ; Impacts: " table:formula="of:= COM.MICROSOFT.CONCAT(&quot;year: &quot;;[.C3]; &quot;; type: &quot;; [.E3]; &quot;; Military use: &quot;; [.F3]; &quot;; Civic use: &quot;; [.G3]; &quot;; Purpose: &quot;; [.I3]; &quot;; Capabilities: &quot;; [.J3]; &quot;Techniques: &quot;; [.K3]; &quot;; Outputs: &quot;; [.L3]; &quot;; Risks: &quot;; [.M3]; &quot;; Impacts: &quot;; [.N3])" table:style-name="ce19">
            <text:p>year: 2025; type: ; Military use: ; Civic use: ; Purpose: ; Capabilities: Techniques: ; Outputs: ; Risks: ; Impacts:<text:s/></text:p>
          </table:table-cell>
          <table:table-cell office:value-type="string" table:style-name="ce7">
            <text:p>./assets/noun-surveillance-monitor-6831349.png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AskSage</text:p>
          </table:table-cell>
          <table:table-cell office:value-type="string" table:style-name="ce7">
            <text:p>Ask Sage</text:p>
          </table:table-cell>
          <table:table-cell office:value-type="float" office:value="2024" table:style-name="ce7">
            <text:p>2024</text:p>
          </table:table-cell>
          <table:table-cell office:value-type="string" table:style-name="ce7">
            <text:p>Deployment</text:p>
          </table:table-cell>
          <table:table-cell office:value-type="string" table:style-name="ce7">
            <text:p>ConversationalAI</text:p>
          </table:table-cell>
          <table:table-cell table:number-columns-repeated="5" table:style-name="ce7"/>
          <table:table-cell table:style-name="ce18"/>
          <table:table-cell table:number-columns-repeated="3" table:style-name="ce7"/>
          <table:table-cell office:value-type="string" office:string-value="year: 2024; type: ConversationalAI; Military use: ; Civic use: ; Purpose: ; Capabilities: Techniques: ; Outputs: ; Risks: ; Impacts: " table:formula="of:= COM.MICROSOFT.CONCAT(&quot;year: &quot;;[.C5]; &quot;; type: &quot;; [.E5]; &quot;; Military use: &quot;; [.F5]; &quot;; Civic use: &quot;; [.G5]; &quot;; Purpose: &quot;; [.I5]; &quot;; Capabilities: &quot;; [.J5]; &quot;Techniques: &quot;; [.K5]; &quot;; Outputs: &quot;; [.L5]; &quot;; Risks: &quot;; [.M5]; &quot;; Impacts: &quot;; [.N5])" table:style-name="ce19">
            <text:p>year: 2024; type: ConversationalAI; Military use: ; Civic use: ; Purpose: ; Capabilities: Techniques: ; Outputs: ; Risks: ; Impacts:<text:s/></text:p>
          </table:table-cell>
          <table:table-cell office:value-type="string" table:style-name="ce7">
            <text:p>./assets/noun-chatbot-7107716.png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Scylla</text:p>
          </table:table-cell>
          <table:table-cell office:value-type="string" table:style-name="ce7">
            <text:p>Scylla</text:p>
          </table:table-cell>
          <table:table-cell office:value-type="float" office:value="2025" table:style-name="ce7">
            <text:p>2025</text:p>
          </table:table-cell>
          <table:table-cell office:value-type="string" table:style-name="ce7">
            <text:p>Deployment</text:p>
          </table:table-cell>
          <table:table-cell office:value-type="string" table:style-name="ce7">
            <text:p>PredictiveBehavioralAnalysis</text:p>
          </table:table-cell>
          <table:table-cell table:number-columns-repeated="5" table:style-name="ce7"/>
          <table:table-cell table:style-name="ce18"/>
          <table:table-cell table:number-columns-repeated="3" table:style-name="ce7"/>
          <table:table-cell office:value-type="string" office:string-value="year: 2025; type: PredictiveBehavioralAnalysis; Military use: ; Civic use: ; Purpose: ; Capabilities: Techniques: ; Outputs: ; Risks: ; Impacts: " table:formula="of:= COM.MICROSOFT.CONCAT(&quot;year: &quot;;[.C6]; &quot;; type: &quot;; [.E6]; &quot;; Military use: &quot;; [.F6]; &quot;; Civic use: &quot;; [.G6]; &quot;; Purpose: &quot;; [.I6]; &quot;; Capabilities: &quot;; [.J6]; &quot;Techniques: &quot;; [.K6]; &quot;; Outputs: &quot;; [.L6]; &quot;; Risks: &quot;; [.M6]; &quot;; Impacts: &quot;; [.N6])" table:style-name="ce19">
            <text:p>year: 2025; type: PredictiveBehavioralAnalysis; Military use: ; Civic use: ; Purpose: ; Capabilities: Techniques: ; Outputs: ; Risks: ; Impacts:<text:s/></text:p>
          </table:table-cell>
          <table:table-cell office:value-type="string" table:style-name="ce7">
            <text:p>./assets/noun-surveillance-monitor-6831349.png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ChatBIT</text:p>
          </table:table-cell>
          <table:table-cell office:value-type="string" table:style-name="ce7">
            <text:p>ChatBIT</text:p>
          </table:table-cell>
          <table:table-cell office:value-type="float" office:value="2024" table:style-name="ce7">
            <text:p>2024</text:p>
          </table:table-cell>
          <table:table-cell office:value-type="string" table:style-name="ce7">
            <text:p>Deployment</text:p>
          </table:table-cell>
          <table:table-cell table:style-name="ce7"/>
          <table:table-cell office:value-type="string" table:style-name="ce7">
            <text:p>Chatbot</text:p>
          </table:table-cell>
          <table:table-cell table:number-columns-repeated="4" table:style-name="ce7"/>
          <table:table-cell table:style-name="ce18"/>
          <table:table-cell table:number-columns-repeated="3" table:style-name="ce7"/>
          <table:table-cell office:value-type="string" office:string-value="year: 2024; type: ; Military use: Chatbot; Civic use: ; Purpose: ; Capabilities: Techniques: ; Outputs: ; Risks: ; Impacts: " table:formula="of:= COM.MICROSOFT.CONCAT(&quot;year: &quot;;[.C7]; &quot;; type: &quot;; [.E7]; &quot;; Military use: &quot;; [.F7]; &quot;; Civic use: &quot;; [.G7]; &quot;; Purpose: &quot;; [.I7]; &quot;; Capabilities: &quot;; [.J7]; &quot;Techniques: &quot;; [.K7]; &quot;; Outputs: &quot;; [.L7]; &quot;; Risks: &quot;; [.M7]; &quot;; Impacts: &quot;; [.N7])" table:style-name="ce19">
            <text:p>year: 2024; type: ; Military use: Chatbot; Civic use: ; Purpose: ; Capabilities: Techniques: ; Outputs: ; Risks: ; Impacts:<text:s/></text:p>
          </table:table-cell>
          <table:table-cell office:value-type="string" table:style-name="ce7">
            <text:p>./assets/noun-chatbot-7107716.png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SKYLORD</text:p>
          </table:table-cell>
          <table:table-cell office:value-type="string" table:style-name="ce7">
            <text:p>SKYLORD</text:p>
          </table:table-cell>
          <table:table-cell office:value-type="float" office:value="2025" table:style-name="ce7">
            <text:p>2025</text:p>
          </table:table-cell>
          <table:table-cell office:value-type="string" table:style-name="ce7">
            <text:p>Deployment</text:p>
          </table:table-cell>
          <table:table-cell table:number-columns-repeated="6" table:style-name="ce7"/>
          <table:table-cell table:style-name="ce18"/>
          <table:table-cell table:number-columns-repeated="3" table:style-name="ce7"/>
          <table:table-cell office:value-type="string" office:string-value="year: 2025; type: ; Military use: ; Civic use: ; Purpose: ; Capabilities: Techniques: ; Outputs: ; Risks: ; Impacts: " table:formula="of:= COM.MICROSOFT.CONCAT(&quot;year: &quot;;[.C8]; &quot;; type: &quot;; [.E8]; &quot;; Military use: &quot;; [.F8]; &quot;; Civic use: &quot;; [.G8]; &quot;; Purpose: &quot;; [.I8]; &quot;; Capabilities: &quot;; [.J8]; &quot;Techniques: &quot;; [.K8]; &quot;; Outputs: &quot;; [.L8]; &quot;; Risks: &quot;; [.M8]; &quot;; Impacts: &quot;; [.N8])" table:style-name="ce19">
            <text:p>year: 2025; type: ; Military use: ; Civic use: ; Purpose: ; Capabilities: Techniques: ; Outputs: ; Risks: ; Impacts:<text:s/></text:p>
          </table:table-cell>
          <table:table-cell office:value-type="string" table:style-name="ce7">
            <text:p>./assets/noun-infrared-drone-4284335.png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ABCS</text:p>
          </table:table-cell>
          <table:table-cell office:value-type="string" table:style-name="ce7">
            <text:p>Automated Border Control System</text:p>
          </table:table-cell>
          <table:table-cell office:value-type="float" office:value="2025" table:style-name="ce7">
            <text:p>2025</text:p>
          </table:table-cell>
          <table:table-cell office:value-type="string" table:style-name="ce7">
            <text:p>Deployment</text:p>
          </table:table-cell>
          <table:table-cell table:number-columns-repeated="6" table:style-name="ce7"/>
          <table:table-cell table:style-name="ce18"/>
          <table:table-cell table:number-columns-repeated="3" table:style-name="ce7"/>
          <table:table-cell office:value-type="string" office:string-value="year: 2025; type: ; Military use: ; Civic use: ; Purpose: ; Capabilities: Techniques: ; Outputs: ; Risks: ; Impacts: " table:formula="of:= COM.MICROSOFT.CONCAT(&quot;year: &quot;;[.C9]; &quot;; type: &quot;; [.E9]; &quot;; Military use: &quot;; [.F9]; &quot;; Civic use: &quot;; [.G9]; &quot;; Purpose: &quot;; [.I9]; &quot;; Capabilities: &quot;; [.J9]; &quot;Techniques: &quot;; [.K9]; &quot;; Outputs: &quot;; [.L9]; &quot;; Risks: &quot;; [.M9]; &quot;; Impacts: &quot;; [.N9])" table:style-name="ce19">
            <text:p>year: 2025; type: ; Military use: ; Civic use: ; Purpose: ; Capabilities: Techniques: ; Outputs: ; Risks: ; Impacts:<text:s/></text:p>
          </table:table-cell>
          <table:table-cell office:value-type="string" table:style-name="ce7">
            <text:p>./assets/noun-passport-5368372.png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TITAN</text:p>
          </table:table-cell>
          <table:table-cell office:value-type="string" table:style-name="ce7">
            <text:p>Tactical Intelligence Targeting System</text:p>
          </table:table-cell>
          <table:table-cell table:number-columns-repeated="16382" table:style-name="ce1"/>
        </table:table-row>
        <table:table-row table:style-name="ro1">
          <table:table-cell table:style-name="ce7"/>
          <table:table-cell table:number-columns-repeated="2" table:style-name="ce1"/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1">
            <text:p>Maersk</text:p>
          </table:table-cell>
          <table:table-cell office:value-type="string" table:style-name="ce1">
            <text:p>Maersk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Maersk; stakeholder: DefenseCompany; role: AIDeveloper" table:formula="of:= COM.MICROSOFT.CONCAT(&quot;name: &quot;;[.B12]; &quot;; stakeholder: &quot;; [.C12]; &quot;; role: &quot;; [.D12])" table:style-name="ce12">
            <text:p>name: Maersk; stakeholder: DefenseCompany; role: AIDevelop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table:style-name="ce12"/>
          <table:table-cell table:style-name="ce16"/>
          <table:table-cell table:number-columns-repeated="16378" table:style-name="ce1"/>
        </table:table-row>
        <table:table-row table:style-name="ro1">
          <table:table-cell office:value-type="string" table:style-name="ce1">
            <text:p>Akima</text:p>
          </table:table-cell>
          <table:table-cell office:value-type="string" table:style-name="ce1">
            <text:p>Akima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Operator</text:p>
          </table:table-cell>
          <table:table-cell office:value-type="string" office:string-value="name: Akima; stakeholder: DefenseCompany; role: AIOperator" table:formula="of:= COM.MICROSOFT.CONCAT(&quot;name: &quot;;[.B14]; &quot;; stakeholder: &quot;; [.C14]; &quot;; role: &quot;; [.D14])" table:style-name="ce12">
            <text:p>name: Akima; stakeholder: DefenseCompany; role: AIOperato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kim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ersk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razerNash</text:p>
          </table:table-cell>
          <table:table-cell office:value-type="string" table:style-name="ce1">
            <text:p>Frazer-Nash Consultancy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Frazer-Nash Consultancy; stakeholder: DefenseCompany; role: AIDeveloper" table:formula="of:= COM.MICROSOFT.CONCAT(&quot;name: &quot;;[.B18]; &quot;; stakeholder: &quot;; [.C18]; &quot;; role: &quot;; [.D18])" table:style-name="ce12">
            <text:p>name: Frazer-Nash Consultancy; stakeholder: DefenseCompany; role: AIDeveloper</text:p>
          </table:table-cell>
          <table:table-cell office:value-type="string" table:style-name="ce16">
            <text:p>./assets/noun-museum-198296.png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20"/>
          <table:table-cell table:style-name="ce21"/>
          <table:table-cell table:style-name="ce22"/>
          <table:table-cell table:number-columns-repeated="16378" table:style-name="ce20"/>
        </table:table-row>
        <table:table-row table:style-name="ro1">
          <table:table-cell office:value-type="string" table:style-name="ce1">
            <text:p>ScyllaAI</text:p>
          </table:table-cell>
          <table:table-cell office:value-type="string" table:style-name="ce1">
            <text:p>Scylla AI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Scylla AI; stakeholder: DefenseCompany; role: AIDeveloper" table:formula="of:= COM.MICROSOFT.CONCAT(&quot;name: &quot;;[.B20]; &quot;; stakeholder: &quot;; [.C20]; &quot;; role: &quot;; [.D20])" table:style-name="ce12">
            <text:p>name: Scylla AI; stakeholder: DefenseCompany; role: AIDevelop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LIR</text:p>
          </table:table-cell>
          <table:table-cell office:value-type="string" table:style-name="ce1">
            <text:p>Teledyne FLIR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Teledyne FLIR; stakeholder: TechCompany; role: AIDeveloper" table:formula="of:= COM.MICROSOFT.CONCAT(&quot;name: &quot;;[.B21]; &quot;; stakeholder: &quot;; [.C21]; &quot;; role: &quot;; [.D21])" table:style-name="ce12">
            <text:p>name: Teledyne FLIR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style-name="ce1"/>
          <table:table-cell office:value-type="string" table:style-name="ce7">
            <text:p>(Prism Supervisor, Packbot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XTEND</text:p>
          </table:table-cell>
          <table:table-cell office:value-type="string" table:style-name="ce1">
            <text:p>XTEND</text:p>
          </table:table-cell>
          <table:table-cell office:value-type="string" table:style-name="ce1">
            <text:p>DefenseCompany</text:p>
          </table:table-cell>
          <table:table-cell office:value-type="string" table:style-name="ce1">
            <text:p>AIDeveloper</text:p>
          </table:table-cell>
          <table:table-cell office:value-type="string" office:string-value="name: XTEND; stakeholder: DefenseCompany; role: AIDeveloper" table:formula="of:= COM.MICROSOFT.CONCAT(&quot;name: &quot;;[.B22]; &quot;; stakeholder: &quot;; [.C22]; &quot;; role: &quot;; [.D22])" table:style-name="ce12">
            <text:p>name: XTEND; stakeholder: DefenseCompany; role: AIDeveloper</text:p>
          </table:table-cell>
          <table:table-cell office:value-type="string" table:style-name="ce16">
            <text:p>./assets/noun-radiation-205518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IDEMIA</text:p>
          </table:table-cell>
          <table:table-cell office:value-type="string" table:style-name="ce1">
            <text:p>IDEMIA</text:p>
          </table:table-cell>
          <table:table-cell office:value-type="string" table:style-name="ce1">
            <text:p>TechCompany</text:p>
          </table:table-cell>
          <table:table-cell office:value-type="string" table:style-name="ce1">
            <text:p>AIDeveloper</text:p>
          </table:table-cell>
          <table:table-cell office:value-type="string" office:string-value="name: IDEMIA; stakeholder: TechCompany; role: AIDeveloper" table:formula="of:= COM.MICROSOFT.CONCAT(&quot;name: &quot;;[.B23]; &quot;; stakeholder: &quot;; [.C23]; &quot;; role: &quot;; [.D23])" table:style-name="ce12">
            <text:p>name: IDEMIA; stakeholder: TechCompany; role: AIDeveloper</text:p>
          </table:table-cell>
          <table:table-cell office:value-type="string" table:style-name="ce16">
            <text:p>./assets/noun-software-industry-19833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Glasgow</text:p>
          </table:table-cell>
          <table:table-cell office:value-type="string" table:style-name="ce1">
            <text:p>University of Glasgow</text:p>
          </table:table-cell>
          <table:table-cell office:value-type="string" table:style-name="ce1">
            <text:p>Institution</text:p>
          </table:table-cell>
          <table:table-cell office:value-type="string" table:style-name="ce1">
            <text:p>AIDeveloper</text:p>
          </table:table-cell>
          <table:table-cell office:value-type="string" office:string-value="name: University of Glasgow; stakeholder: Institution; role: AIDeveloper" table:formula="of:= COM.MICROSOFT.CONCAT(&quot;name: &quot;;[.B24]; &quot;; stakeholder: &quot;; [.C24]; &quot;; role: &quot;; [.D24])" table:style-name="ce12">
            <text:p>name: University of Glasgow; stakeholder: Institution; role: AIDeveloper</text:p>
          </table:table-cell>
          <table:table-cell office:value-type="string" table:style-name="ce16">
            <text:p>./assets/noun-museum-198296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lama</text:p>
          </table:table-cell>
          <table:table-cell office:value-type="string" table:style-name="ce1">
            <text:p>AskSage</text:p>
          </table:table-cell>
          <table:table-cell office:value-type="string" table:style-name="ce1">
            <text:p>incorporate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ndeavor</text:p>
          </table:table-cell>
          <table:table-cell office:value-type="string" table:style-name="ce1">
            <text:p>FLIR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TEND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TEND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affilia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LIR</text:p>
          </table:table-cell>
          <table:table-cell office:value-type="string" table:style-name="ce1">
            <text:p>PrismSupervisor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ChatBIT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AskSage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Scylla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Vertex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number-columns-repeated="16384" table:style-name="ce20"/>
        </table:table-row>
        <table:table-row table:style-name="ro1">
          <table:table-cell office:value-type="string" table:style-name="ce1">
            <text:p>Stanford</text:p>
          </table:table-cell>
          <table:table-cell office:value-type="string" table:style-name="ce1">
            <text:p>ARPANET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K</text:p>
          </table:table-cell>
          <table:table-cell office:value-type="string" table:style-name="ce1">
            <text:p>SixthSense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AskSage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yllaAI</text:p>
          </table:table-cell>
          <table:table-cell office:value-type="string" table:style-name="ce1">
            <text:p>Scylla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ogle</text:p>
          </table:table-cell>
          <table:table-cell office:value-type="string" table:style-name="ce1">
            <text:p>Vertex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DEMIA</text:p>
          </table:table-cell>
          <table:table-cell office:value-type="string" table:style-name="ce1">
            <text:p>ABCS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-PRC</text:p>
          </table:table-cell>
          <table:table-cell office:value-type="string" table:style-name="ce1">
            <text:p>ChatBIT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TEND</text:p>
          </table:table-cell>
          <table:table-cell office:value-type="string" table:style-name="ce1">
            <text:p>SKYLORD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number-columns-repeated="4" table:style-name="ce20"/>
          <table:table-cell table:number-columns-repeated="16380"/>
        </table:table-row>
        <table:table-row table:number-rows-repeated="2" table:style-name="ro1">
          <table:table-cell table:number-columns-repeated="4" table:style-name="ce20"/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QinetiQ</text:p>
          </table:table-cell>
          <table:table-cell office:value-type="string" table:style-name="ce1">
            <text:p>SixthSense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heinmetall</text:p>
          </table:table-cell>
          <table:table-cell office:value-type="string" table:style-name="ce1">
            <text:p>SixthSense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razerNash</text:p>
          </table:table-cell>
          <table:table-cell office:value-type="string" table:style-name="ce1">
            <text:p>SixthSense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Glasgow</text:p>
          </table:table-cell>
          <table:table-cell office:value-type="string" table:style-name="ce1">
            <text:p>SixthSense</text:p>
          </table:table-cell>
          <table:table-cell office:value-type="string" table:style-name="ce1">
            <text:p>developed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cKinse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4" table:style-name="ce7"/>
          <table:table-cell table:style-name="ce19"/>
          <table:table-cell table:style-name="ce7"/>
          <table:table-cell table:number-columns-repeated="16368" table:style-name="ce14"/>
        </table:table-row>
        <table:table-row table:style-name="ro1">
          <table:table-cell office:value-type="string" table:style-name="ce1">
            <text:p>DIU</text:p>
          </table:table-cell>
          <table:table-cell office:value-type="string" table:style-name="ce1">
            <text:p>US Defense Innovation Uni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X</text:p>
          </table:table-cell>
          <table:table-cell table:style-name="ce1"/>
          <table:table-cell office:value-type="string" table:style-name="ce1">
            <text:p>Altra &amp; Drones from Helsing</text:p>
          </table:table-cell>
          <table:table-cell table:style-name="ce1"/>
          <table:table-cell office:value-type="string" table:style-name="ce1">
            <text:p>Neko Health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LIAN.AI</text:p>
          </table:table-cell>
          <table:table-cell table:number-columns-repeated="3" table:style-name="ce1"/>
          <table:table-cell office:value-type="string" table:style-name="ce1">
            <text:p>BAILLIE GIFFORD</text:p>
          </table:table-cell>
          <table:table-cell table:style-name="ce1"/>
          <table:table-cell office:value-type="string" table:style-name="ce1">
            <text:p>Airbus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Frauenhof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kraine</text:p>
          </table:table-cell>
          <table:table-cell office:value-type="string" table:style-name="ce1">
            <text:p>ADIS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Hellenic Army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Airbnb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KEVER</text:p>
          </table:table-cell>
          <table:table-cell table:number-columns-repeated="5" table:style-name="ce1"/>
          <table:table-cell office:value-type="string" table:style-name="ce1">
            <text:p>Strikeweb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ATO INNOVATION FUND</text:p>
          </table:table-cell>
          <table:table-cell table:number-columns-repeated="5" table:style-name="ce1"/>
          <table:table-cell office:value-type="string" table:style-name="ce1">
            <text:p>Geleo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rom Albanese</text:p>
          </table:table-cell>
          <table:table-cell table:number-columns-repeated="5" table:style-name="ce1"/>
          <table:table-cell office:value-type="string" table:style-name="ce1">
            <text:p>Jerich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BM</text:p>
          </table:table-cell>
          <table:table-cell office:value-type="string" table:style-name="ce1">
            <text:p>add database on civilians Israel</text:p>
          </table:table-cell>
          <table:table-cell table:number-columns-repeated="4" table:style-name="ce1"/>
          <table:table-cell office:value-type="string" table:style-name="ce1">
            <text:p>ePark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T</text:p>
          </table:table-cell>
          <table:table-cell office:value-type="string" table:style-name="ce1">
            <text:p>increase involv -swarm drones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2" table:style-name="ce1"/>
          <table:table-cell table:style-name="ce12"/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Miller</text:p>
          </table:table-cell>
          <table:table-cell office:value-type="string" table:style-name="ce1">
            <text:p>Steven Miller</text:p>
          </table:table-cell>
          <table:table-cell office:value-type="string" table:style-name="ce1">
            <text:p>politicia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lantir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investo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advisor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Mitra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K</text:p>
          </table:table-cell>
          <table:table-cell office:value-type="string" table:style-name="ce1">
            <text:p>Mitra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kraine</text:p>
          </table:table-cell>
          <table:table-cell office:value-type="string" table:style-name="ce1">
            <text:p>Mitra</text:p>
          </table:table-cell>
          <table:table-cell office:value-type="string" table:style-name="ce1">
            <text:p>employ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1048493" table:style-name="ro1">
          <table:table-cell table:number-columns-repeated="16384"/>
        </table:table-row>
      </table:table>
      <table:database-ranges>
        <table:database-range table:target-range-address="Nouns.O35:Nouns.O68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Neutral" style:family="table-cell" style:data-style-name="N0">
      <style:table-cell-properties fo:background-color="#FFEB9C"/>
      <style:text-properties fo:color="#9C5700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16</meta:generator>
    <meta:initial-creator>Sarah Ciston</meta:initial-creator>
    <dc:creator>  </dc:creator>
    <meta:creation-date>2025-02-20T13:17:28Z</meta:creation-date>
    <dc:date>2025-08-24T17:45:40Z</dc:date>
  </office:meta>
</office:document-meta>
</file>